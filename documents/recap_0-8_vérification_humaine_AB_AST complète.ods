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C000"/>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fo:background-color="#FFFFFF"/>
    </style:style>
    <style:style style:name="ce5" style:family="table-cell" style:parent-style-name="Default" style:data-style-name="N0">
      <style:table-cell-properties fo:background-color="#FFFFFF"/>
    </style:style>
    <style:style style:name="ce6" style:family="table-cell" style:parent-style-name="Default" style:data-style-name="N0">
      <style:table-cell-properties fo:background-color="#FFFFFF"/>
    </style:style>
    <style:style style:name="ce7" style:family="table-cell" style:parent-style-name="Default" style:data-style-name="N0">
      <style:table-cell-properties fo:background-color="#FFFFFF"/>
    </style:style>
    <style:style style:name="ce8" style:family="table-cell" style:parent-style-name="Default" style:data-style-name="N0">
      <style:table-cell-properties fo:background-color="#FFFFFF"/>
    </style:style>
    <style:style style:name="ce9" style:family="table-cell" style:parent-style-name="Excel_32_Built-in_32_Hyperlink" style:data-style-name="N0">
      <style:table-cell-properties style:vertical-align="automatic" fo:background-color="#FFFFFF"/>
      <style:text-properties fo:color="#0000EE" fo:font-size="10pt" style:font-size-asian="10pt" style:font-size-complex="10pt" style:text-underline-style="solid" style:text-underline-type="single"/>
    </style:style>
    <style:style style:name="co1" style:family="table-column">
      <style:table-column-properties fo:break-before="auto" style:column-width="4.33916666666667cm"/>
    </style:style>
    <style:style style:name="co2" style:family="table-column">
      <style:table-column-properties fo:break-before="auto" style:column-width="12.8852083333333cm"/>
    </style:style>
    <style:style style:name="co3" style:family="table-column">
      <style:table-column-properties fo:break-before="auto" style:column-width="24.4475cm"/>
    </style:style>
    <style:style style:name="co4" style:family="table-column">
      <style:table-column-properties fo:break-before="auto" style:column-width="34.5545833333333cm"/>
    </style:style>
    <style:style style:name="co5" style:family="table-column">
      <style:table-column-properties fo:break-before="auto" style:column-width="2.67229166666667cm"/>
    </style:style>
    <style:style style:name="co6" style:family="table-column">
      <style:table-column-properties fo:break-before="auto" style:column-width="54.1866666666667cm"/>
    </style:style>
    <style:style style:name="co7" style:family="table-column">
      <style:table-column-properties fo:break-before="auto" style:column-width="2.27541666666667cm"/>
    </style:style>
    <style:style style:name="co8" style:family="table-column">
      <style:table-column-properties fo:break-before="auto" style:column-width="2.24895833333333cm"/>
    </style:style>
    <style:style style:name="ro1"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ecap_0-8_vérification_humaine_" table:style-name="ta1">
        <table:table-column table:style-name="co1" table:default-cell-style-name="ce3"/>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93" table:default-cell-style-name="ce1"/>
        <table:table-column table:style-name="co8" table:number-columns-repeated="16284" table:default-cell-style-name="ce1"/>
        <table:table-row table:style-name="ro1">
          <table:table-cell office:value-type="string" table:style-name="ce3">
            <text:p>Vérification humaine</text:p>
          </table:table-cell>
          <table:table-cell office:value-type="string" table:style-name="ce3">
            <text:p>Complétude de l'annotation</text:p>
          </table:table-cell>
          <table:table-cell office:value-type="string" table:style-name="ce3">
            <text:p>Remarque</text:p>
          </table:table-cell>
          <table:table-cell office:value-type="string" table:style-name="ce3">
            <text:p>Annotation alternative proposée</text:p>
          </table:table-cell>
          <table:table-cell office:value-type="string" table:style-name="ce3">
            <text:p>Fichier</text:p>
          </table:table-cell>
          <table:table-cell office:value-type="string" table:style-name="ce3">
            <text:p>Annotation</text:p>
          </table:table-cell>
          <table:table-cell office:value-type="string" table:style-name="ce3">
            <text:p>Texte</text:p>
          </table:table-cell>
          <table:table-cell table:number-columns-repeated="16377"/>
        </table:table-row>
        <table:table-row table:style-name="ro1">
          <table:table-cell office:value-type="string" table:style-name="ce3">
            <text:p>Oui</text:p>
          </table:table-cell>
          <table:table-cell office:value-type="string" table:style-name="ce3">
            <text:p>un considérant annoté sur 3</text:p>
          </table:table-cell>
          <table:table-cell table:number-columns-repeated="2" table:style-name="ce3"/>
          <table:table-cell office:value-type="string" table:style-name="ce9">
            <text:p><text:a xlink:href="file:///C:/Users/anais/Downloads/AN/1963/annulation/CONSTEXT000017665174_annot.xml">file:\\\P:\CRJ\RECHERCHE\PROJET_JADE\JADE_COMMUN\Annotation\Annotation_automatique_Maritaud\Technologie_light\Super-catégories-objets_0,8\AN\1963\annulation\CONSTEXT000017665174_annot.xml</text:a></text:p>
          </table:table-cell>
          <table:table-cell office:value-type="string" table:style-name="ce3">
            <text:p>7.Opérations</text:p>
          </table:table-cell>
          <table:table-cell office:value-type="string" table:style-name="ce3">
            <text:p><text:s/>1. Considérant que le procès-verbal des opérations électorales d'une commune ne porte la mention ni du nombre des émargements, ni du nombre des bulletins de vote et enveloppes trouvés dans l'urne, ni de celui des bulletins annulés ; qu'au procès-verbal établi dans une autre commune ne figure pas le nombre des émargements ; que, dans six communes, aucun des bulletins et enveloppes annulés n'est annexé au procès-verbal et que, dans cinq autres communes, le chiffre des bulletins et enveloppes annulés annexés au procès-verbal n'est pas en concordance avec celui des bulletins et enveloppes déclarés nuls ; que l'ensemble de ces irrégularités enlève au recensement des votes toute garantie d'exactitude et fait obstacle à la vérification des nombres des voix réellement recueillies par les candidats, notamment par le sieur Poudevigne et par la dame Roca, laquelle n'a été proclamée élue qu'avec 33 voix de plus que le requéra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67\annulation\CONSTEXT000017665356_annot.xml</text:p>
          </table:table-cell>
          <table:table-cell office:value-type="string" table:style-name="ce3">
            <text:p>7.Opérations</text:p>
          </table:table-cell>
          <table:table-cell office:value-type="string" table:style-name="ce3">
            <text:p><text:s/>4. Considérant qu'il n'est pas contesté que dans la commune de Saint-Brieuc la liste par bureau de vote des électeurs admis à voter par correspondance, prévue aux articles R. 84 et suivants du Code électoral, n'a pas été dressée ; qu'ainsi, plusieurs des opérations prescrites en vertu desdits articles et notamment la communication de la liste et des documents annexes à tout électeur requérant, conformément aux dispositions de l'article R. 91, n'ont pu être accomplies ; que le procès-verbal qui doit être dressé en application de l'article L. 84 n'a pas été joint au procès-verbal des opérations de vote, conformément aux dispositions de l'article R. 92, encore qu'il résulte de l'instruction qu'environ 700 électeurs ont été admis à voter par correspondance ; que, dans la commune de Lamballe, le nombre des bénéficiaires de toutes catégories ayant effectivement vote par correspondance, le 12 mars, tel qu'il résulte des mentions portées sur les procès-verbaux des bureaux de vote, soit 246, n'a pu être confronté avec celui des enveloppes des plis recommandés ayant contenu les enveloppes électorales, ces enveloppes ayant été détruites ou égarées aussitôt après le scrutin, en violation des dispositions de l'article R. 91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67\annulation\CONSTEXT000017665356_annot.xml</text:p>
          </table:table-cell>
          <table:table-cell office:value-type="string" table:style-name="ce3">
            <text:p>7.Opérations</text:p>
          </table:table-cell>
          <table:table-cell office:value-type="string" table:style-name="ce3">
            <text:p><text:s/>5. Considérant que, sans qu'il soit besoin d'examiner les conditions dans lesquelles les demandes de vote par correspondance concernant, d'une part, 14 malades ou infirmes d'un hôpital de la commune et, d'autre part, 123 agents ou épouses d'agents du haras de Lamballe en déplacement, ont été adressées à la mairie de Lamballe, il résulte de l'instruction que 58 épouses d'agents du haras, dont l'éloignement n'était justifié que par des motifs d'ordre personnel, n'entraient dans aucune des catégories visées aux articles L. 80 et L. 81 du Code électoral et n'étaient pas en droit de bénéficier de la procédure de vote par correspondance</text:p>
          </table:table-cell>
          <table:table-cell table:number-columns-repeated="16377"/>
        </table:table-row>
        <table:table-row table:style-name="ro1">
          <table:table-cell office:value-type="string" table:style-name="ce3">
            <text:p>Oui</text:p>
          </table:table-cell>
          <table:table-cell office:value-type="string" table:style-name="ce3">
            <text:p>considérants 3, 4, 5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annulation\CONSTEXT000017665568_annot.xml</text:p>
          </table:table-cell>
          <table:table-cell office:value-type="string" table:style-name="ce3">
            <text:p>7.Opérations</text:p>
          </table:table-cell>
          <table:table-cell office:value-type="string" table:style-name="ce3">
            <text:p><text:s/>2. Considérant que, dans le douzième bureau de Bastia, des individus non identifiés ont, pendant le déroulement des opérations de vote, procédé à l'enlèvement de l'urne ainsi que de la liste d'émargement et des dossiers de votes par correspondance; que si l'urne a été récupérée intacte et scellée, la disparition définitive de la liste d'émargement et des dossiers de votes par correspondance rend impossible la comparaison du nombre des votants et de celui des bulletins et enveloppes trouvés dans l'urne et, de façon générale, ne permet pas au Conseil constitutionnel de contrôler la sincérité des résultats dans ce bureau</text:p>
          </table:table-cell>
          <table:table-cell table:number-columns-repeated="16377"/>
        </table:table-row>
        <table:table-row table:style-name="ro1">
          <table:table-cell office:value-type="string" table:style-name="ce3">
            <text:p>Oui</text:p>
          </table:table-cell>
          <table:table-cell office:value-type="string" table:style-name="ce3">
            <text:p>considérant 4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78\annulation\CONSTEXT000017665825_annot.xml</text:p>
          </table:table-cell>
          <table:table-cell office:value-type="string" table:style-name="ce3">
            <text:p>7.Opérations</text:p>
          </table:table-cell>
          <table:table-cell office:value-type="string" table:style-name="ce3">
            <text:p><text:s/>3. Considérant qu'en pareil cas, il convient de retenir, pour chaque bureau de vote, le moins élevé des deux nombres et de diminuer corrélativement le nombre des votants, celui des suffrages exprimés ainsi que celui des voix recueillies par le candidat le plus favorisé ; qu'il résulte de l'instruction que le nombre de voix obtenues par M. Jean-Jacques Servan-Schreiber doit être réduit d'un total de dix-neuf pour les bureaux de vote n° 50 de Nancy, n° 2 de Pont-à-Mousson et n° 1 de Villers-les-Nancy, où ce candidat est arrivé en tête et que le nombre de voix obtenues par M. Tondon, arrivé en tête dans le bureau de vote n° 57 de Nancy doit être diminué d'une unité ; que, par contre, il n'y a pas lieu de procéder à une seconde rectification des résultats du bureau de vote n° 50 de Nancy où M. Jean-Jacques Servan-Schreiber est arrivé en tête, à raison de la disparité, alléguée mais non établie, entre le nombre des enveloppes trouvées dans l'urne et le nombre total des suffrages exprimés et des bulletins blancs ou nuls ; que, de même, il n'y a pas lieu de rectifier les résultats des élections dans les bureaux de vote de Pompey n° 3 et de Norroy-lès-Pont-à-Mousson où M. Tondon est arrivé en tête, à raison de l'excédant du nombre des émargements par rapport au nombre des enveloppes trouvées dans l'urne, dès lors qu'il n'est pas allégué que des enveloppes auraient été retirées des urnes ; qu'après rectification du nombre des voix obtenues par chacun des candidats, M. Jean-Jacques Servan-Schreiber conserve 32 824 voix et M. Tondon 32 820, soit un écart de 4 suffrages ; Sur le moyen tiré des irrégularités de la propagande électorale</text:p>
          </table:table-cell>
          <table:table-cell table:number-columns-repeated="16377"/>
        </table:table-row>
        <table:table-row table:style-name="ro1">
          <table:table-cell office:value-type="string" table:style-name="ce3">
            <text:p>Oui</text:p>
          </table:table-cell>
          <table:table-cell office:value-type="string" table:style-name="ce3">
            <text:p>considérants 6, 8, 9, 10, 11, 12, 13, 16, 1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8\annulation\CONSTEXT000017665826_annot.xml</text:p>
          </table:table-cell>
          <table:table-cell office:value-type="string" table:style-name="ce3">
            <text:p>7.Opérations</text:p>
          </table:table-cell>
          <table:table-cell office:value-type="string" table:style-name="ce3">
            <text:p><text:s/>1. Considérant qu'en soulevant un moyen tiré de ce que les procès-verbaux de recensement des votes de certains bureaux font apparaître un excédent dans le nombre des enveloppes et bulletins sans enveloppe trouvés dans l'urne par rapport au nombre des émargements, les parties ont saisi le Conseil constitutionnel de l'ensemble des opérations de décompte des suffrages exprimés ; qu'il appartient, dans ce cas, au juge de l'élection d'examiner les procès-verbaux de tous les bureaux de vote et d'opérer les redressements nécessaires ; que lorsque apparaît l'excédent qui vient d'être indiqué, il convient de retenir, pour chaque bureau de vote, le moins élevé des deux nombres et de diminuer corrélativement le nombre des votants, celui des suffrages exprimés ainsi que celui des voix recueillies par le candidat le plus favorisé ; que de l'examen des procès-verbaux, il ressort que le nombre des voix obtenues par M. DE LA MALENE doit être réduit d'un total de vingt pour les bureaux n°46, 49, 50, 55, 56, 57 et 59 où ce candidat est arrivé en tête et que le nombre des voix obtenues par Mme AVICE arrivée en tête dans les bureaux n°37, 38, 41, 51, 52 et 54 doit, au total, être diminué de 14 unités ; qu'après ces rectifications M. DE LA MALENE, avec 15 555 voix conserve une majorité de 53 suffrages sur Mme AVICE qui a recueilli 15 502 voix ; Sur le grief relatif au décompte des bulletins nuls</text:p>
          </table:table-cell>
          <table:table-cell table:number-columns-repeated="16377"/>
        </table:table-row>
        <table:table-row table:style-name="ro1">
          <table:table-cell office:value-type="string" table:style-name="ce3">
            <text:p>Oui</text:p>
          </table:table-cell>
          <table:table-cell office:value-type="string" table:style-name="ce3">
            <text:p>considérants 6, 8, 9, 10, 11, 12, 13, 16, 1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8\annulation\CONSTEXT000017665826_annot.xml</text:p>
          </table:table-cell>
          <table:table-cell office:value-type="string" table:style-name="ce3">
            <text:p>7.Opérations</text:p>
          </table:table-cell>
          <table:table-cell office:value-type="string" table:style-name="ce3">
            <text:p><text:s/>3. Considérant que ces dispositions ne permettent pas de tenir pour nuls des bulletins de vote imprimés en vue du premier tour de scrutin et utilisés au second, dès lors, que ceux-ci répondent aux conditions visées à l'article R. 103 ; que la circonstance que les bulletins de vote du premier tour, désignaient Mme AVICE et son suppléant M. MAILLOT comme candidats du parti socialiste, alors que ceux du second tour désignaient ces candidats comme étant ceux de l''Union de toute la gauche, présentés par le P.S. et soutenus par le P.C.F. et le M.R.G.' re rend pas irrégulière l'utilisation au second tour de ces bulletins du premier tour, dès lors qu'ils répondent, les uns comme les autres, aux prescriptions du Code électoral qui réglementent leur forme et qu'au second tour Mme AVICE restait la candidate du parti socialiste même si elle bénéficiait en outre du soutien de deux autres formations politiques ; que c'est donc à tort que, contrairement à ce que d'autres bureaux de vote de la circonscription ont admis, les bureaux de vote ou la commission de recensement des votes ont annulé, au total, 13 votes exprimés au profit de Mme AVICE au moyen de bulletins imprimés pour le premier tour, dans les bureaux n°34, 40, 45, 50, 51 et 58</text:p>
          </table:table-cell>
          <table:table-cell table:number-columns-repeated="16377"/>
        </table:table-row>
        <table:table-row table:style-name="ro1">
          <table:table-cell office:value-type="string" table:style-name="ce3">
            <text:p>Oui</text:p>
          </table:table-cell>
          <table:table-cell office:value-type="string" table:style-name="ce3">
            <text:p>considérants 6, 8, 9, 10, 11, 12, 13, 16, 1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8\annulation\CONSTEXT000017665826_annot.xml</text:p>
          </table:table-cell>
          <table:table-cell office:value-type="string" table:style-name="ce3">
            <text:p>7.Opérations</text:p>
          </table:table-cell>
          <table:table-cell office:value-type="string" table:style-name="ce3">
            <text:p><text:s/>4. Considérant que c'est également à tort que le bureau de vote n° 42 a annulé un bulletin de vote en faveur de Mme AVICE, portant une légère trace, manifestement accidentelle, de rouge à lèvres</text:p>
          </table:table-cell>
          <table:table-cell table:number-columns-repeated="16377"/>
        </table:table-row>
        <table:table-row table:style-name="ro1">
          <table:table-cell office:value-type="string" table:style-name="ce3">
            <text:p>Oui</text:p>
          </table:table-cell>
          <table:table-cell office:value-type="string" table:style-name="ce3">
            <text:p>considérants 6, 8, 9, 10, 11, 12, 13, 16, 1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8\annulation\CONSTEXT000017665826_annot.xml</text:p>
          </table:table-cell>
          <table:table-cell office:value-type="string" table:style-name="ce3">
            <text:p>7.Opérations</text:p>
          </table:table-cell>
          <table:table-cell office:value-type="string" table:style-name="ce3">
            <text:p><text:s/>5. Considérant que c'est également à bon droit que le bureau de vote n°59 a tenu pour non valable le vote émis par un électeur au profit de Mme AVICE, au moyen d'une profession de foi de cette candidate ; qu'en effet ce document ne constitue pas un bulletin de vote au sens des dispositions précitées du Code électoral</text:p>
          </table:table-cell>
          <table:table-cell table:number-columns-repeated="16377"/>
        </table:table-row>
        <table:table-row table:style-name="ro1">
          <table:table-cell office:value-type="string" table:style-name="ce3">
            <text:p>Oui</text:p>
          </table:table-cell>
          <table:table-cell office:value-type="string" table:style-name="ce3">
            <text:p>considérants 6, 8, 9, 10, 11, 12, 13, 16, 1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8\annulation\CONSTEXT000017665826_annot.xml</text:p>
          </table:table-cell>
          <table:table-cell office:value-type="string" table:style-name="ce3">
            <text:p>7.Opérations</text:p>
          </table:table-cell>
          <table:table-cell office:value-type="string" table:style-name="ce3">
            <text:p><text:s/>7. Considérant que, de ce qui précède, il résulte que 14 suffrages doivent être ajoutés au nombre des voix obtenues par Mme AVICE, ce qui porte ce nombre du chiffre précédemment rectifié de 15.502 à celui de 15 516 voix; et qu'ainsi, avec 15 555 suffrages, M. DE LA MALENE conserve une majorité de 39 voix ; Sur les moyens tirés de ce que, par suite d'une double manoeuvre, un certain nombre de Français de l'étranger auraient, d'une part, été irrégulièrement inscrits sur les listes électorales de la seizième circonscription de Paris et, d'autre part, été admis à voter par procuration en méconnaissance des dispositions du Code électoral</text:p>
          </table:table-cell>
          <table:table-cell table:number-columns-repeated="16377"/>
        </table:table-row>
        <table:table-row table:style-name="ro1">
          <table:table-cell office:value-type="string" table:style-name="ce3">
            <text:p>Oui</text:p>
          </table:table-cell>
          <table:table-cell office:value-type="string" table:style-name="ce3">
            <text:p>considérants 6, 8, 9, 10, 11, 12, 13, 16, 1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8\annulation\CONSTEXT000017665826_annot.xml</text:p>
          </table:table-cell>
          <table:table-cell office:value-type="string" table:style-name="ce3">
            <text:p>7.Opérations</text:p>
          </table:table-cell>
          <table:table-cell office:value-type="string" table:style-name="ce3">
            <text:p><text:s/>14. Considérant qu'aucune disposition de loi ou de décret relative au vote par procuration n'exige que le mandant connaisse personnellement le mandataire qu'il désigne ; que, dès lors, si la requérante allègue que des électeurs résidant en République fédérale d'Allemagne et à Pondichéry auraient choisi comme mandataires des électeurs de Paris dont le nom leur avait été indiqué par des tiers, cette circonstance n'est pas de nature à entacher d'irrégularité ces procurations</text:p>
          </table:table-cell>
          <table:table-cell table:number-columns-repeated="16377"/>
        </table:table-row>
        <table:table-row table:style-name="ro1">
          <table:table-cell office:value-type="string" table:style-name="ce3">
            <text:p>Oui</text:p>
          </table:table-cell>
          <table:table-cell office:value-type="string" table:style-name="ce3">
            <text:p>considérants 6, 8, 9, 10, 11, 12, 13, 16, 1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8\annulation\CONSTEXT000017665826_annot.xml</text:p>
          </table:table-cell>
          <table:table-cell office:value-type="string" table:style-name="ce3">
            <text:p>7.Opérations</text:p>
          </table:table-cell>
          <table:table-cell office:value-type="string" table:style-name="ce3">
            <text:p><text:s/>15. Considérant que la requérante n'apporte pas la preuve que les procurations émanant de ces électeurs auraient été établies de manière incomplète par les autorités consulaires ; que si, dans un certain nombre de cas, les mentions relatives au mandant et au mandataire n'ont pas été rédigées par le signataire lui-même, cette constatation ne suffit pas à établir que le choix du mandataire n'aurait pas été fait par le mandant au moment où l'autorité consulaire a dressé la procuration</text:p>
          </table:table-cell>
          <table:table-cell table:number-columns-repeated="16377"/>
        </table:table-row>
        <table:table-row table:style-name="ro1">
          <table:table-cell office:value-type="string" table:style-name="ce3">
            <text:p>Oui</text:p>
          </table:table-cell>
          <table:table-cell office:value-type="string" table:style-name="ce3">
            <text:p>considérants 5 et 7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81\annulation\CONSTEXT000017665942_annot.xml</text:p>
          </table:table-cell>
          <table:table-cell office:value-type="string" table:style-name="ce3">
            <text:p>7.Opérations</text:p>
          </table:table-cell>
          <table:table-cell office:value-type="string" table:style-name="ce3">
            <text:p><text:s/>4. Considérant que les requérants font valoir que le nombre des bulletins et enveloppes trouvés dans les urnes est supérieur au nombre des émargements ; qu'il y a lieu, dès lors, pour le juge de l'élection, d'opérer les redressements nécessaires en retenant, pour chaque bureau de vote, le moins élevé des deux nombres et en diminuant corrélativement le nombre des votants, celui des suffrages exprimés ainsi que celui des voix recueillies par le candidat le plus favorisé ; qu'il ressort de l'examen des procès-verbaux que le nombre de voix obtenues par M Pierre de Benouville doit être réduit d'un total de sept pour les bureaux n° 35, 37, 42, 54 et 56, où ce candidat est arrivé en tête, et que le nombre de voix obtenues par M. Stelio Farandjis, arrivé en tête dans les bureaux n° 40 et 58, doit, au total, être diminué de trois unités ; que, par contre, il n'y a pas lieu de rectifier les résultats du bureau de vote n° 50, où M. Stelio Farandjis est arrivé en tête à raison de l'excédent d'une unité du nombre des émargements par rapport au nombre des enveloppes trouvées dans l'urne, dès lors qu'il n'est pas allégué que, dans le décompte des enveloppes, l'une d'elles aurait été émise ; qu'après rectification du nombre de voix obtenues par chacun des candidats, M. Pierre de Benouville conserve 12855 voix et M. Stelio Farandjis 12805 voix, soit un écart de 50 voix</text:p>
          </table:table-cell>
          <table:table-cell table:number-columns-repeated="16377"/>
        </table:table-row>
        <table:table-row table:style-name="ro1">
          <table:table-cell office:value-type="string" table:style-name="ce4">
            <text:p>Non</text:p>
          </table:table-cell>
          <table:table-cell office:value-type="string" table:style-name="ce3">
            <text:p>considérants 3, 4 et 5 ne sont pas annotés</text:p>
          </table:table-cell>
          <table:table-cell office:value-type="string" table:style-name="ce3">
            <text:p>Faits, pas de griefs</text:p>
          </table:table-cell>
          <table:table-cell table:style-name="ce3"/>
          <table:table-cell office:value-type="string" table:style-name="ce3">
            <text:p>file:\\\P:\CRJ\RECHERCHE\PROJET_JADE\JADE_COMMUN\Annotation\Annotation_automatique_Maritaud\Technologie_light\Super-catégories-objets_0,8\AN\1981\annulation\CONSTEXT000017665946_annot.xml</text:p>
          </table:table-cell>
          <table:table-cell office:value-type="string" table:style-name="ce3">
            <text:p>7.Opérations</text:p>
          </table:table-cell>
          <table:table-cell office:value-type="string" table:style-name="ce3">
            <text:p><text:s/>1. Considérant qu'à la suite du scrutin du 21 juin 1981, Mme Chepy-Léger, qui avait obtenu 33 534 voix, était proclamée élue, son unique concurrent n'ayant recueilli que 33278 suffrages</text:p>
          </table:table-cell>
          <table:table-cell table:number-columns-repeated="16377"/>
        </table:table-row>
        <table:table-row table:style-name="ro1">
          <table:table-cell office:value-type="string" table:style-name="ce3">
            <text:p>Oui</text:p>
          </table:table-cell>
          <table:table-cell office:value-type="string" table:style-name="ce3">
            <text:p>considérants 3 et 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88\annulation\CONSTEXT000017667715_annot.xml</text:p>
          </table:table-cell>
          <table:table-cell office:value-type="string" table:style-name="ce3">
            <text:p>7.Opérations</text:p>
          </table:table-cell>
          <table:table-cell office:value-type="string" table:style-name="ce3">
            <text:p><text:s/>2. Considérant, en premier lieu, qu'il résulte des articles L 62 et L. 63 du code électoral qu'il ne peut être mis à la disposition des électeurs qu'une seule urne par bureau de vote ; que corrélativement, et par application des articles R. 44 et R. 47 du même code, il ne peut y avoir plus d'un assesseur et plus d'un délégué pour chaque candidat en présence ; que c'est par suite en violation de ces prescriptions que trois urnes ont été mises à la disposition des électeurs dans l'unique bureau de vote de la commune de Tomblaine ; que, dans ces circonstances, il n'a pu être satisfait aux dispositions réglementaires relatives à la composition du bureau de vote</text:p>
          </table:table-cell>
          <table:table-cell table:number-columns-repeated="16377"/>
        </table:table-row>
        <table:table-row table:style-name="ro1">
          <table:table-cell office:value-type="string" table:style-name="ce4">
            <text:p>Non</text:p>
          </table:table-cell>
          <table:table-cell office:value-type="string" table:style-name="ce3">
            <text:p>considérant 7 n'est pas annoté</text:p>
          </table:table-cell>
          <table:table-cell table:style-name="ce3"/>
          <table:table-cell office:value-type="string" table:style-name="ce3">
            <text:p>3. Candidature</text:p>
          </table:table-cell>
          <table:table-cell office:value-type="string" table:style-name="ce9">
            <text:p><text:a xlink:href="file:///C:/Users/anais/Downloads/AN/1988/annulation/CONSTEXT000017667716_annot.xml">file:\\\P:\CRJ\RECHERCHE\PROJET_JADE\JADE_COMMUN\Annotation\Annotation_automatique_Maritaud\Technologie_light\Super-catégories-objets_0,8\AN\1988\annulation\CONSTEXT000017667716_annot.xml</text:a></text:p>
          </table:table-cell>
          <table:table-cell office:value-type="string" table:style-name="ce3">
            <text:p>4.Campagne</text:p>
          </table:table-cell>
          <table:table-cell office:value-type="string" table:style-name="ce3">
            <text:p><text:s/>5. Considérant que ce dernier texte édicte une inéligibilité ; que toute inéligibilité, qui a pour effet d'apporter uni atteinte à la liberté des candidatures, doit être interprétée restrictiveme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annulation\CONSTEXT000017667910_annot.xml</text:p>
          </table:table-cell>
          <table:table-cell office:value-type="string" table:style-name="ce3">
            <text:p>4.Campagne</text:p>
          </table:table-cell>
          <table:table-cell office:value-type="string" table:style-name="ce3">
            <text:p><text:s/>1. Considérant qu'aux termes du second alinéa de l'article L. 49 du code électoral : 'A partir de la veille du scrutin à zéro heure, il est interdit de diffuser ou de faire diffuser par tout moyen de communication audiovisuelle tout message ayant le caractère de propagande électora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annulation\CONSTEXT000017667910_annot.xml</text:p>
          </table:table-cell>
          <table:table-cell office:value-type="string" table:style-name="ce3">
            <text:p>4.Campagne</text:p>
          </table:table-cell>
          <table:table-cell office:value-type="string" table:style-name="ce3">
            <text:p><text:s/>2. Considérant que la chaîne de télévision 'Canal Plus' a diffusé le jour du second tour de scrutin vers treize heures, dans son émission non cryptée ' le Vrai journal ', dont le taux d'écoute est significatif et qui alterne reportages de nature politique et séquences satiriques, la séquence suivante, exprimée en termes humoristiques : 'A Toulon, Adriano a oublié que les électeurs du Front national, eux, ne feront pas la grasse matinée toute la journée. Alors ce serait bien qu'Adriano se lève, qu'il se lave les dents et qu'il se rende très vite dans l'isoloir le plus proche' ; que cet appel a revêtu le caractère d'un message de propagande électorale ; que cette diffusion, même si elle n'a pas donné lieu à une intervention du Conseil supérieur de l'audiovisuel, a méconnu les prescriptions de l'article L. 49 précité ; qu'alors même que la responsabilité de Mme CASANOVA dans cette émission n'est pas en cause, l'irrégularité ainsi commise a été de nature, eu égard à l'écart de trente-trois voix séparant les deux candidates, à exercer une influence suffisante pour altérer la sincérité du scrutin ; que par suite, et sans qu'il soit besoin de procéder à l'audition demandée, les opérations électorales qui se sont déroulées dans la 1ère circonscription du Var les 26 avril et 3 mai 1998 doivent être annulées ; - SUR LES CONCLUSIONS TENDANT A L'INELIGIBILITE DE MME CASANOVA</text:p>
          </table:table-cell>
          <table:table-cell table:number-columns-repeated="16377"/>
        </table:table-row>
        <table:table-row table:style-name="ro1">
          <table:table-cell office:value-type="string" table:style-name="ce3">
            <text:p>Oui</text:p>
          </table:table-cell>
          <table:table-cell office:value-type="string" table:style-name="ce3">
            <text:p>considérant 4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99\annulation\CONSTEXT000017667949_annot.xml</text:p>
          </table:table-cell>
          <table:table-cell office:value-type="string" table:style-name="ce3">
            <text:p>7.Opérations</text:p>
          </table:table-cell>
          <table:table-cell office:value-type="string" table:style-name="ce3">
            <text:p><text:s/>2. Considérant que l'examen des feuilles de pointage et de résultats, celui des procès-verbaux des bureaux de vote de la commune d'Aubagne, dont certains éléments chiffrés ont été falsifiés, toujours au détriment du requérant, ainsi que celui des listes d'émargement et de l'ensemble des pièces du dossier, notamment des témoignages de 35 électeurs inscrits n'ayant pas pris part au vote alors que leur signature est portée sur la liste d'émargement, et d'assesseurs et de scrutateurs attestant ne pas reconnaître leur signature portée sur les documents recensant les résultats de l'élection, révèle l'existence d'une fraude organisée qui a altéré les résultats des bureaux de vote n° 10, 17 et 26 ; que la circonstance, invoquée en défense par M. BELVISO, que des irrégularités auraient été constatées dans certains bureaux de vote d'autres communes ne pourrait qu'être un motif supplémentaire de contestation de la sincérité du scrutin et ne saurait en tout état de cause justifier l'atteinte au principe même de la démocratie que constitue la fraude précédemment constatée</text:p>
          </table:table-cell>
          <table:table-cell table:number-columns-repeated="16377"/>
        </table:table-row>
        <table:table-row table:style-name="ro1">
          <table:table-cell office:value-type="string" table:style-name="ce3">
            <text:p>Oui</text:p>
          </table:table-cell>
          <table:table-cell office:value-type="string" table:style-name="ce3">
            <text:p>considérants 2, 3 et 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2002\annulation\CONSTEXT000017664506_annot.xml</text:p>
          </table:table-cell>
          <table:table-cell office:value-type="string" table:style-name="ce3">
            <text:p>6.Financement</text:p>
          </table:table-cell>
          <table:table-cell office:value-type="string" table:style-name="ce3">
            <text:p>: 1. Considérant qu'aux termes du deuxième alinéa de l'article L. 52-8 du code électoral : 'Les personnes morales, à l'exception des partis ou groupements politiques, ne peuvent participer au financement de la campagne électorale d'un candidat, ni en lui consentant des dons sous quelque forme que ce soit, ni en lui fournissant des biens, services ou autres avantages directs ou indirects à des prix inférieurs à ceux qui sont habituellement pratiqués' ; qu'aux termes de l'article L. 52-12 du même code : 'Chaque candidat... soumis au plafonnement prévu à l'article L. 52-11 est tenu d'établir un compte de campagne retraçant, selon leur origine, l'ensemble des recettes perçues et, selon leur nature, l'ensemble des dépenses engagées ou effectuées en vue de l'élection, hors celles de la campagne officielle, par lui-même ou pour son compte, au cours de la période mentionnée à l'article L. 52-4. Sont réputées faites pour son compte les dépenses exposées directement au profit du candidat et avec l'accord de celui-ci, par des personnes physiques qui lui apportent leur soutien, ainsi que par les partis et groupements politiques qui ont été créés en vue de lui apporter leur soutien ou qui lui apportent leur soutien. Le candidat estime et inclut, en recettes et en dépenses, les avantages directs ou indirects, les prestations de services et dons en nature dont il a bénéficié...'</text:p>
          </table:table-cell>
          <table:table-cell table:number-columns-repeated="16377"/>
        </table:table-row>
        <table:table-row table:style-name="ro1">
          <table:table-cell office:value-type="string" table:style-name="ce3">
            <text:p>Oui</text:p>
          </table:table-cell>
          <table:table-cell office:value-type="string" table:style-name="ce3">
            <text:p>considérants 1 et 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2002\annulation\CONSTEXT000017664522_annot.xml</text:p>
          </table:table-cell>
          <table:table-cell office:value-type="string" table:style-name="ce3">
            <text:p>6.Financement</text:p>
          </table:table-cell>
          <table:table-cell office:value-type="string" table:style-name="ce3">
            <text:p><text:s/>4. Considérant qu'il n'est établi ni que le coût de fabrication et de distribution du matériel de propagande de M. STEFANINI serait supérieur au montant figurant dans les dépenses de son compte de campagne, ni que d'autres dépenses exposées en vue de l'élection y auraient été omises</text:p>
          </table:table-cell>
          <table:table-cell table:number-columns-repeated="16377"/>
        </table:table-row>
        <table:table-row table:style-name="ro1">
          <table:table-cell office:value-type="string" table:style-name="ce3">
            <text:p>Oui</text:p>
          </table:table-cell>
          <table:table-cell office:value-type="string" table:style-name="ce3">
            <text:p>considérants 1 et 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2002\annulation\CONSTEXT000017664522_annot.xml</text:p>
          </table:table-cell>
          <table:table-cell office:value-type="string" table:style-name="ce3">
            <text:p>6.Financement</text:p>
          </table:table-cell>
          <table:table-cell office:value-type="string" table:style-name="ce3">
            <text:p><text:s/>5. Considérant qu'il n'est pas davantage établi que les pages du numéro de mai-juin 2002 de la revue 'Municipalités magazine' relatant la candidature de M. STEFANINI auraient été réalisées avec l'accord du candidat ; que celui-ci ne saurait dès lors être regardé comme ayant bénéficié de ce fait d'un don d'une personne morale prohibé par les dispositions du deuxième alinéa de l'article L. 52-8 du code électoral</text:p>
          </table:table-cell>
          <table:table-cell table:number-columns-repeated="16377"/>
        </table:table-row>
        <table:table-row table:style-name="ro1">
          <table:table-cell office:value-type="string" table:style-name="ce4">
            <text:p>Non</text:p>
          </table:table-cell>
          <table:table-cell office:value-type="string" table:style-name="ce3">
            <text:p>considérants 1 et 2 ne sont pas annotés</text:p>
          </table:table-cell>
          <table:table-cell table:style-name="ce3"/>
          <table:table-cell office:value-type="string" table:style-name="ce3">
            <text:p>6. Financement</text:p>
          </table:table-cell>
          <table:table-cell office:value-type="string" table:style-name="ce9">
            <text:p><text:a xlink:href="file:///C:/Users/anais/Downloads/AN/2002/annulation/CONSTEXT000017664522_annot.xml">file:\\\P:\CRJ\RECHERCHE\PROJET_JADE\JADE_COMMUN\Annotation\Annotation_automatique_Maritaud\Technologie_light\Super-catégories-objets_0,8\AN\2002\annulation\CONSTEXT000017664522_annot.xml</text:a></text:p>
          </table:table-cell>
          <table:table-cell office:value-type="string" table:style-name="ce3">
            <text:p>4.Campagne</text:p>
          </table:table-cell>
          <table:table-cell office:value-type="string" table:style-name="ce3">
            <text:p><text:s/>6. Considérant qu'il n'y a lieu, dès lors, ni de rejeter le compte de campagne de M. STEFANINI, ni de le déclarer celui-ci inéligible,</text:p>
          </table:table-cell>
          <table:table-cell table:number-columns-repeated="16377"/>
        </table:table-row>
        <table:table-row table:style-name="ro1">
          <table:table-cell office:value-type="string" table:style-name="ce3">
            <text:p>Oui</text:p>
          </table:table-cell>
          <table:table-cell office:value-type="string" table:style-name="ce3">
            <text:p>considérants 4, 5, 8-10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2003\annulation\CONSTEXT000017664553_annot.xml</text:p>
          </table:table-cell>
          <table:table-cell office:value-type="string" table:style-name="ce3">
            <text:p>6.Financement</text:p>
          </table:table-cell>
          <table:table-cell office:value-type="string" table:style-name="ce3">
            <text:p><text:s/>3. Considérant qu'eu égard à l'objet de la législation relative à la transparence financière de la vie politique, au financement des campagnes électorales et à la limitation des dépenses électorales, une personne morale de droit privé qui s'est assigné un but politique ne peut être regardée comme un ' parti ou groupement politique ' au sens de l'article L. 52-8 du code électoral que si elle relève des articles 8 et 9 de la loi du 11 mars 1988 susvisée, ou s'est soumise aux règles fixées par les articles 11 à 11-7 de la même loi qui imposent notamment aux partis et groupements politiques de ne recueillir des fonds que par l'intermédiaire d'un mandataire, qui peut être soit une personne physique dont le nom est déclaré à la préfecture, soit une association de financement agréée par la Commission nationale des comptes de campagne et des financements politiques</text:p>
          </table:table-cell>
          <table:table-cell table:number-columns-repeated="16377"/>
        </table:table-row>
        <table:table-row table:style-name="ro1">
          <table:table-cell office:value-type="string" table:style-name="ce3">
            <text:p>Oui</text:p>
          </table:table-cell>
          <table:table-cell office:value-type="string" table:style-name="ce3">
            <text:p>considérants 4, 5, 8-10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2003\annulation\CONSTEXT000017664553_annot.xml</text:p>
          </table:table-cell>
          <table:table-cell office:value-type="string" table:style-name="ce3">
            <text:p>6.Financement</text:p>
          </table:table-cell>
          <table:table-cell office:value-type="string" table:style-name="ce3">
            <text:p><text:s/>6. Considérant que des affiches signées ' PCF 93 ' et invitant les électeurs à se mobiliser ' contre la droite et l'extrême-droite ' ont été placardées à Montreuil pendant le mois qui a précédé le premier tour de scrutin ; que, selon M. PETITJEAN, ces affiches n'ont été utilisées dans aucune autre localité du département ; que le coût de l'affichage réalisé à Montreuil doit être regardé, dans les circonstances de l'espèce et eu égard au fait que M. BRARD était le candidat soutenu par le Parti communiste français dans la 7ème circonscription, comme une dépense exposée directement à son profit et avec son accord, au sens de l'article L. 52-12 du code électoral ; que cette dépense, qui ne figure pas dans son compte de campagne, doit y être réintégrée ; que, toutefois, alors que le montant des dépenses déclarées par l'intéressé est inférieur de 4 492 euros au plafond des dépenses électorales déterminé conformément aux dispositions de l'article L. 52-11 du code électoral, il ne résulte pas de l'instruction que cette réintégration entraîne un dépassement de ce plafond</text:p>
          </table:table-cell>
          <table:table-cell table:number-columns-repeated="16377"/>
        </table:table-row>
        <table:table-row table:style-name="ro1">
          <table:table-cell office:value-type="string" table:style-name="ce4">
            <text:p>Oui</text:p>
          </table:table-cell>
          <table:table-cell office:value-type="string" table:style-name="ce3">
            <text:p>considérants 4, 5, 8-10 ne sont pas annotés</text:p>
          </table:table-cell>
          <table:table-cell table:number-columns-repeated="2" table:style-name="ce3"/>
          <table:table-cell office:value-type="string" table:style-name="ce9">
            <text:p><text:a xlink:href="file:///C:/Users/anais/Downloads/AN/2003/annulation/CONSTEXT000017664553_annot.xml">file:\\\P:\CRJ\RECHERCHE\PROJET_JADE\JADE_COMMUN\Annotation\Annotation_automatique_Maritaud\Technologie_light\Super-catégories-objets_0,8\AN\2003\annulation\CONSTEXT000017664553_annot.xml</text:a></text:p>
          </table:table-cell>
          <table:table-cell office:value-type="string" table:style-name="ce3">
            <text:p>4.Campagne</text:p>
          </table:table-cell>
          <table:table-cell office:value-type="string" table:style-name="ce3">
            <text:p><text:s/>7. Considérant qu'il résulte de ce qui précède qu'il n'y a pas lieu de déclarer M. BRARD inéligible ; - SUR LE DÉROULEMENT DE LA CAMPAGNE ÉLECTORALE : - Sans qu'il soit besoin d'examiner les autres griefs invoqués par MM. PETITJEAN et GAULIN</text:p>
          </table:table-cell>
          <table:table-cell table:number-columns-repeated="16377"/>
        </table:table-row>
        <table:table-row table:style-name="ro1">
          <table:table-cell office:value-type="string" table:style-name="ce3">
            <text:p>Oui</text:p>
          </table:table-cell>
          <table:table-cell office:value-type="string" table:style-name="ce3">
            <text:p>considérants 2, 6 et 7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2012\annulation\CONSTEXT000027090310_annot.xml</text:p>
          </table:table-cell>
          <table:table-cell office:value-type="string" table:style-name="ce3">
            <text:p>6.Financement</text:p>
          </table:table-cell>
          <table:table-cell office:value-type="string" table:style-name="ce3">
            <text:p><text:s/>5. Considérant que, par une décision en date du 8 octobre 2012 susvisée, la Commission nationale des comptes de campagne et des financements politiques a approuvé, après l'avoir réformé pour retrancher des dépenses et des recettes une somme de 273 euros, le compte de campagne de M. ABOUD et l'a fixé, en dépenses et en recettes, à 47 764 euros</text:p>
          </table:table-cell>
          <table:table-cell table:number-columns-repeated="16377"/>
        </table:table-row>
        <table:table-row table:style-name="ro1">
          <table:table-cell office:value-type="string" table:style-name="ce4">
            <text:p>Non</text:p>
          </table:table-cell>
          <table:table-cell office:value-type="string" table:style-name="ce3">
            <text:p>considérants 2, 6 et 7 ne sont pas annotés / décision du juge</text:p>
          </table:table-cell>
          <table:table-cell table:number-columns-repeated="2" table:style-name="ce3"/>
          <table:table-cell office:value-type="string" table:style-name="ce9">
            <text:p><text:a xlink:href="file:///C:/Users/anais/Downloads/AN/2012/annulation/CONSTEXT000027090310_annot.xml">file:\\\P:\CRJ\RECHERCHE\PROJET_JADE\JADE_COMMUN\Annotation\Annotation_automatique_Maritaud\Technologie_light\Super-catégories-objets_0,8\AN\2012\annulation\CONSTEXT000027090310_annot.xml</text:a></text:p>
          </table:table-cell>
          <table:table-cell office:value-type="string" table:style-name="ce3">
            <text:p>7.Opérations</text:p>
          </table:table-cell>
          <table:table-cell office:value-type="string" table:style-name="ce3">
            <text:p><text:s/>9. Considérant qu'il résulte de ce qui précède que les conclusions de Mme ROQUÉ doivent être rejetées,</text:p>
          </table:table-cell>
          <table:table-cell table:number-columns-repeated="16377"/>
        </table:table-row>
        <table:table-row table:style-name="ro1">
          <table:table-cell office:value-type="string" table:style-name="ce3">
            <text:p>Oui</text:p>
          </table:table-cell>
          <table:table-cell office:value-type="string" table:style-name="ce3">
            <text:p>considérants 4 et 5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2017\annulation\CONSTEXT000036238090_annot.xml</text:p>
          </table:table-cell>
          <table:table-cell office:value-type="string" table:style-name="ce3">
            <text:p>4.Campagne</text:p>
          </table:table-cell>
          <table:table-cell office:value-type="string" table:style-name="ce3">
            <text:p><text:s/>3. Aux termes de l'article L. 49 du code électoral : « À partir de la veille du scrutin à zéro heure, il est interdit de distribuer ou faire distribuer des bulletins, circulaires et autres documents. - À partir de la veille du scrutin à zéro heure, il est également interdit de diffuser ou de faire diffuser par tout moyen de communication au public par voie électronique tout message ayant le caractère de propagande électorale ».</text:p>
          </table:table-cell>
          <table:table-cell table:number-columns-repeated="16377"/>
        </table:table-row>
        <table:table-row table:style-name="ro1">
          <table:table-cell office:value-type="string" table:style-name="ce3">
            <text:p>Oui</text:p>
          </table:table-cell>
          <table:table-cell office:value-type="string" table:style-name="ce3">
            <text:p>considérants 4, 5 et 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2017\annulation\CONSTEXT000036238091_annot.xml</text:p>
          </table:table-cell>
          <table:table-cell office:value-type="string" table:style-name="ce3">
            <text:p>7.Opérations</text:p>
          </table:table-cell>
          <table:table-cell office:value-type="string" table:style-name="ce3">
            <text:p><text:s/>3. M. MONTSARRAT soutient que les signatures figurant pour les deux tours de scrutin en marge du nom d'un même électeur présentent, dans 164 cas, des différences qui établissent que le vote n'a pas été effectué par l'électeur. Il résulte de l'instruction, notamment de l'examen des listes d'émargement des bureaux de vote concernés, que, pour l'essentiel des cas, les différences alléguées ne sont pas probantes. En revanche, quatre votes, correspondant à des différences de signature significatives, doivent être regardés comme irrégulièrement exprimés au second tour de scrutin.</text:p>
          </table:table-cell>
          <table:table-cell table:number-columns-repeated="16377"/>
        </table:table-row>
        <table:table-row table:style-name="ro1">
          <table:table-cell office:value-type="string" table:style-name="ce3">
            <text:p>Oui</text:p>
          </table:table-cell>
          <table:table-cell office:value-type="string" table:style-name="ce3">
            <text:p>le 25 au tout début n'est pas un numéro du considérant, mais le nombre de votes.</text:p>
          </table:table-cell>
          <table:table-cell table:number-columns-repeated="2" table:style-name="ce3"/>
          <table:table-cell office:value-type="string" table:style-name="ce3">
            <text:p>file:\\\P:\CRJ\RECHERCHE\PROJET_JADE\JADE_COMMUN\Annotation\Annotation_automatique_Maritaud\Technologie_light\Super-catégories-objets_0,8\AN\2018\annulation\CONSTEXT000036539290_annot.xml</text:p>
          </table:table-cell>
          <table:table-cell office:value-type="string" table:style-name="ce3">
            <text:p>7.Opérations</text:p>
          </table:table-cell>
          <table:table-cell office:value-type="string" table:style-name="ce3">
            <text:p><text:s/>25. Par suite, 25 votes doivent être regardés comme exprimés de manière irrégulière et il y a lieu de déduire 25 voix, tant du nombre de voix obtenues par Mme ALI, candidate proclamée élue de la 1ère circonscription de Mayotte, que du nombre de suffrages exprimés. L'écart de voix entre les deux candidats présents au second tour de scrutin s'établit ainsi à</text:p>
          </table:table-cell>
          <table:table-cell table:number-columns-repeated="16377"/>
        </table:table-row>
        <table:table-row table:style-name="ro1">
          <table:table-cell office:value-type="string" table:style-name="ce3">
            <text:p>Oui</text:p>
          </table:table-cell>
          <table:table-cell office:value-type="string" table:style-name="ce3">
            <text:p>considérants 2 et 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2018\annulation\CONSTEXT000036539290_annot.xml</text:p>
          </table:table-cell>
          <table:table-cell office:value-type="string" table:style-name="ce3">
            <text:p>4.Campagne</text:p>
          </table:table-cell>
          <table:table-cell office:value-type="string" table:style-name="ce3">
            <text:p><text:s/>3. En premier lieu, le requérant soutient que, en violation des dispositions de l'article L. 49 du code électoral, la candidate élue a, le jour même du second tour de l'élection, poursuivi sa campagne électorale sur Internet. À l'appui de son grief, il produit trois copies écran d'une page « Facebook » au nom de la candidate élue et de son suppléant, datées du 18 juin 2017, diffusant des appels au vote. Réfutant toute responsabilité dans la mise en ligne de ces messages de propagande, la candidate élue répond que le compte « Facebook » utilisé ne correspond pas à son compte officiel de campagne. Par ailleurs, elle argue que la candidature du requérant a été soutenue par des appels au vote et des messages de soutien irréguliers publiés, le 17 juin 2017, sur plusieurs pages « Facebook » dont celle du requérant. Il résulte de l'instruction que de multiples messages informatiques en faveur des deux candidats présents au second tour de l'élection, ayant le caractère de documents de propagande électorale, ont bien été diffusés les 17 et 18 juin, veille et jour du second tour de scrutin, en violation de l'article L. 49 du code électoral qui interdit, à partir de la veille du scrutin à zéro heure, de distribuer ou de faire distribuer des bulletins, circulaires et autres documents ainsi que, par voie électronique, tout message ayant le caractère de propagande électorale.</text:p>
          </table:table-cell>
          <table:table-cell table:number-columns-repeated="16377"/>
        </table:table-row>
        <table:table-row table:style-name="ro1">
          <table:table-cell office:value-type="string" table:style-name="ce3">
            <text:p>Oui</text:p>
          </table:table-cell>
          <table:table-cell office:value-type="string" table:style-name="ce3">
            <text:p>considérant 3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2018\annulation\CONSTEXT000036706180_annot.xml</text:p>
          </table:table-cell>
          <table:table-cell office:value-type="string" table:style-name="ce3">
            <text:p>7.Opérations</text:p>
          </table:table-cell>
          <table:table-cell office:value-type="string" table:style-name="ce3">
            <text:p><text:s/>4. Il résulte de l'instruction que, parmi les électeurs de la circonscription qui avaient demandé, dans les conditions fixées à l'article R. 176-4 du code électoral, à recevoir le matériel de vote leur permettant de voter par correspondance sous pli fermé, 94 ne l'ont pas reçu pour le premier tour de scrutin, par suite d'une erreur de traitement informatique de leurs demandes. Il ressort de l'examen des listes d'émargement des bureaux de vote de la circonscription que, parmi ces 94 électeurs, 56 n'ont pas non plus participé à ce premier tour de scrutin par le vote à l'urne ou par procuration, comme ils en conservaient légalement la faculté.</text:p>
          </table:table-cell>
          <table:table-cell table:number-columns-repeated="16377"/>
        </table:table-row>
        <table:table-row table:style-name="ro1">
          <table:table-cell office:value-type="string" table:style-name="ce3">
            <text:p>Oui</text:p>
          </table:table-cell>
          <table:table-cell office:value-type="string" table:style-name="ce3">
            <text:p>considérant 3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2018\annulation\CONSTEXT000036706180_annot.xml</text:p>
          </table:table-cell>
          <table:table-cell office:value-type="string" table:style-name="ce3">
            <text:p>7.Opérations</text:p>
          </table:table-cell>
          <table:table-cell office:value-type="string" table:style-name="ce3">
            <text:p><text:s/>5. La requérante soutient par ailleurs qu'en raison de retards dans l'acheminement de ce matériel de vote ou de lacunes dans le matériel transmis, notamment l'enveloppe électorale destinée à contenir le bulletin de vote, de nombreux autres électeurs n'ont pas pu non plus voter par correspondance sous pli fermé au premier ou au second tour du scrutin. Si le nombre total d'électeurs affectés par ces dysfonctionnements au premier tour ne peut être précisément connu, la réalité de ces retards et de ces lacunes est suffisamment attestée par les témoignages produits par la requérante, émanant d'électeurs qui s'en sont plaints et dont l'examen des listes d'émargement établit qu'ils n'ont participé au premier tour de scrutin ni par correspondance, ni par vote à l'urne ou par procuration.</text:p>
          </table:table-cell>
          <table:table-cell table:number-columns-repeated="16377"/>
        </table:table-row>
        <table:table-row table:style-name="ro1">
          <table:table-cell office:value-type="string" table:style-name="ce3">
            <text:p>Oui</text:p>
          </table:table-cell>
          <table:table-cell office:value-type="string" table:style-name="ce3">
            <text:p>considérant 3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2018\annulation\CONSTEXT000036706180_annot.xml</text:p>
          </table:table-cell>
          <table:table-cell office:value-type="string" table:style-name="ce3">
            <text:p>4.Campagne</text:p>
          </table:table-cell>
          <table:table-cell office:value-type="string" table:style-name="ce3">
            <text:p><text:s/>6. Il résulte enfin de l'instruction qu'en méconnaissance du second alinéa de l'article L. 49 du code électoral, selon lequel « À partir de la veille du scrutin à zéro heure, il est (…) interdit de diffuser ou de faire diffuser par tout moyen de communication au public par voie électronique tout message ayant le caractère de propagande électorale », M. RALLE-ANDREOLI a diffusé par courrier électronique un message de propagande électorale le samedi 3 juin 2017, veille du premier tour de scrutin, à 20 h 03, adressé à au moins une partie des électeurs inscrits sur les listes électorales consulaires de la circonscription.</text:p>
          </table:table-cell>
          <table:table-cell table:number-columns-repeated="16377"/>
        </table:table-row>
        <table:table-row table:style-name="ro1">
          <table:table-cell office:value-type="string" table:style-name="ce4">
            <text:p>Non</text:p>
          </table:table-cell>
          <table:table-cell office:value-type="string" table:style-name="ce3">
            <text:p>considérant 2 n'est pas annoté</text:p>
          </table:table-cell>
          <table:table-cell table:style-name="ce3"/>
          <table:table-cell office:value-type="string" table:style-name="ce3">
            <text:p>7. Opérations (corrigé)</text:p>
          </table:table-cell>
          <table:table-cell office:value-type="string" table:style-name="ce9">
            <text:p><text:a xlink:href="file:///C:/Users/anais/Downloads/AN/2022/annulation/CONSTEXT000046778541_annot.xml">file:\\\P:\CRJ\RECHERCHE\PROJET_JADE\JADE_COMMUN\Annotation\Annotation_automatique_Maritaud\Technologie_light\Super-catégories-objets_0,8\AN\2022\annulation\CONSTEXT000046778541_annot.xml</text:a></text:p>
          </table:table-cell>
          <table:table-cell office:value-type="string" table:style-name="ce3">
            <text:p>4.Campagne</text:p>
          </table:table-cell>
          <table:table-cell office:value-type="string" table:style-name="ce3">
            <text:p><text:s/>1. Aux termes du dernier alinéa de l'article L. 62-1 du code électoral : « Le vote de chaque électeur est constaté par sa signature apposée à l'encre en face de son nom sur la liste d'émargement ». Il ressort de ces dispositions, destinées à assurer la sincérité des opérations électorales, que seule la signature personnelle, à l'encre, d'un électeur est de nature à apporter la preuve de sa participation au scrutin, sauf cas d'impossibilité dûment mentionnée sur la liste d'émargement.</text:p>
          </table:table-cell>
          <table:table-cell table:number-columns-repeated="16377"/>
        </table:table-row>
        <table:table-row table:style-name="ro1">
          <table:table-cell office:value-type="string" table:style-name="ce3">
            <text:p>Oui</text:p>
          </table:table-cell>
          <table:table-cell office:value-type="string" table:style-name="ce3">
            <text:p>considérant 2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2022\annulation\CONSTEXT000046778541_annot.xml</text:p>
          </table:table-cell>
          <table:table-cell office:value-type="string" table:style-name="ce3">
            <text:p>7.Opérations</text:p>
          </table:table-cell>
          <table:table-cell office:value-type="string" table:style-name="ce3">
            <text:p><text:s/>3. Il résulte de l'instruction, notamment de l'examen des listes d'émargement des bureaux de vote contestés, que, dans la plupart des cas, les différences de signature alléguées ou bien sont peu probantes, ou bien sont imputables au fait que le mandant a voté à l'un des deux tours, ou à la circonstance que l'électeur a utilisé successivement ses initiales, un paraphe ou sa signature ou encore, pour les femmes mariées, le nom patronymique ou le nom d'usage, ou encore résultent d'erreurs matérielles commises par des électeurs ayant signé dans une mauvaise case. En revanche, dix-huit votes, correspondant à des différences de signature significatives, doivent être regardés comme irrégulièrement exprimés. Par ailleurs, huit votes ont donné lieu à des émargements entre les cases réservées respectivement au premier et au second tours, sans qu'aucune marque ni indication sur ces listes ou sur les procès-verbaux ne permette de déterminer à quel tour ces émargements se sont rapportés ni, par suite, d'établir que les suffrages correspondant à ces émargements douteux ont bien été décomptés au titre du tour auquel ils correspondent. Par suite, ces huit suffrages doivent également être regardés comme irrégulièrement exprimés. Enfin, le procès-verbal du bureau de vote n° 6 de la commune d'Angoulême indique qu'une personne, qui n'avait pas qualité pour voter faute de procuration régulière, a introduit son bulletin dans l'urne avant que les membres du bureau ne se soient aperçus de son défaut de qualité pour voter. Par suite, dans ce bureau de vote, un suffrage doit être regardé comme irrégulièrement exprimé.</text:p>
          </table:table-cell>
          <table:table-cell table:number-columns-repeated="16377"/>
        </table:table-row>
        <table:table-row table:style-name="ro1">
          <table:table-cell office:value-type="string" table:style-name="ce4">
            <text:p>Non</text:p>
          </table:table-cell>
          <table:table-cell office:value-type="string" table:style-name="ce3">
            <text:p>considérant 3 n'est pas annoté</text:p>
          </table:table-cell>
          <table:table-cell table:style-name="ce3"/>
          <table:table-cell office:value-type="string" table:style-name="ce3">
            <text:p>1. Procédure</text:p>
          </table:table-cell>
          <table:table-cell office:value-type="string" table:style-name="ce3">
            <text:p>file:\\\P:\CRJ\RECHERCHE\PROJET_JADE\JADE_COMMUN\Annotation\Annotation_automatique_Maritaud\Technologie_light\Super-catégories-objets_0,8\AN\1958\rejet\CONSTEXT000017664998_annot.xml</text:p>
          </table:table-cell>
          <table:table-cell office:value-type="string" table:style-name="ce3">
            <text:p>4.Campagne</text:p>
          </table:table-cell>
          <table:table-cell office:value-type="string" table:style-name="ce3">
            <text:p><text:s/>2. Considérant que le sieur Faure a fait acte de candidature pour le premier tour des élections dans la 4e circonscription de l'Allier ; que, dès lors, bien que n'ayant pas renouvelé cette candidature pour le second tour, il est recevable à contester le résultat de l'élection ; Sur le fond</text:p>
          </table:table-cell>
          <table:table-cell table:number-columns-repeated="16377"/>
        </table:table-row>
        <table:table-row table:style-name="ro1">
          <table:table-cell office:value-type="string" table:style-name="ce3">
            <text:p>Oui</text:p>
          </table:table-cell>
          <table:table-cell office:value-type="string" table:style-name="ce3">
            <text:p>considérants 2 et 3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58\rejet\CONSTEXT000017664999_annot.xml</text:p>
          </table:table-cell>
          <table:table-cell office:value-type="string" table:style-name="ce3">
            <text:p>7.Opérations</text:p>
          </table:table-cell>
          <table:table-cell office:value-type="string" table:style-name="ce3">
            <text:p><text:s/>1. Considérant d'une part, qu'il n'est pas établi par l'instruction que l'omission par les présidents de quatre bureaux de vote de demander la production de pièces d'identité ait favorisé des fraudes ou permis l'utilisation irrégulière de cartes électorales ; ni que des électeurs se seraient abstenus de passer par l'isoloir ; ni que des bulletins de vote portant des mentions susceptibles de les faire déclarer nuls aient été placés parmi les bulletins mis à la disposition des électeur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58\rejet\CONSTEXT000017665004_annot.xml</text:p>
          </table:table-cell>
          <table:table-cell office:value-type="string" table:style-name="ce3">
            <text:p>4.Campagne</text:p>
          </table:table-cell>
          <table:table-cell office:value-type="string" table:style-name="ce3">
            <text:p><text:s/>2. Considérant que, dans toute élection, et plus particulièrement dans une élection au scrutin uninominal à deux tours, les candidats sont libres de modifier, à tout moment, le sens qu'ils entendent donner à leur candidature pourvu que cette modification ne soit pas de nature à induire les électeurs en erreur ; Sur le second moyen</text:p>
          </table:table-cell>
          <table:table-cell table:number-columns-repeated="16377"/>
        </table:table-row>
        <table:table-row table:style-name="ro1">
          <table:table-cell office:value-type="string" table:style-name="ce3">
            <text:p>Oui</text:p>
          </table:table-cell>
          <table:table-cell office:value-type="string" table:style-name="ce3">
            <text:p>considérants 1 et 3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58\rejet\CONSTEXT000017665012_annot.xml</text:p>
          </table:table-cell>
          <table:table-cell office:value-type="string" table:style-name="ce3">
            <text:p>4.Campagne</text:p>
          </table:table-cell>
          <table:table-cell office:value-type="string" table:style-name="ce3">
            <text:p><text:s/>2. Considérant qu'il n'est pas établi par l'instruction que le candidat proclamé élu ait bénéficié d'une propagande irrégulière ou excédant les limites normales de la polémique</text:p>
          </table:table-cell>
          <table:table-cell table:number-columns-repeated="16377"/>
        </table:table-row>
        <table:table-row table:style-name="ro1">
          <table:table-cell office:value-type="string" table:style-name="ce3">
            <text:p>Oui</text:p>
          </table:table-cell>
          <table:table-cell office:value-type="string" table:style-name="ce3">
            <text:p>considérant 1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58\rejet\CONSTEXT000017665013_annot.xml</text:p>
          </table:table-cell>
          <table:table-cell office:value-type="string" table:style-name="ce3">
            <text:p>4.Campagne</text:p>
          </table:table-cell>
          <table:table-cell office:value-type="string" table:style-name="ce3">
            <text:p><text:s/>2. Considérant qu'il n'est pas établi que la présentation typographique du bulletin du sieur Boisdé ait pu créer une équivoque constituant une manoeuvre susceptible de tromper l'électeur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58\rejet\CONSTEXT000017665014_annot.xml</text:p>
          </table:table-cell>
          <table:table-cell office:value-type="string" table:style-name="ce3">
            <text:p>4.Campagne</text:p>
          </table:table-cell>
          <table:table-cell office:value-type="string" table:style-name="ce3">
            <text:p><text:s/>2. Considérant que le requérant n'établit pas que les irrégularités d'affichage électoral qu'il dénonce puissent être regardées comme ayant eu une influence sur le résultat du scrutin ; que les autres faits allégués ne constituent ni des irrégularités ni des manoeuvres susceptibles d'altérer le résultat du scrutin, et qu'en particulier il n'est pas établi que M. de Broglie ait induit les électeurs en erreur sur son appartenance politique ;</text:p>
          </table:table-cell>
          <table:table-cell table:number-columns-repeated="16377"/>
        </table:table-row>
        <table:table-row table:style-name="ro1">
          <table:table-cell office:value-type="string" table:style-name="ce4">
            <text:p>Non</text:p>
          </table:table-cell>
          <table:table-cell office:value-type="string" table:style-name="ce3">
            <text:p>considérants 2-7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59\rejet\CONSTEXT000017664928_annot.xml</text:p>
          </table:table-cell>
          <table:table-cell office:value-type="string" table:style-name="ce3">
            <text:p>4.Campagne</text:p>
          </table:table-cell>
          <table:table-cell office:value-type="string" table:style-name="ce3">
            <text:p><text:s/>1. Considérant que les trois requêtes susvisées présentées par les sieurs Faivre (Gérard), Laquière (Claude), Mahdi Saci, et Roudoci Omar, les sieurs Muller (Roger), Fabre (François), Sahraoui Mohammed et Bouharaoua Mohammed, et les sieurs Jamilloux (Léonard), Abbad Ali, Menia Abboud et Fiel (Paul), sont relatives aux mêmes opérations électorales ; qu'il y a lieu de les joindre pour y être statué par une seule décision ; Sur les moyens relatifs à l'inéligibilité prétendue du sieur Abdesselam (Robert)</text:p>
          </table:table-cell>
          <table:table-cell table:number-columns-repeated="16377"/>
        </table:table-row>
        <table:table-row table:style-name="ro1">
          <table:table-cell office:value-type="string" table:style-name="ce4">
            <text:p>Non</text:p>
          </table:table-cell>
          <table:table-cell office:value-type="string" table:style-name="ce3">
            <text:p>considérants 2 et 3 ne sont pas annotés</text:p>
          </table:table-cell>
          <table:table-cell office:value-type="string" table:style-name="ce3">
            <text:p>ne devrait pas être annoté (jonction des requêtes)</text:p>
          </table:table-cell>
          <table:table-cell table:style-name="ce3"/>
          <table:table-cell office:value-type="string" table:style-name="ce3">
            <text:p>file:\\\P:\CRJ\RECHERCHE\PROJET_JADE\JADE_COMMUN\Annotation\Annotation_automatique_Maritaud\Technologie_light\Super-catégories-objets_0,8\AN\1959\rejet\CONSTEXT000017664932_annot.xml</text:p>
          </table:table-cell>
          <table:table-cell office:value-type="string" table:style-name="ce3">
            <text:p>4.Campagne</text:p>
          </table:table-cell>
          <table:table-cell office:value-type="string" table:style-name="ce3">
            <text:p><text:s/>1. Considérant que les requêtes susvisées des sieurs Rosan Girard, Valentino (Paul), Daninthe (Guy), Miath (Edgard), Thérésine Tessonneau, Tafia (Jules), la dame Tafia (Jules), le sieur Deby (Auguste), la dame Deby (Auguste), la demoiselle Deby (Josette), le sieur Coline (Paul, dit Narcisse), les sieurs Surville (Eugène), Marelille (François), Hamlet (Saint-Ange), Suray (Joseph), Hugues (Saint-Etienne), Archimède (Stéphane-Félix), Barolin (Laventure), Duplessis (Nicolas-Marcel), Delmestre (Faustin) Fiari (Roger-Arsène), Boutin (Lazare), Vrecord (Maximilien), Nomède (Appolinaire), la dame Ribère (Euloge), le sieur Belise (Denis), la demoiselle Anguis (Emma), la dame Berlin Cotellon née Blemand, le sieur Chipolel (Maximilien), la demoiselle Chipotel (Raphaëla), les sieurs Cita (Sidonie), Dembedydy (Gérard), Ibene (H.), Ismard (Georges), la demoiselle Lautrie (Lucilienne), les sieurs Marognes (Aubin), Parole (Fénelon), Rugard (Victor), la dame Rugard (Victor), le sieur Songeons (Hermann), la dame Talis, née Gane, les sieurs Tassius (Gérard), Elatre (Verdon), Toussaint (Baptiste), Violanes (Michel), Yssap (Eugène), Calabre (Prudent), Camy (Hubert), la dame Celis (Losy-René), le sieur Ciredef (Michael), la dame Daninthe (Ambroise), née Gros, le sieur Deschamps (Sylver), la dame Deschamps (Sidoine), la dame Dralou (Fernande), la dame Hippon (Jules), les sieurs Ilponse (Estelia), Lambert (Montenol), Mimifer (Amédée), la demoiselle Telar (Gastonia), le sieur Tesira (Jumarie) sont relatives aux mêmes opérations électorales ; qu'il y a lieu de les joindre pour y être statué par la même décision</text:p>
          </table:table-cell>
          <table:table-cell table:number-columns-repeated="16377"/>
        </table:table-row>
        <table:table-row table:style-name="ro1">
          <table:table-cell office:value-type="string" table:style-name="ce4">
            <text:p>Non</text:p>
          </table:table-cell>
          <table:table-cell office:value-type="string" table:style-name="ce3">
            <text:p>considérants 2 et 3 ne sont pas annotés</text:p>
          </table:table-cell>
          <table:table-cell table:style-name="ce3"/>
          <table:table-cell office:value-type="string" table:style-name="ce3">
            <text:p>7. Opérations</text:p>
          </table:table-cell>
          <table:table-cell office:value-type="string" table:style-name="ce9">
            <text:p><text:a xlink:href="file:///C:/Users/anais/Downloads/AN/1959/rejet/CONSTEXT000017664932_annot.xml">file:\\\P:\CRJ\RECHERCHE\PROJET_JADE\JADE_COMMUN\Annotation\Annotation_automatique_Maritaud\Technologie_light\Super-catégories-objets_0,8\AN\1959\rejet\CONSTEXT000017664932_annot.xml</text:a></text:p>
          </table:table-cell>
          <table:table-cell office:value-type="string" table:style-name="ce3">
            <text:p>4.Campagne</text:p>
          </table:table-cell>
          <table:table-cell office:value-type="string" table:style-name="ce3">
            <text:p><text:s/>4. Considérant que si les délégués des candidats Rosan Girard et Paul Valentino ont été expulsés de certains bureaux, il ne ressort pas du dossier que ces expulsions aient eu d'autres motifs que les incidents suscités par les personnes expulsées</text:p>
          </table:table-cell>
          <table:table-cell table:number-columns-repeated="16377"/>
        </table:table-row>
        <table:table-row table:style-name="ro1">
          <table:table-cell office:value-type="string" table:style-name="ce3">
            <text:p>Oui</text:p>
          </table:table-cell>
          <table:table-cell office:value-type="string" table:style-name="ce3">
            <text:p>considérants 1-3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59\rejet\CONSTEXT000017664934_annot.xml</text:p>
          </table:table-cell>
          <table:table-cell office:value-type="string" table:style-name="ce3">
            <text:p>4.Campagne</text:p>
          </table:table-cell>
          <table:table-cell office:value-type="string" table:style-name="ce3">
            <text:p><text:s/>4. Considérant, enfin, qu'il n'est pas contesté qu'un autre tract, diffusé la veille du deuxième tour de scrutin et même après la clôture de la campagne électorale, contenait l'indication que le sieur fiche, candidat de l'U.N.R. au premier tour de scrutin et qui n'avait pas renouvelé sa candidature pour le deuxième tour, recommandait aux personnes qui avaient voté pour lui de reporter leurs suffrages sur le sieur Lebas ; que si cette allégation était en contradiction avec les propres déclarations du sieur Helie, lequel avait fait connaître par voie d'affiche dès le 27 novembre 1958 qu'il se retirait purement et simplement de la compétition, il résulte de l'instruction que la diffusion de ce tract, dont l'origine n'a pas été établie, ne peut être regardée comme ayant exercé sur les opérations électorales une influence suffisante pour en modifier le résultat ; qu'en effet, une mise au point ayant été immédiatement publiée dans un numéro spécial d'un hebdomadaire local par les soins des requérants pour démentir l'allégation contenue dans le tract favorable au sieur Lebas, ce document n'a pu induire en erreur le corps électoral sur la véritable portée du retrait de candidature du sieur Helie</text:p>
          </table:table-cell>
          <table:table-cell table:number-columns-repeated="16377"/>
        </table:table-row>
        <table:table-row table:style-name="ro1">
          <table:table-cell office:value-type="string" table:style-name="ce4">
            <text:p>Non</text:p>
          </table:table-cell>
          <table:table-cell office:value-type="string" table:style-name="ce3">
            <text:p>considérants 3-9 ne sont pas annotés</text:p>
          </table:table-cell>
          <table:table-cell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1959\rejet\CONSTEXT000017664935_annot.xml</text:p>
          </table:table-cell>
          <table:table-cell office:value-type="string" table:style-name="ce3">
            <text:p>4.Campagne</text:p>
          </table:table-cell>
          <table:table-cell office:value-type="string" table:style-name="ce3">
            <text:p><text:s/>10. Considérant que le fait que la distribution des documents électoraux n'ait pu être assurée en temps utile dans un petit nombre de localités éloignées des centres, n'a pu exercer d'influence sur le déroulement des opérations ; qu'en admettant enfin que des fraudes auraient été commises concernant les votes recueillis dans certaines localités il n'apparaît pas qu'elles aient pu revêtir une ampleur suffisante pour modifier les résultats de la consultation, eu égard notamment à l'écart entre les nombres des suffrages recueillis par chacune des listes en présenc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59\rejet\CONSTEXT000017664936_annot.xml</text:p>
          </table:table-cell>
          <table:table-cell office:value-type="string" table:style-name="ce3">
            <text:p>4.Campagne</text:p>
          </table:table-cell>
          <table:table-cell office:value-type="string" table:style-name="ce3">
            <text:p><text:s/>1. Considérant que le sieur Lambert fait grief au sieur Lecourt, candidat proclamé élu, d'avoir fait publier dans le numéro des 1er et 15 novembre 1958 du périodique Alpes-Durance et dans le Journal Le Dauphiné libéré du 21 novembre 1958, une lettre à lui adressée par le Ministre en exercice des Travaux publics, des Transports et du Tourism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59\rejet\CONSTEXT000017664936_annot.xml</text:p>
          </table:table-cell>
          <table:table-cell office:value-type="string" table:style-name="ce3">
            <text:p>4.Campagne</text:p>
          </table:table-cell>
          <table:table-cell office:value-type="string" table:style-name="ce3">
            <text:p><text:s/>2. Considérant que, par cette lettre, le Ministre précité accusait réception de documents relatifs à la mise en valeur et au développement économique des Hautes-Alpes que lui avait adressés le sieur Lecourt, informait celui-ci que ces documents seraient étudiés par les services du Ministère et lui annonçait qu'il serait averti du résultat de cette étud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59\rejet\CONSTEXT000017664936_annot.xml</text:p>
          </table:table-cell>
          <table:table-cell office:value-type="string" table:style-name="ce3">
            <text:p>4.Campagne</text:p>
          </table:table-cell>
          <table:table-cell office:value-type="string" table:style-name="ce3">
            <text:p><text:s/>3. Considérant que cette lettre, envoyée au sieur Lecourt avant l'ouverture de la campagne électorale, et qui ne comporte aucune précision quant à la suite effective qui serait donnée à la démarche du sieur Lecourt, ne constitue pas, contrairement à ce que soutient le requérant 'une intervention officielle ' en faveur du candidat Lecourt ; que sa publication ne peut dès lors, être regardée comme une manoeuvre illicite de nature à fausser les conditions de la consultation électorale ;</text:p>
          </table:table-cell>
          <table:table-cell table:number-columns-repeated="16377"/>
        </table:table-row>
        <table:table-row table:style-name="ro1">
          <table:table-cell office:value-type="string" table:style-name="ce3">
            <text:p>Oui</text:p>
          </table:table-cell>
          <table:table-cell office:value-type="string" table:style-name="ce3">
            <text:p>considérants 2, 3, 5 et 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59\rejet\CONSTEXT000017664939_annot.xml</text:p>
          </table:table-cell>
          <table:table-cell office:value-type="string" table:style-name="ce3">
            <text:p>7.Opérations</text:p>
          </table:table-cell>
          <table:table-cell office:value-type="string" table:style-name="ce3">
            <text:p><text:s/>4. Considérant que, si des irrégularités ont été commises dans le bureau de vote n° 31, soit au cours du scrutin, soit au cours du dépouillement, comme l'allèguent les sieurs Schmitter, Claude et Arbogast, ces irrégularités, qui n'auraient affecté qu'un très petit nombre de bulletins, ne peuvent manifestement pas avoir modifié le résultat de l'élection dans l'ensemble de la circonscription</text:p>
          </table:table-cell>
          <table:table-cell table:number-columns-repeated="16377"/>
        </table:table-row>
        <table:table-row table:style-name="ro1">
          <table:table-cell office:value-type="string" table:style-name="ce3">
            <text:p>Oui</text:p>
          </table:table-cell>
          <table:table-cell office:value-type="string" table:style-name="ce3">
            <text:p>considérants 1, 2 et 3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59\rejet\CONSTEXT000017664948_annot.xml</text:p>
          </table:table-cell>
          <table:table-cell office:value-type="string" table:style-name="ce3">
            <text:p>7.Opérations</text:p>
          </table:table-cell>
          <table:table-cell office:value-type="string" table:style-name="ce3">
            <text:p><text:s/>4. Considérant que si les opérations électorales dans l'un des bureaux de vote de la commune de Suc-et-Sentenac ont été closes avant l'heure officielle, il n'est ni établi, ni même allégué que, par suite de cette irrégularité, des électeurs de ce bureau aient été empêchés de prendre part au vote ; que les antres irrégularités alléguées en ce qui concerne l'installation de certains bureaux de vote et les modalités de vote par correspondance ne sont assorties d'aucun commencement de preuve</text:p>
          </table:table-cell>
          <table:table-cell table:number-columns-repeated="16377"/>
        </table:table-row>
        <table:table-row table:style-name="ro1">
          <table:table-cell office:value-type="string" table:style-name="ce3">
            <text:p>Oui</text:p>
          </table:table-cell>
          <table:table-cell office:value-type="string" table:style-name="ce3">
            <text:p>considérants 1 et 3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59\rejet\CONSTEXT000017664954_annot.xml</text:p>
          </table:table-cell>
          <table:table-cell office:value-type="string" table:style-name="ce3">
            <text:p>4.Campagne</text:p>
          </table:table-cell>
          <table:table-cell office:value-type="string" table:style-name="ce3">
            <text:p><text:s/>2. Considérant que le requérant allègue, d'autre part, que des affiches et tracts contenant des indications inexactes ou injurieuses auraient été diffusées ou apposées à la veille du scrutin par le sieur Herbaut, candidat socialiste ; que lesdites affiches faisaient état, notamment, de ce que le 'Centre de la réforme républicaine' aurait, entre les deux tours du scrutin, retiré son investiture au sieur de Lipkowski</text:p>
          </table:table-cell>
          <table:table-cell table:number-columns-repeated="16377"/>
        </table:table-row>
        <table:table-row table:style-name="ro1">
          <table:table-cell office:value-type="string" table:style-name="ce3">
            <text:p>Oui</text:p>
          </table:table-cell>
          <table:table-cell office:value-type="string" table:style-name="ce3">
            <text:p>considérants 2, 3 , 4 et 5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59\rejet\CONSTEXT000017664955_annot.xml</text:p>
          </table:table-cell>
          <table:table-cell office:value-type="string" table:style-name="ce3">
            <text:p>4.Campagne</text:p>
          </table:table-cell>
          <table:table-cell office:value-type="string" table:style-name="ce3">
            <text:p><text:s/>6. Considérant, d'autre part, que si un tract ronéotypé a été effectivement distribué la veille du deuxième tour de scrutin en faveur du sieur Laurent, candidat proclamé élu, il résulte de l'instruction qu'eu égard tant à son contenu qui n'était que la reproduction du texte de la dernière affiche régulière du sieur Laurent qu'à la diffusion restreinte dont il a fait l'objet, ce tract n'a pu altérer la sincérité de la consultation ;</text:p>
          </table:table-cell>
          <table:table-cell table:number-columns-repeated="16377"/>
        </table:table-row>
        <table:table-row table:style-name="ro1">
          <table:table-cell office:value-type="string" table:style-name="ce3">
            <text:p>Oui</text:p>
          </table:table-cell>
          <table:table-cell office:value-type="string" table:style-name="ce3">
            <text:p>considérants 2-9, 11 et 1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59\rejet\CONSTEXT000017665026_annot.xml</text:p>
          </table:table-cell>
          <table:table-cell office:value-type="string" table:style-name="ce3">
            <text:p>7.Opérations</text:p>
          </table:table-cell>
          <table:table-cell office:value-type="string" table:style-name="ce3">
            <text:p><text:s/>10. Considérant que l'omission de vérifier l'identité des électeurs n'est alléguée que pour deux bureaux de vote ; que des faits de double vote par un même électeur ne sont invoqués que dans quelques cas et dans des bureaux où la liste élue n'a pas obtenu la majorité ; qu'ainsi à supposer même que les irrégularités invoquées soient établies, il n'en résulte ni qu'elles soient la manifestation de fraudes systématiques ni même qu'elles aient et pour effet d'attribuer indûment des voix à la liste élue</text:p>
          </table:table-cell>
          <table:table-cell table:number-columns-repeated="16377"/>
        </table:table-row>
        <table:table-row table:style-name="ro1">
          <table:table-cell office:value-type="string" table:style-name="ce3">
            <text:p>Oui</text:p>
          </table:table-cell>
          <table:table-cell office:value-type="string" table:style-name="ce3">
            <text:p>considérants 2-9, 11 et 1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59\rejet\CONSTEXT000017665026_annot.xml</text:p>
          </table:table-cell>
          <table:table-cell office:value-type="string" table:style-name="ce3">
            <text:p>7.Opérations</text:p>
          </table:table-cell>
          <table:table-cell office:value-type="string" table:style-name="ce3">
            <text:p><text:s/>13. Considérant que s'il est allégué que, lors du dépouillement, les scrutateurs n'ont pas exactement observé les prescriptions de l'article 80, alinéa 2, du Code électoral, relativement à la présentation des bulletins et à la lecture, à haute voix des noms qui y étaient portés, ce fait, alors qu'il n'est pas allégué qu'il ait été procédé en méconnaissance de l'alinéa 1er du même article 80 et de l'article 15, alinéa 2, du décret n° 58-999 du 24 octobre 1958, à l'ouverture des urnes et au dénombrement des enveloppes. qui s'y trouvaient, n'est pas de nature à établir que des erreurs aient été commises dans le décompte des voix obtenues</text:p>
          </table:table-cell>
          <table:table-cell table:number-columns-repeated="16377"/>
        </table:table-row>
        <table:table-row table:style-name="ro1">
          <table:table-cell office:value-type="string" table:style-name="ce3">
            <text:p>Oui</text:p>
          </table:table-cell>
          <table:table-cell office:value-type="string" table:style-name="ce3">
            <text:p>considérants 3 et 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59\rejet\CONSTEXT000017665028_annot.xml</text:p>
          </table:table-cell>
          <table:table-cell office:value-type="string" table:style-name="ce3">
            <text:p>7.Opérations</text:p>
          </table:table-cell>
          <table:table-cell office:value-type="string" table:style-name="ce3">
            <text:p><text:s/>5. Considérant, enfin, que si, à l'ouverture du scrutin du 30 novembre 1958 dans le bureau de vote de Vassy, le maire a constaté que le paquet des bulletins de vote au nom du sieur Voivenel ne contenait qu'une centaine de tels bulletins le paquet a été complété moins d'une heure après, sans que le bureau de vote ait, à aucun moment, manqué de bulletins au nom du sieur Voivenel ; que, dès lors, ce dernier n'est pas fondé à soutenir qu'il n'y avait, à l'ouverture du scrutin, aucun bulletin à son nom à la disposition des électeur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59\rejet\CONSTEXT000017665031_annot.xml</text:p>
          </table:table-cell>
          <table:table-cell office:value-type="string" table:style-name="ce3">
            <text:p>4.Campagne</text:p>
          </table:table-cell>
          <table:table-cell office:value-type="string" table:style-name="ce3">
            <text:p><text:s/>1. Considérant que la reproduction, dans une circulaire électorale rédigée par le candidat Boscher, de la dédicace manuscrite que le Général de Gaulle avait apposée à son intention le 25 janvier 1955 sur un exemplaire de ses Mémoires, ne peut être regardée comme une manoeuvre illicite de nature à fausser le résultat du scrutin ;</text:p>
          </table:table-cell>
          <table:table-cell table:number-columns-repeated="16377"/>
        </table:table-row>
        <table:table-row table:style-name="ro1">
          <table:table-cell office:value-type="string" table:style-name="ce3">
            <text:p>Oui</text:p>
          </table:table-cell>
          <table:table-cell office:value-type="string" table:style-name="ce3">
            <text:p>considérant 3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59\rejet\CONSTEXT000017665035_annot.xml</text:p>
          </table:table-cell>
          <table:table-cell office:value-type="string" table:style-name="ce3">
            <text:p>4.Campagne</text:p>
          </table:table-cell>
          <table:table-cell office:value-type="string" table:style-name="ce3">
            <text:p><text:s/>2. Considérant qu'il ne résulte pas de l'instruction que la propagande faite en faveur du sieur Sourbet ait excédé les limites normales de la polémique électorale ni que les irrégularités d'affichage dénoncées aient eu une influence déterminante sur les résultats du scrutin ; qu'il n'est pas davantage établi que l'une des affiches du sieur Sourbet ait pu, par sa présentation typographique particulière, créer au profit de celui-ci une équivoque susceptible de tromper les électeurs</text:p>
          </table:table-cell>
          <table:table-cell table:number-columns-repeated="16377"/>
        </table:table-row>
        <table:table-row table:style-name="ro1">
          <table:table-cell office:value-type="string" table:style-name="ce4">
            <text:p>Non</text:p>
          </table:table-cell>
          <table:table-cell office:value-type="string" table:style-name="ce3">
            <text:p>considérants 2 et 3 ne sont pas annotés</text:p>
          </table:table-cell>
          <table:table-cell office:value-type="string" table:style-name="ce3">
            <text:p>Problème de découpage, deux griefs différents</text:p>
          </table:table-cell>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59\rejet\CONSTEXT000017665040_annot.xml</text:p>
          </table:table-cell>
          <table:table-cell office:value-type="string" table:style-name="ce3">
            <text:p>4.Campagne</text:p>
          </table:table-cell>
          <table:table-cell office:value-type="string" table:style-name="ce3">
            <text:p><text:s/>1. Considérant que l'instruction à laquelle il a été procédé n'a pas révélé que le sieur Messaoudi Kaddour, proclamé élu, ne satisferait pas aux conditions posées par les articles 5, 6, 7 et 54 du Code électoral ; Sur le grief tiré de la distribution irrégulière aux électeurs avant le scrutin d'enveloppes contenant des bulletins de la liste élue</text:p>
          </table:table-cell>
          <table:table-cell table:number-columns-repeated="16377"/>
        </table:table-row>
        <table:table-row table:style-name="ro1">
          <table:table-cell office:value-type="string" table:style-name="ce3">
            <text:p>Oui</text:p>
          </table:table-cell>
          <table:table-cell office:value-type="string" table:style-name="ce3">
            <text:p>considérants 3, 4 et 5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59\rejet\CONSTEXT000017665065_annot.xml</text:p>
          </table:table-cell>
          <table:table-cell office:value-type="string" table:style-name="ce3">
            <text:p>7.Opérations</text:p>
          </table:table-cell>
          <table:table-cell office:value-type="string" table:style-name="ce3">
            <text:p><text:s/>6. Considérant que ni la présence momentanée d'électeurs dans la composition de certains bureaux réservés aux électrices, contrairement aux dispositions de l'article 7 du décret n° 58-999 du 24 octobre 1958, ni les diverses autres irrégularités invoquées, relatives à des faits isolés et concernant un petit nombre de bureaux de vote, ne pourraient, à les supposer établies, entacher de nullité l'ensemble des opérations électorales ; que les requérants ne prouvent nullement que la présence de quelques officiers lors des opérations de dépouillement, auxquelles il a été procédé dans les conditions prévues à l'article 14 de l'ordonnance du 16 octobre 1958, ait été de nature à entacher d'irrégularité lesdites opérations ; Qu'il résulte de tout ce qui précède qu'il n'y a pas lieu de prononcer l'annulation de l'élection contestée ;</text:p>
          </table:table-cell>
          <table:table-cell table:number-columns-repeated="16377"/>
        </table:table-row>
        <table:table-row table:style-name="ro1">
          <table:table-cell office:value-type="string" table:style-name="ce3">
            <text:p>Oui</text:p>
          </table:table-cell>
          <table:table-cell office:value-type="string" table:style-name="ce3">
            <text:p>considérants 2,3, 5, 7, 8, 9, 10, 11, 11, 12, 1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59\rejet\CONSTEXT000017665067_annot.xml</text:p>
          </table:table-cell>
          <table:table-cell office:value-type="string" table:style-name="ce3">
            <text:p>7.Opérations</text:p>
          </table:table-cell>
          <table:table-cell office:value-type="string" table:style-name="ce3">
            <text:p><text:s/>4. Considérant, d'autre part, que le sieur Valle soutient que de nombreux électeurs ont été transportés de leur domicile au bureau de vote par des véhicules militaires ; que si ce fait n'est pas contesté, il n'est pas de nature à lui seul, à entacher d'irrégularité les opérations électorales ; que le requérant n'apporte aucun commencement de preuve que des fraudes aient été commises à l'occasion de ces transports ; qu'il n'est de même pas établi que la présence à l'extérieur des bureaux de vote de militaires ou de membres des unités territoriales ait donné lieu à des irrégularités ou favorisé des manoeuvres</text:p>
          </table:table-cell>
          <table:table-cell table:number-columns-repeated="16377"/>
        </table:table-row>
        <table:table-row table:style-name="ro1">
          <table:table-cell office:value-type="string" table:style-name="ce3">
            <text:p>Oui</text:p>
          </table:table-cell>
          <table:table-cell office:value-type="string" table:style-name="ce3">
            <text:p>considérants 2,3, 5, 7, 8, 9, 10, 11, 11, 12, 1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59\rejet\CONSTEXT000017665067_annot.xml</text:p>
          </table:table-cell>
          <table:table-cell office:value-type="string" table:style-name="ce3">
            <text:p>7.Opérations</text:p>
          </table:table-cell>
          <table:table-cell office:value-type="string" table:style-name="ce3">
            <text:p><text:s/>6. Considérant qu'en vertu du décret n° 58-999 du 24 octobre 1958 les électrices doivent voter dans des bureaux particuliers exclusivement composés de femmes ; qu'il ressort des pièces du dossier que, dans les circonstances particulières des élections en Algérie, et en raison de l'impossibilité où s'est trouvée la commission de contrôle de réunir toujours un nombre suffisant d'électrices de statut civil local pour composer les bureaux de vote qui leur étaient réservés, il lui a été indispensable en certains cas, de faire appel à des électeurs du sexe masculin ; qu'une telle irrégularité ne peut, alors qu'il n'est pas établi que des fraudes en soient résultées, être regardée comme ayant eu une influence sur les résultats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1, 2, 3, 6, 7, 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59\rejet\CONSTEXT000017665069_annot.xml</text:p>
          </table:table-cell>
          <table:table-cell office:value-type="string" table:style-name="ce3">
            <text:p>7.Opérations</text:p>
          </table:table-cell>
          <table:table-cell office:value-type="string" table:style-name="ce3">
            <text:p><text:s/>5. Considérant, d'autre part, que les requérants soutiennent qu'un certain nombre d'électeurs ont été transportés de leur domicile au bureau de vote dans des véhicules militaires que, si ce fait n'est pas contesté, il n'est pas de nature à entacher d'irrégularité les opérations électorales ; que les requérants n'apportent aucun commencement de preuve que des fraudes aient été commises à l'occasion de ces transports ; qu'il n'est, de même, pas établi que la présence, à l'extérieur des bureaux de vote, de militaires ou de membres des unités territoriales, aient donné lieu à des irrégularités ou favorisé des manoeuvres</text:p>
          </table:table-cell>
          <table:table-cell table:number-columns-repeated="16377"/>
        </table:table-row>
        <table:table-row table:style-name="ro1">
          <table:table-cell office:value-type="string" table:style-name="ce3">
            <text:p>Oui</text:p>
          </table:table-cell>
          <table:table-cell office:value-type="string" table:style-name="ce3">
            <text:p>considérants 3-11, 14, et 15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59\rejet\CONSTEXT000017665074_annot.xml</text:p>
          </table:table-cell>
          <table:table-cell office:value-type="string" table:style-name="ce3">
            <text:p>7.Opérations</text:p>
          </table:table-cell>
          <table:table-cell office:value-type="string" table:style-name="ce3">
            <text:p><text:s/>13. Considérant que le refus opposé par les présidents de trois bureaux de vote d'autoriser l'accès des délégués du requérant dans lesdits bureaux de vote, était motivé par le fait que la liste de ces délégués ne leur avait pas été, comme l'exige le décret du 12 mai 1951, notifiée au moins vingt-quatre heures avant l'ouverture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 3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59\rejet\CONSTEXT000017665130_annot.xml</text:p>
          </table:table-cell>
          <table:table-cell office:value-type="string" table:style-name="ce3">
            <text:p>4.Campagne</text:p>
          </table:table-cell>
          <table:table-cell office:value-type="string" table:style-name="ce3">
            <text:p><text:s/>4. Considérant qu'il n'est pas établi que la candidature du candidat proclamé élu aurait, parle fait des autorités locales, pris un caractère officiel, ni que les autres candidats se seraient vu refuser pour mener leur campagne électorale les moyens de transport compatibles avec les possibilités locales</text:p>
          </table:table-cell>
          <table:table-cell table:number-columns-repeated="16377"/>
        </table:table-row>
        <table:table-row table:style-name="ro1">
          <table:table-cell office:value-type="string" table:style-name="ce3">
            <text:p>Oui</text:p>
          </table:table-cell>
          <table:table-cell office:value-type="string" table:style-name="ce3">
            <text:p>considérants 1, 2, 4, 5, 6, 8-1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59\rejet\CONSTEXT000017665136_annot.xml</text:p>
          </table:table-cell>
          <table:table-cell office:value-type="string" table:style-name="ce3">
            <text:p>4.Campagne</text:p>
          </table:table-cell>
          <table:table-cell office:value-type="string" table:style-name="ce3">
            <text:p><text:s/>3. Considérant qu'il n'est pas établi, dans ces conditions, que les diverses irrégularités aient nui particulièrement à la seule candidature du sieur Lafay ; Sur le grief tiré d'une manoeuvre dirigée contre le requérant par le sieur Breton</text:p>
          </table:table-cell>
          <table:table-cell table:number-columns-repeated="16377"/>
        </table:table-row>
        <table:table-row table:style-name="ro1">
          <table:table-cell office:value-type="string" table:style-name="ce3">
            <text:p>Oui</text:p>
          </table:table-cell>
          <table:table-cell office:value-type="string" table:style-name="ce3">
            <text:p>considérants 1, 2, 4, 5, 6, 8-1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59\rejet\CONSTEXT000017665136_annot.xml</text:p>
          </table:table-cell>
          <table:table-cell office:value-type="string" table:style-name="ce3">
            <text:p>4.Campagne</text:p>
          </table:table-cell>
          <table:table-cell office:value-type="string" table:style-name="ce3">
            <text:p><text:s/>7. Considérant que s'il résulte de l'instruction que certaines des inscriptions dont fait état le requérant sont injurieuses, elles ne revêtent pas cependant le caractère d'imputations diffamatoires ; que, si l'un des tracts dont il se plaint peut être regardé comme contenant de telles imputations, il n'est pas établi que ce tract ait reçu une large diffusion ni par suite, que son envoi à certains électeurs ait exercé sur les opérations électorales une influence suffisante pour cri modifier le résultat</text:p>
          </table:table-cell>
          <table:table-cell table:number-columns-repeated="16377"/>
        </table:table-row>
        <table:table-row table:style-name="ro1">
          <table:table-cell office:value-type="string" table:style-name="ce3">
            <text:p>Oui</text:p>
          </table:table-cell>
          <table:table-cell office:value-type="string" table:style-name="ce3">
            <text:p>considérants 1, 3, 4, 5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59\rejet\CONSTEXT000017665138_annot.xml</text:p>
          </table:table-cell>
          <table:table-cell office:value-type="string" table:style-name="ce3">
            <text:p>4.Campagne</text:p>
          </table:table-cell>
          <table:table-cell office:value-type="string" table:style-name="ce3">
            <text:p><text:s/>2. Considérant que le requérant n'apporte pas la preuve que le sieur Ehm ait tenu des propos diffamatoires à l'égard de candidats du M.R.P. se présentant dans différentes circonscriptions du Bas-Rhin et qu'il ne précise d'ailleurs même pas la teneur de ces propos qu'il n'établit pas que le sieur Ehm soit responsable d'incidents survenus à l'occasion de diverses réunions électorales</text:p>
          </table:table-cell>
          <table:table-cell table:number-columns-repeated="16377"/>
        </table:table-row>
        <table:table-row table:style-name="ro1">
          <table:table-cell office:value-type="string" table:style-name="ce3">
            <text:p>Oui</text:p>
          </table:table-cell>
          <table:table-cell office:value-type="string" table:style-name="ce3">
            <text:p>considérant 3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59\rejet\CONSTEXT000017665139_annot.xml</text:p>
          </table:table-cell>
          <table:table-cell office:value-type="string" table:style-name="ce3">
            <text:p>4.Campagne</text:p>
          </table:table-cell>
          <table:table-cell office:value-type="string" table:style-name="ce3">
            <text:p><text:s/>2. Considérant, d'une part, que la propagande irrégulière du Parti communiste français par tracts et affiches visait tant la candidature du sieur Grousseaud que celle du sieur Fanton</text:p>
          </table:table-cell>
          <table:table-cell table:number-columns-repeated="16377"/>
        </table:table-row>
        <table:table-row table:style-name="ro1">
          <table:table-cell office:value-type="string" table:style-name="ce3">
            <text:p>Oui</text:p>
          </table:table-cell>
          <table:table-cell office:value-type="string" table:style-name="ce3">
            <text:p>considérants 3, 4, 5, 6, 9 et 10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2\rejet\CONSTEXT000017665194_annot.xml</text:p>
          </table:table-cell>
          <table:table-cell office:value-type="string" table:style-name="ce3">
            <text:p>7.Opérations</text:p>
          </table:table-cell>
          <table:table-cell office:value-type="string" table:style-name="ce3">
            <text:p><text:s/>8. Considérant que, si le requérant soutient que dans les bureaux de vote de Sigave et d'Alo le scrutin aurait été clos à 16 h 30 au lieu de 18 heures, ce fait, qui n'est d'ailleurs pas confirmé par les indications des procès-verbaux des opérations électorales concernant ces deux bureaux, n'aurait pu, en tout état de cause, modifier le résultat de l'élection dès lors que, d'une part, le sieur Loste a obtenu l 895 voix contre l 385 voix en faveur du sieur Brial et 11 voix en faveur du sieur Soane Tiki et que, d'autre part, 47 électeurs seulement n'ont pas pris part au vote dans les deux bureaux dont s'agit</text:p>
          </table:table-cell>
          <table:table-cell table:number-columns-repeated="16377"/>
        </table:table-row>
        <table:table-row table:style-name="ro1">
          <table:table-cell office:value-type="string" table:style-name="ce3">
            <text:p>Oui</text:p>
          </table:table-cell>
          <table:table-cell office:value-type="string" table:style-name="ce3">
            <text:p>considérants 3, 4, 5, 6, 9 et 10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2\rejet\CONSTEXT000017665194_annot.xml</text:p>
          </table:table-cell>
          <table:table-cell office:value-type="string" table:style-name="ce3">
            <text:p>4.Campagne</text:p>
          </table:table-cell>
          <table:table-cell office:value-type="string" table:style-name="ce3">
            <text:p><text:s/>11. Considérant enfin qu'à supposer que le sieur Loste ait fait distribuer des menus présents à la population selon une coutume locale dont le maintien est regrettable au cours d'une campagne électorale, il n'est pas établi que cette circonstance ait exercé une influence sur le résultat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 1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148_annot.xml</text:p>
          </table:table-cell>
          <table:table-cell office:value-type="string" table:style-name="ce3">
            <text:p>7.Opérations</text:p>
          </table:table-cell>
          <table:table-cell office:value-type="string" table:style-name="ce3">
            <text:p><text:s/>2. Considérant qu'il ne ressort pas des pièces du dossier, et notamment des procès-verbaux des opérations électorales contestées, qu'au second tour des bulletins de vote portant le nom du sieur Malgouyres auraient été annulés par plusieurs bureaux de vote, et notamment par le 6° bureau, comme le soutient le requérant, au motif qu'il s'agissait de bulletins de vote imprimés pour le premier tour ;</text:p>
          </table:table-cell>
          <table:table-cell table:number-columns-repeated="16377"/>
        </table:table-row>
        <table:table-row table:style-name="ro1">
          <table:table-cell office:value-type="string" table:style-name="ce3">
            <text:p>Oui</text:p>
          </table:table-cell>
          <table:table-cell office:value-type="string" table:style-name="ce3">
            <text:p>considérants 3 et 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149_annot.xml</text:p>
          </table:table-cell>
          <table:table-cell office:value-type="string" table:style-name="ce3">
            <text:p>7.Opérations</text:p>
          </table:table-cell>
          <table:table-cell office:value-type="string" table:style-name="ce3">
            <text:p><text:s/>2. Considérant, d'une part, que les allégations du requérant selon lesquelles des bureaux de vote auraient été irrégulièrement constitués et des procès-verbaux faussement établis lors du premier tour de scrutin ne sont assorties d'aucune précision ni d'aucun commencement de preuve</text:p>
          </table:table-cell>
          <table:table-cell table:number-columns-repeated="16377"/>
        </table:table-row>
        <table:table-row table:style-name="ro1">
          <table:table-cell office:value-type="string" table:style-name="ce3">
            <text:p>Oui</text:p>
          </table:table-cell>
          <table:table-cell office:value-type="string" table:style-name="ce3">
            <text:p>considérants 3 et 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149_annot.xml</text:p>
          </table:table-cell>
          <table:table-cell office:value-type="string" table:style-name="ce3">
            <text:p>4.Campagne</text:p>
          </table:table-cell>
          <table:table-cell office:value-type="string" table:style-name="ce3">
            <text:p><text:s/>5. Considérant, d'une part, que, si un journal local a publié, le 23 novembre, une information suivant laquelle le suppléant du sieur Valentino aurait cessé de soutenir ce dernier, ladite information, dont l'inexactitude n'est pas alléguée, n'a pas constitué une manoeuvre</text:p>
          </table:table-cell>
          <table:table-cell table:number-columns-repeated="16377"/>
        </table:table-row>
        <table:table-row table:style-name="ro1">
          <table:table-cell office:value-type="string" table:style-name="ce3">
            <text:p>Oui</text:p>
          </table:table-cell>
          <table:table-cell office:value-type="string" table:style-name="ce3">
            <text:p>considérants 1 et 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153_annot.xml</text:p>
          </table:table-cell>
          <table:table-cell office:value-type="string" table:style-name="ce3">
            <text:p>7.Opérations</text:p>
          </table:table-cell>
          <table:table-cell office:value-type="string" table:style-name="ce3">
            <text:p><text:s/>3. Considérant que s'il n'est pas contesté qu'il a été procédé, dans l'ensemble des bureaux de vote de la circonscription, au dépouillement des résultats des conditions non conformes à celles prescrites par l'article 80 du Code électoral, il n'est même pas allégué que les irrégularités ainsi commises aient pour effet de faciliter des fraudes ou des erreurs de calcul, ni, par suite, qu'elles soient de nature à entacher la régularité de l'élection contestée</text:p>
          </table:table-cell>
          <table:table-cell table:number-columns-repeated="16377"/>
        </table:table-row>
        <table:table-row table:style-name="ro1">
          <table:table-cell office:value-type="string" table:style-name="ce3">
            <text:p>Oui</text:p>
          </table:table-cell>
          <table:table-cell office:value-type="string" table:style-name="ce3">
            <text:p>considérants 1 et 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153_annot.xml</text:p>
          </table:table-cell>
          <table:table-cell office:value-type="string" table:style-name="ce3">
            <text:p>7.Opérations</text:p>
          </table:table-cell>
          <table:table-cell office:value-type="string" table:style-name="ce3">
            <text:p><text:s/>4. Considérant enfin que le requérant n'apporte aucun commencement de preuve à l'appui de son allégation selon laquelle des votes auraient été émis au ni de personnes absentes ou décédées ;</text:p>
          </table:table-cell>
          <table:table-cell table:number-columns-repeated="16377"/>
        </table:table-row>
        <table:table-row table:style-name="ro1">
          <table:table-cell office:value-type="string" table:style-name="ce3">
            <text:p>Oui</text:p>
          </table:table-cell>
          <table:table-cell office:value-type="string" table:style-name="ce3">
            <text:p>considérants 1 et 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155_annot.xml</text:p>
          </table:table-cell>
          <table:table-cell office:value-type="string" table:style-name="ce3">
            <text:p>7.Opérations</text:p>
          </table:table-cell>
          <table:table-cell office:value-type="string" table:style-name="ce3">
            <text:p><text:s/>3. Considérant, d'autre part, que, si certains de ces procès-verbaux ne portaient pas de signature des scrutateurs, cette omission ne peut, dès lors qu'il n'est fait état d'aucune fraude dans les opérations de dépouillement et de recensement des suffrages dans les bureaux de vote dont il s'agit, être regardée comme ayant eu pour effet de vicier la régularité du scrutin ;</text:p>
          </table:table-cell>
          <table:table-cell table:number-columns-repeated="16377"/>
        </table:table-row>
        <table:table-row table:style-name="ro1">
          <table:table-cell office:value-type="string" table:style-name="ce4">
            <text:p>Non</text:p>
          </table:table-cell>
          <table:table-cell office:value-type="string" table:style-name="ce3">
            <text:p>considérant 1 n'est pas annoté</text:p>
          </table:table-cell>
          <table:table-cell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1963\rejet\CONSTEXT000017665162_annot.xml</text:p>
          </table:table-cell>
          <table:table-cell office:value-type="string" table:style-name="ce3">
            <text:p>4.Campagne</text:p>
          </table:table-cell>
          <table:table-cell office:value-type="string" table:style-name="ce3">
            <text:p><text:s/>2. Considérant, d'une part, que si, à la suite du retrait de sa candidature, le sieur Everaere a fait procéder à l'enlèvement des bulletins portant son nom qui se trouvaient placés dans les bureaux de vote, ce fait n'a pas constitué une manoeuvre, alors surtout que la position prise par l'auteur de cette opération avait été portée à la connaissance des électeurs par la voie de la presse, de la radiodiffusion et de la télévision</text:p>
          </table:table-cell>
          <table:table-cell table:number-columns-repeated="16377"/>
        </table:table-row>
        <table:table-row table:style-name="ro1">
          <table:table-cell office:value-type="string" table:style-name="ce3">
            <text:p>Oui</text:p>
          </table:table-cell>
          <table:table-cell office:value-type="string" table:style-name="ce3">
            <text:p>considérants 1-5 et 7-9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165_annot.xml</text:p>
          </table:table-cell>
          <table:table-cell office:value-type="string" table:style-name="ce3">
            <text:p>4.Campagne</text:p>
          </table:table-cell>
          <table:table-cell office:value-type="string" table:style-name="ce3">
            <text:p><text:s/>6. Considérant, enfin, que le requérant allègue à l'encontre du sieur Poirier diverses autres irrégularités, à savoir la lacération de plusieurs de ses affiches et un affichage en dehors des emplacements réglementaires, mais qu'il n'apporte aucune précision de nature à établir la portée des griefs ainsi invoqués ; Sur les griefs tirés de la diffusion irrégulière de circulaires par le sieur Poirier</text:p>
          </table:table-cell>
          <table:table-cell table:number-columns-repeated="16377"/>
        </table:table-row>
        <table:table-row table:style-name="ro1">
          <table:table-cell office:value-type="string" table:style-name="ce3">
            <text:p>Oui</text:p>
          </table:table-cell>
          <table:table-cell office:value-type="string" table:style-name="ce3">
            <text:p>considérants 1-5 et 7-9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165_annot.xml</text:p>
          </table:table-cell>
          <table:table-cell office:value-type="string" table:style-name="ce3">
            <text:p>4.Campagne</text:p>
          </table:table-cell>
          <table:table-cell office:value-type="string" table:style-name="ce3">
            <text:p><text:s/>10. Considérant qu'au contraire une circulaire revêtant la forme d'une lettre ouverte à un candidat et diffusée dans les quarante-huit heures précédant le premier tour de scrutin n'a pu être l'objet d'aucune réponse de la part du requérant ; mais que ce document, aussi critiquable qu'il soit, n'a pas apporté d'élément nouveau dans la campagne électorale et n'a pu, compte tenu des circonstances de l'affaire, modifier suffisamment le résultat du premier tour de scrutin pour que celui du second tour s'en trouve faussé ;</text:p>
          </table:table-cell>
          <table:table-cell table:number-columns-repeated="16377"/>
        </table:table-row>
        <table:table-row table:style-name="ro1">
          <table:table-cell office:value-type="string" table:style-name="ce3">
            <text:p>Oui</text:p>
          </table:table-cell>
          <table:table-cell office:value-type="string" table:style-name="ce3">
            <text:p>considérants 1-4, 7-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167_annot.xml</text:p>
          </table:table-cell>
          <table:table-cell office:value-type="string" table:style-name="ce3">
            <text:p>7.Opérations</text:p>
          </table:table-cell>
          <table:table-cell office:value-type="string" table:style-name="ce3">
            <text:p><text:s/>6. Considérant, d'autre part, qu'il ressort des pièces du dossier que la circonstance que deux enveloppes de vote par correspondance ne sont pas parvenues au bureau de vote de la commune de Froideconche avant la clôture du second tour de scrutin, résulte d'une impossibilité matérielle et non d'une négligence de l'Administration</text:p>
          </table:table-cell>
          <table:table-cell table:number-columns-repeated="16377"/>
        </table:table-row>
        <table:table-row table:style-name="ro1">
          <table:table-cell office:value-type="string" table:style-name="ce3">
            <text:p>Oui</text:p>
          </table:table-cell>
          <table:table-cell office:value-type="string" table:style-name="ce3">
            <text:p>considérants 1-4, 7-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167_annot.xml</text:p>
          </table:table-cell>
          <table:table-cell office:value-type="string" table:style-name="ce3">
            <text:p>7.Opérations</text:p>
          </table:table-cell>
          <table:table-cell office:value-type="string" table:style-name="ce3">
            <text:p><text:s/>12. Considérant que, d'une part, .certains des griefs invoqués manquent en fait ; que, d'autre part, les irrégularités constatées, dont il n'est pas établi qu'elles aient constitué des manoeuvres frauduleuses, ne sont pas de nature à faire obstacle au contrôle de la sincérité et de la régularité du scrutin ; que, d'ailleurs, une rectification éventuelle des résultats, bureau par bureau, ne modifierait pas l'écart des voix en faveur du sieur Maroselli</text:p>
          </table:table-cell>
          <table:table-cell table:number-columns-repeated="16377"/>
        </table:table-row>
        <table:table-row table:style-name="ro1">
          <table:table-cell office:value-type="string" table:style-name="ce3">
            <text:p>Oui</text:p>
          </table:table-cell>
          <table:table-cell office:value-type="string" table:style-name="ce3">
            <text:p>considérants 1 et 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170_annot.xml</text:p>
          </table:table-cell>
          <table:table-cell office:value-type="string" table:style-name="ce3">
            <text:p>4.Campagne</text:p>
          </table:table-cell>
          <table:table-cell office:value-type="string" table:style-name="ce3">
            <text:p><text:s/>3. Considérant enfin que, contrairement à ce qu'allègue le requérant, la présentation des affiches du sieur Dubuis n'était pas de nature à créer une équivoque ;</text:p>
          </table:table-cell>
          <table:table-cell table:number-columns-repeated="16377"/>
        </table:table-row>
        <table:table-row table:style-name="ro1">
          <table:table-cell office:value-type="string" table:style-name="ce3">
            <text:p>Non</text:p>
          </table:table-cell>
          <table:table-cell office:value-type="string" table:style-name="ce3">
            <text:p>considérants 1 et 4 ne sont pas anootés</text:p>
          </table:table-cell>
          <table:table-cell table:style-name="ce3"/>
          <table:table-cell office:value-type="string" table:style-name="ce3">
            <text:p>5. Campagne</text:p>
          </table:table-cell>
          <table:table-cell office:value-type="string" table:style-name="ce3">
            <text:p>file:\\\P:\CRJ\RECHERCHE\PROJET_JADE\JADE_COMMUN\Annotation\Annotation_automatique_Maritaud\Technologie_light\Super-catégories-objets_0,8\AN\1963\rejet\CONSTEXT000017665171_annot.xml</text:p>
          </table:table-cell>
          <table:table-cell office:value-type="string" table:style-name="ce3">
            <text:p>4.Campagne</text:p>
          </table:table-cell>
          <table:table-cell office:value-type="string" table:style-name="ce3">
            <text:p><text:s/>2. Considérant, d'autre part, que, en la tenant pour établie, l'altercation qui serait survenue sur la voie publique et dont fait état la requérante n'a pu exercer une influence sur la régularité de l'élection</text:p>
          </table:table-cell>
          <table:table-cell table:number-columns-repeated="16377"/>
        </table:table-row>
        <table:table-row table:style-name="ro1">
          <table:table-cell office:value-type="string" table:style-name="ce3">
            <text:p>Oui</text:p>
          </table:table-cell>
          <table:table-cell office:value-type="string" table:style-name="ce3">
            <text:p>considérants 1 et 4 ne sont pas anootés</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171_annot.xml</text:p>
          </table:table-cell>
          <table:table-cell office:value-type="string" table:style-name="ce3">
            <text:p>4.Campagne</text:p>
          </table:table-cell>
          <table:table-cell office:value-type="string" table:style-name="ce3">
            <text:p><text:s/>3. Considérant, enfin, que, si le sieur Waldeck L'Huillier a, entre les deux tours de scrutin, adressé une lettre ronéotypée à une catégorie d'électeurs pour les inviter à lui apporter leurs suffrages, il n'apparaît pas que cette irrégularité ait eu, dans les circonstances de l'affaire, une influence suffisante sur le scrutin pour en modifier le résultat ; Sur le grief tiré de ce que des imputations diffamatoires auraient été portées contre la requérante</text:p>
          </table:table-cell>
          <table:table-cell table:number-columns-repeated="16377"/>
        </table:table-row>
        <table:table-row table:style-name="ro1">
          <table:table-cell office:value-type="string" table:style-name="ce3">
            <text:p>Oui</text:p>
          </table:table-cell>
          <table:table-cell office:value-type="string" table:style-name="ce3">
            <text:p>considérants 1-3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172_annot.xml</text:p>
          </table:table-cell>
          <table:table-cell office:value-type="string" table:style-name="ce3">
            <text:p>7.Opérations</text:p>
          </table:table-cell>
          <table:table-cell office:value-type="string" table:style-name="ce3">
            <text:p><text:s/>4. Considérant, d'autre part, que le requérant fait valoir qu'auraient été constatées, au premier tour de scrutin, l'absence de bulletins à son nom dans un bureau de vote et au second tour une tentative de dissimulation de ses bulletins dans un autre bureau, mais que ces faits, en l'absence d'observations les corroborant dans les procès-verbaux des bureaux de vote correspondants, ne peuvent être tenus pour établis</text:p>
          </table:table-cell>
          <table:table-cell table:number-columns-repeated="16377"/>
        </table:table-row>
        <table:table-row table:style-name="ro1">
          <table:table-cell office:value-type="string" table:style-name="ce3">
            <text:p>Oui</text:p>
          </table:table-cell>
          <table:table-cell office:value-type="string" table:style-name="ce3">
            <text:p>considérants 1-3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172_annot.xml</text:p>
          </table:table-cell>
          <table:table-cell office:value-type="string" table:style-name="ce3">
            <text:p>7.Opérations</text:p>
          </table:table-cell>
          <table:table-cell office:value-type="string" table:style-name="ce3">
            <text:p><text:s/>5. Considérant, enfin, que, si le requérant soutient que dans certains bureaux de vote les mandataires du candidat élu ont participé à l'organisation du scrutin et au dépouillement des bulletins aux lieu et place des membres du bureau et s'il produit, à l'appui de ces allégations, des attestations de ses propres mandataires, il n'établit ni n'allègue même pas que dans ces circonstances, qui n'ont d'ailleurs pas été consignées par lesdits mandataires dans les procès-verbaux des bureaux de vote dont il s'agit, aient eu pour résultat de favoriser des fraudes</text:p>
          </table:table-cell>
          <table:table-cell table:number-columns-repeated="16377"/>
        </table:table-row>
        <table:table-row table:style-name="ro1">
          <table:table-cell office:value-type="string" table:style-name="ce4">
            <text:p>Non</text:p>
          </table:table-cell>
          <table:table-cell office:value-type="string" table:style-name="ce3">
            <text:p>considérants 1, 2 et 3 ne sont pas annotés</text:p>
          </table:table-cell>
          <table:table-cell office:value-type="string" table:style-name="ce3">
            <text:p>ne devrait pas être annoté (Synthèse des griefs)</text:p>
          </table:table-cell>
          <table:table-cell table:style-name="ce3"/>
          <table:table-cell office:value-type="string" table:style-name="ce3">
            <text:p>file:\\\P:\CRJ\RECHERCHE\PROJET_JADE\JADE_COMMUN\Annotation\Annotation_automatique_Maritaud\Technologie_light\Super-catégories-objets_0,8\AN\1963\rejet\CONSTEXT000017665176_annot.xml</text:p>
          </table:table-cell>
          <table:table-cell office:value-type="string" table:style-name="ce3">
            <text:p>4.Campagne</text:p>
          </table:table-cell>
          <table:table-cell office:value-type="string" table:style-name="ce3">
            <text:p><text:s/>4. Considérant toutefois que ces diverses irrégularités, si regrettables qu'elles soient, n'ont pu, eu égard aux circonstances du scrutin, changer le sens de consultation électorale</text:p>
          </table:table-cell>
          <table:table-cell table:number-columns-repeated="16377"/>
        </table:table-row>
        <table:table-row table:style-name="ro1">
          <table:table-cell office:value-type="string" table:style-name="ce3">
            <text:p>Oui</text:p>
          </table:table-cell>
          <table:table-cell office:value-type="string" table:style-name="ce3">
            <text:p>considérants 5 et 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216_annot.xml</text:p>
          </table:table-cell>
          <table:table-cell office:value-type="string" table:style-name="ce3">
            <text:p>4.Campagne</text:p>
          </table:table-cell>
          <table:table-cell office:value-type="string" table:style-name="ce3">
            <text:p><text:s/>3. Considérant, d'autre part, que, si des enveloppes ont été adressées aux électeurs sans les professions de foi du sieur Besse, il n'est pas établi que cette omission ait été volontaire et ait revêtu le caractère d'une manoeuvre ; Sur les griefs relatifs à la régularité des opérations électorales</text:p>
          </table:table-cell>
          <table:table-cell table:number-columns-repeated="16377"/>
        </table:table-row>
        <table:table-row table:style-name="ro1">
          <table:table-cell office:value-type="string" table:style-name="ce3">
            <text:p>Oui</text:p>
          </table:table-cell>
          <table:table-cell office:value-type="string" table:style-name="ce3">
            <text:p>considérants 5 et 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216_annot.xml</text:p>
          </table:table-cell>
          <table:table-cell office:value-type="string" table:style-name="ce3">
            <text:p>7.Opérations</text:p>
          </table:table-cell>
          <table:table-cell office:value-type="string" table:style-name="ce3">
            <text:p><text:s/>4. Considérant, d'une part, que les sieurs Besse et Rochenoir allèguent que les bureaux de vote auraient été composés à l'avance de façon homogène, que des électeurs auraient été admis à voter sans avoir eu à justifier de leur identité, que le décompte des bulletins aurait été effectué dans des conditions défectueuses, qu'enfin des votes auraient été émis au nom de personnes absentes ou décédées ; que les faits ainsi allégués, qui n'ont été l'objet d'aucune observation dans les procès-verbaux des bureaux de vote correspondants et qui, d'ailleurs, ne sont établis par aucune des pièces du dossier, ne peuvent être retenus</text:p>
          </table:table-cell>
          <table:table-cell table:number-columns-repeated="16377"/>
        </table:table-row>
        <table:table-row table:style-name="ro1">
          <table:table-cell office:value-type="string" table:style-name="ce3">
            <text:p>Oui</text:p>
          </table:table-cell>
          <table:table-cell office:value-type="string" table:style-name="ce3">
            <text:p>considérant 2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217_annot.xml</text:p>
          </table:table-cell>
          <table:table-cell office:value-type="string" table:style-name="ce3">
            <text:p>4.Campagne</text:p>
          </table:table-cell>
          <table:table-cell office:value-type="string" table:style-name="ce3">
            <text:p><text:s/>1. Considérant, d'une part, que, si une circulaire ronéotypée a été adressée dans les deux jours qui ont précédé le scrutin par les partisans du sieur Mehaignerie à diverses personnalités de la circonscription en cause et si une affiche reproduisant le texte de ladite circulaire a été apposée tardivement sur les panneaux du candidat élu, ces irrégularités ne sauraient être regardées, eu égard à l'important écart de voix qui séparait celui-ci du requérant, comme ayant exercé une influence déterminante sur le résultat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1-3 et 5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223_annot.xml</text:p>
          </table:table-cell>
          <table:table-cell office:value-type="string" table:style-name="ce3">
            <text:p>7.Opérations</text:p>
          </table:table-cell>
          <table:table-cell office:value-type="string" table:style-name="ce3">
            <text:p><text:s/>4. Considérant, en premier lieu, que, si le requérant allègue que des fraudes auraient été commises et que l'on aurait porté sur les listes d'émargement des personnes absentes, comme ayant voté, ces faits qui n'ont fait l'objet d'aucune observation dans les procès-verbaux des bureaux de vote correspondants qui ne sont d'ailleurs établis par aucune des pièces du dossier, ne peuvent être retenus</text:p>
          </table:table-cell>
          <table:table-cell table:number-columns-repeated="16377"/>
        </table:table-row>
        <table:table-row table:style-name="ro1">
          <table:table-cell office:value-type="string" table:style-name="ce3">
            <text:p>Non</text:p>
          </table:table-cell>
          <table:table-cell office:value-type="string" table:style-name="ce3">
            <text:p>considérants 4 et 5 ne sont pas annotés</text:p>
          </table:table-cell>
          <table:table-cell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1963\rejet\CONSTEXT000017665224_annot.xml</text:p>
          </table:table-cell>
          <table:table-cell office:value-type="string" table:style-name="ce3">
            <text:p>4.Campagne</text:p>
          </table:table-cell>
          <table:table-cell office:value-type="string" table:style-name="ce3">
            <text:p><text:s/>6. Considérant que, si certains procès-verbaux n'ont pas été signés par les délégués et assesseurs du requérant, il n'est pas établi que ces derniers aient été mis délibérément dans l'impossibilité de le faire</text:p>
          </table:table-cell>
          <table:table-cell table:number-columns-repeated="16377"/>
        </table:table-row>
        <table:table-row table:style-name="ro1">
          <table:table-cell office:value-type="string" table:style-name="ce3">
            <text:p>Non</text:p>
          </table:table-cell>
          <table:table-cell office:value-type="string" table:style-name="ce3">
            <text:p>considérants 2, 3 et 5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3\rejet\CONSTEXT000017665226_annot.xml</text:p>
          </table:table-cell>
          <table:table-cell office:value-type="string" table:style-name="ce3">
            <text:p>4.Campagne</text:p>
          </table:table-cell>
          <table:table-cell office:value-type="string" table:style-name="ce3">
            <text:p><text:s/>4. Considérant, d'une part, que, si le sieur Rousseau a entendu se retirer de la compétition, ce retrait, dont il n'est pas établi qu'il soit dû à une manoeuvre ne constitue pas une irrégularité ; que la déclaration, de candidature que le sieur Rousseau avait effectuée n'en demeurait pas moins valable ; que l'Administration ne pouvait donc légalement tenir compte de ce retrait et n'avait pas à le rendre public</text:p>
          </table:table-cell>
          <table:table-cell table:number-columns-repeated="16377"/>
        </table:table-row>
        <table:table-row table:style-name="ro1">
          <table:table-cell office:value-type="string" table:style-name="ce3">
            <text:p>Oui</text:p>
          </table:table-cell>
          <table:table-cell office:value-type="string" table:style-name="ce3">
            <text:p>considérant 1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227_annot.xml</text:p>
          </table:table-cell>
          <table:table-cell office:value-type="string" table:style-name="ce3">
            <text:p>4.Campagne</text:p>
          </table:table-cell>
          <table:table-cell office:value-type="string" table:style-name="ce3">
            <text:p><text:s/>2. Considérant qu'il n'est pas établi que la distribution gratuite de certaines denrées, faite selon une pratique en usage dans cette entreprise, ait été l'occasion de pressions sur les employés électeurs de nature à exercer une influence déterminante sur les conditions de la consultation</text:p>
          </table:table-cell>
          <table:table-cell table:number-columns-repeated="16377"/>
        </table:table-row>
        <table:table-row table:style-name="ro1">
          <table:table-cell office:value-type="string" table:style-name="ce3">
            <text:p>Oui</text:p>
          </table:table-cell>
          <table:table-cell office:value-type="string" table:style-name="ce3">
            <text:p>considérant 1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227_annot.xml</text:p>
          </table:table-cell>
          <table:table-cell office:value-type="string" table:style-name="ce3">
            <text:p>7.Opérations</text:p>
          </table:table-cell>
          <table:table-cell office:value-type="string" table:style-name="ce3">
            <text:p><text:s/>3. Considérant que l'erreur de recensement commise au 1er bureau d'Arcachon, qui n'a affecté qu'un nombre très limité de votes, n'a pas été de nature à modifier le résultat de l'élection</text:p>
          </table:table-cell>
          <table:table-cell table:number-columns-repeated="16377"/>
        </table:table-row>
        <table:table-row table:style-name="ro1">
          <table:table-cell office:value-type="string" table:style-name="ce3">
            <text:p>Oui</text:p>
          </table:table-cell>
          <table:table-cell office:value-type="string" table:style-name="ce3">
            <text:p>considérants 1, 3 et 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228_annot.xml</text:p>
          </table:table-cell>
          <table:table-cell office:value-type="string" table:style-name="ce3">
            <text:p>4.Campagne</text:p>
          </table:table-cell>
          <table:table-cell office:value-type="string" table:style-name="ce3">
            <text:p><text:s/>2. Considérant que l'apposition d'une affiche du sieur Fouet sur un panneau réservé au sieur Dubreuil ne s'est produite que sur un seul emplacement ; qu'elle ne peut, dans ces conditions, être regardée comme ayant eu sur le scrutin une influence suffisante pour en modifier le résultat</text:p>
          </table:table-cell>
          <table:table-cell table:number-columns-repeated="16377"/>
        </table:table-row>
        <table:table-row table:style-name="ro1">
          <table:table-cell office:value-type="string" table:style-name="ce3">
            <text:p>Oui</text:p>
          </table:table-cell>
          <table:table-cell office:value-type="string" table:style-name="ce3">
            <text:p>considérant 6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232_annot.xml</text:p>
          </table:table-cell>
          <table:table-cell office:value-type="string" table:style-name="ce3">
            <text:p>4.Campagne</text:p>
          </table:table-cell>
          <table:table-cell office:value-type="string" table:style-name="ce3">
            <text:p><text:s/>2. Considérant, d'autre part, que si le sieur Cornut-Gentille a fait diffuser, à titre de propagande, un film illustrant les réalisations récentes de la municipalité de Cannes, ce fait ne constitue pas, en lui-même, une irrégularité susceptible de porter atteinte à la sincérité du scrutin ; Sur les griefs tirés de manoeuvres commises dans la propagande électorale</text:p>
          </table:table-cell>
          <table:table-cell table:number-columns-repeated="16377"/>
        </table:table-row>
        <table:table-row table:style-name="ro1">
          <table:table-cell office:value-type="string" table:style-name="ce3">
            <text:p>Oui</text:p>
          </table:table-cell>
          <table:table-cell office:value-type="string" table:style-name="ce3">
            <text:p>considérant 6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232_annot.xml</text:p>
          </table:table-cell>
          <table:table-cell office:value-type="string" table:style-name="ce3">
            <text:p>4.Campagne</text:p>
          </table:table-cell>
          <table:table-cell office:value-type="string" table:style-name="ce3">
            <text:p><text:s/>3. Considérant, d'une part, que, si des articles et des communiqués, parus dans deux journaux de la presse locale, ont indiqué que la candidature, du sieur Bussoz n'avait pas reçu l'approbation du comité directeur U.N.R. de la circonscription, il n'est pas établi que cette information, qui a fait l'objet d'un rectificatif dans un troisième journal, ait été publiée de mauvaise foi et que, dans ces conditions, elle ait constitué une manoeuvre de nature à porter atteinte à la régularité de la consultation</text:p>
          </table:table-cell>
          <table:table-cell table:number-columns-repeated="16377"/>
        </table:table-row>
        <table:table-row table:style-name="ro1">
          <table:table-cell office:value-type="string" table:style-name="ce3">
            <text:p>Oui</text:p>
          </table:table-cell>
          <table:table-cell office:value-type="string" table:style-name="ce3">
            <text:p>considérant 6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232_annot.xml</text:p>
          </table:table-cell>
          <table:table-cell office:value-type="string" table:style-name="ce3">
            <text:p>4.Campagne</text:p>
          </table:table-cell>
          <table:table-cell office:value-type="string" table:style-name="ce3">
            <text:p><text:s/>4. Considérant, d'autre part, que, dans un tract largement diffusé par le sieur Cornut-Gentille à la veille du scrutin, a été reproduite, avec sa date, une lettre à lui adressée le 5 février 1960 par le chef de l'État ; que cette diffusion est présentée par le requérant comme une manoeuvre destinée à influencer le corps électoral ; que, toutefois, la notoriété de la position politique actuelle de ce candidat fait obstacle à ce que cette diffusion puisse être regardée comme ayant pu créer une confusion dans l'esprit des électeurs</text:p>
          </table:table-cell>
          <table:table-cell table:number-columns-repeated="16377"/>
        </table:table-row>
        <table:table-row table:style-name="ro1">
          <table:table-cell office:value-type="string" table:style-name="ce3">
            <text:p>Oui</text:p>
          </table:table-cell>
          <table:table-cell office:value-type="string" table:style-name="ce3">
            <text:p>considérant 6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232_annot.xml</text:p>
          </table:table-cell>
          <table:table-cell office:value-type="string" table:style-name="ce3">
            <text:p>4.Campagne</text:p>
          </table:table-cell>
          <table:table-cell office:value-type="string" table:style-name="ce3">
            <text:p><text:s/>5. Considérant enfin que, si le requérant allègue que l'imprimeur choisi par lui aurait intentionnellement omis de faire figurer sur les bulletins de voté libellés à son nom la mention de son affiliation politique, il est constant que cette mention a été portée sur la profession de foi du candidat, adressée avec le bulletin à tous les électeurs de sa circonscription ; qu'il n'est, d'ailleurs, pas établi que cette omission, qu'il appartenait au requérant défaire corriger lors de la délivrance du bon à tirer, ait été la conséquence d'une manoeuvre ; que le moyen ne saurait, dès lors, être accueilli ; Sur les griefs tirés de diverses manoeuvres et pression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63\rejet\CONSTEXT000017665235_annot.xml</text:p>
          </table:table-cell>
          <table:table-cell office:value-type="string" table:style-name="ce3">
            <text:p>7.Opérations</text:p>
          </table:table-cell>
          <table:table-cell office:value-type="string" table:style-name="ce3">
            <text:p><text:s/>2. Considérant, d'une part, que si les requérants allèguent que diverses irrégularités auraient été commises au cours du scrutin et lors du dépouillement, notamment dans les 226e, 242e et 247e bureaux de vote, ces faits n'ont été l'objet d'aucune observation dans les procès-verbaux et ne sont corroborés par aucune pièce du dossier qu'ils ne peuvent, dès lors, être considérés comme établis</text:p>
          </table:table-cell>
          <table:table-cell table:number-columns-repeated="16377"/>
        </table:table-row>
        <table:table-row table:style-name="ro1">
          <table:table-cell office:value-type="string" table:style-name="ce4">
            <text:p>Oui</text:p>
          </table:table-cell>
          <table:table-cell table:number-columns-repeated="2"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1963\rejet\CONSTEXT000017665235_annot.xml</text:p>
          </table:table-cell>
          <table:table-cell office:value-type="string" table:style-name="ce3">
            <text:p>7.Opérations</text:p>
          </table:table-cell>
          <table:table-cell office:value-type="string" table:style-name="ce3">
            <text:p><text:s/>3. Considérant, d'autre part, que l'allégation selon laquelle des manoeuvres d'intimidation auraient été pratiquées à l'égard de personnes âgées devant les bureaux de vote, n'est assortie d'aucun commencement de preuve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63\rejet\CONSTEXT000017665328_annot.xml</text:p>
          </table:table-cell>
          <table:table-cell office:value-type="string" table:style-name="ce3">
            <text:p>4.Campagne</text:p>
          </table:table-cell>
          <table:table-cell office:value-type="string" table:style-name="ce3">
            <text:p><text:s/>1. Considérant, d'une part, que, si le sieur Soury soutient que le candidat proclamé élu a fait apposer sur ses panneaux électoraux une affiche dont le libellé aurait pu conduire les électeurs à penser qu'il avait pris le sieur Marcilhacy, sénateur, comme remplaçant et à les induire ainsi en erreur sur la personnalité du remplaçant que le sieur Valentin avait choisi, aucun doute ne pouvait naître sur ce point dans l'esprit des électeurs, ladite affiche constituant simplement un appel du sieur Marcilhacy en faveur du candidat proclamé élu</text:p>
          </table:table-cell>
          <table:table-cell table:number-columns-repeated="16377"/>
        </table:table-row>
        <table:table-row table:style-name="ro1">
          <table:table-cell office:value-type="string" table:style-name="ce4">
            <text:p>Non</text:p>
          </table:table-cell>
          <table:table-cell office:value-type="string" table:style-name="ce3">
            <text:p>considérant 1 n'est pas annoté</text:p>
          </table:table-cell>
          <table:table-cell office:value-type="string" table:style-name="ce3">
            <text:p>ne devrait pas être annoté (synthèse des griefs)</text:p>
          </table:table-cell>
          <table:table-cell table:style-name="ce3"/>
          <table:table-cell office:value-type="string" table:style-name="ce3">
            <text:p>file:\\\P:\CRJ\RECHERCHE\PROJET_JADE\JADE_COMMUN\Annotation\Annotation_automatique_Maritaud\Technologie_light\Super-catégories-objets_0,8\AN\1963\rejet\CONSTEXT000017665329_annot.xml</text:p>
          </table:table-cell>
          <table:table-cell office:value-type="string" table:style-name="ce3">
            <text:p>4.Campagne</text:p>
          </table:table-cell>
          <table:table-cell office:value-type="string" table:style-name="ce3">
            <text:p><text:s/>3. Considérant que la circonstance qui fait l'objet du second grief ne saurait être regardée comme constituant une manoeuvre ayant pu vicier la sincérité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 1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330_annot.xml</text:p>
          </table:table-cell>
          <table:table-cell office:value-type="string" table:style-name="ce3">
            <text:p>4.Campagne</text:p>
          </table:table-cell>
          <table:table-cell office:value-type="string" table:style-name="ce3">
            <text:p><text:s/>2. Considérant, d'autre part, que, si le requérant apporte la preuve que certaines de ses affiches électorales ont été lacérées, il n'est pas établi que cette circonstance ait pu, en l'espèce, et alors que le sieur Barbet a été victime de semblables irrégularités, exercer une influence déterminante sur le résultat du scrutin</text:p>
          </table:table-cell>
          <table:table-cell table:number-columns-repeated="16377"/>
        </table:table-row>
        <table:table-row table:style-name="ro1">
          <table:table-cell office:value-type="string" table:style-name="ce4">
            <text:p>Non</text:p>
          </table:table-cell>
          <table:table-cell office:value-type="string" table:style-name="ce3">
            <text:p>considérant 1 n'est pas annoté</text:p>
          </table:table-cell>
          <table:table-cell office:value-type="string" table:style-name="ce3">
            <text:p>ne devrait pas être annoté (Synthèse des griefs)</text:p>
          </table:table-cell>
          <table:table-cell table:style-name="ce3"/>
          <table:table-cell office:value-type="string" table:style-name="ce3">
            <text:p>file:\\\P:\CRJ\RECHERCHE\PROJET_JADE\JADE_COMMUN\Annotation\Annotation_automatique_Maritaud\Technologie_light\Super-catégories-objets_0,8\AN\1963\rejet\CONSTEXT000017665330_annot.xml</text:p>
          </table:table-cell>
          <table:table-cell office:value-type="string" table:style-name="ce3">
            <text:p>4.Campagne</text:p>
          </table:table-cell>
          <table:table-cell office:value-type="string" table:style-name="ce3">
            <text:p><text:s/>3. Considérant enfin que le requérant n'apporte aucune justification à l'appui des autres faits de même nature qu'il invoque ; Sur les griefs tirés des mentions contenues dans un tract</text:p>
          </table:table-cell>
          <table:table-cell table:number-columns-repeated="16377"/>
        </table:table-row>
        <table:table-row table:style-name="ro1">
          <table:table-cell office:value-type="string" table:style-name="ce3">
            <text:p>Oui</text:p>
          </table:table-cell>
          <table:table-cell office:value-type="string" table:style-name="ce3">
            <text:p>considérant 1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330_annot.xml</text:p>
          </table:table-cell>
          <table:table-cell office:value-type="string" table:style-name="ce3">
            <text:p>4.Campagne</text:p>
          </table:table-cell>
          <table:table-cell office:value-type="string" table:style-name="ce3">
            <text:p><text:s/>4. Considérant que les mentions dont fait état le requérant ne présentent pas le caractère d'imputations diffamatoires ; qu'il n'est pas établi que ce tract ait reçu une large diffusion ; que, dès lors, il ne peut être regardé comme ayant exercé sur les opérations électorales une influence suffisante pour en modifier le résultat ; Sur les griefs relatifs à la composition des bureaux de vote ou au déroulement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 1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330_annot.xml</text:p>
          </table:table-cell>
          <table:table-cell office:value-type="string" table:style-name="ce3">
            <text:p>7.Opérations</text:p>
          </table:table-cell>
          <table:table-cell office:value-type="string" table:style-name="ce3">
            <text:p><text:s/>5. Considérant que, si le requérant allègue que certaines irrégularités auraient été commises dans la composition des bureaux ou lors du vote de personnes âgées, malades ou infirmes, ces faits, qui ne font l'objet d'aucune mention aux procès-verbaux des opérations électorales et ne sont corroborés par aucune des pièces du dossier, ne peuvent être regardés comme établis</text:p>
          </table:table-cell>
          <table:table-cell table:number-columns-repeated="16377"/>
        </table:table-row>
        <table:table-row table:style-name="ro1">
          <table:table-cell office:value-type="string" table:style-name="ce3">
            <text:p>Oui</text:p>
          </table:table-cell>
          <table:table-cell office:value-type="string" table:style-name="ce3">
            <text:p>considérants 1, 2, 5 et 7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333_annot.xml</text:p>
          </table:table-cell>
          <table:table-cell office:value-type="string" table:style-name="ce3">
            <text:p>7.Opérations</text:p>
          </table:table-cell>
          <table:table-cell office:value-type="string" table:style-name="ce3">
            <text:p><text:s/>3. Considérant que, si les requérants soutiennent que dans un bureau de vote de Sinnamary le nombre des enveloppes et bulletins trouvés dans l'urne aurait été supérieur de 150 au nombre des émargements, l'examen des pièces du dossier, et notamment du procès-verbal des opérations électorales qui se sont déroulées dans ce bureau, ne fait pas apparaître de différence entre les deux nombres sus-indiqués ; que, dès lors, le grief invoqué ne peut être retenu ; Sur les griefs tirés de ce que des votes auraient été irrégulièrement émis</text:p>
          </table:table-cell>
          <table:table-cell table:number-columns-repeated="16377"/>
        </table:table-row>
        <table:table-row table:style-name="ro1">
          <table:table-cell office:value-type="string" table:style-name="ce3">
            <text:p>Oui</text:p>
          </table:table-cell>
          <table:table-cell office:value-type="string" table:style-name="ce3">
            <text:p>considérants 1, 2, 5 et 7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333_annot.xml</text:p>
          </table:table-cell>
          <table:table-cell office:value-type="string" table:style-name="ce3">
            <text:p>7.Opérations</text:p>
          </table:table-cell>
          <table:table-cell office:value-type="string" table:style-name="ce3">
            <text:p><text:s/>4. Considérant que, si les requérants allèguent qu'un certain nombre de mineurs et d'étrangers auraient participé au scrutin dans les bureaux de vote de Cayenne et de Sinnamary, l'exactitude matérielle de ces faits n'est établie qu'en ce qui concerne un seul vote émis dans un bureau de Cayenne par un ressortissant britannique</text:p>
          </table:table-cell>
          <table:table-cell table:number-columns-repeated="16377"/>
        </table:table-row>
        <table:table-row table:style-name="ro1">
          <table:table-cell office:value-type="string" table:style-name="ce3">
            <text:p>Oui</text:p>
          </table:table-cell>
          <table:table-cell office:value-type="string" table:style-name="ce3">
            <text:p>considérants 1 et 3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336_annot.xml</text:p>
          </table:table-cell>
          <table:table-cell office:value-type="string" table:style-name="ce3">
            <text:p>4.Campagne</text:p>
          </table:table-cell>
          <table:table-cell office:value-type="string" table:style-name="ce3">
            <text:p><text:s/>2. Considérant, d'une part, qu'aucune disposition législative ou réglementaire ne faisait obstacle à l'apposition sur lesdits bulletins du symbole et de la phrase susmentionnés</text:p>
          </table:table-cell>
          <table:table-cell table:number-columns-repeated="16377"/>
        </table:table-row>
        <table:table-row table:style-name="ro1">
          <table:table-cell office:value-type="string" table:style-name="ce3">
            <text:p>Oui</text:p>
          </table:table-cell>
          <table:table-cell office:value-type="string" table:style-name="ce3">
            <text:p>considérants 1 et 3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3\rejet\CONSTEXT000017665336_annot.xml</text:p>
          </table:table-cell>
          <table:table-cell office:value-type="string" table:style-name="ce3">
            <text:p>4.Campagne</text:p>
          </table:table-cell>
          <table:table-cell office:value-type="string" table:style-name="ce3">
            <text:p><text:s/>4. Considérant enfin qu'en admettant que le sieur Carter ait entendu, en faisant figurer sur ses bulletins de vote les mots 'pour la Ve République', se référer à l'investiture que lui aurait accordée une association portant cette dénomination, la circonstance que ladite association n'aurait pas constitué un parti politique ne faisait pas, par elle-même, obstacle à ce que l'intéressé fît mention de cette investiture sur les bulletins de vote libellés à son nom ;</text:p>
          </table:table-cell>
          <table:table-cell table:number-columns-repeated="16377"/>
        </table:table-row>
        <table:table-row table:style-name="ro1">
          <table:table-cell office:value-type="string" table:style-name="ce3">
            <text:p>Oui</text:p>
          </table:table-cell>
          <table:table-cell office:value-type="string" table:style-name="ce3">
            <text:p>considérants 2 et 3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5\rejet\CONSTEXT000017665299_annot.xml</text:p>
          </table:table-cell>
          <table:table-cell office:value-type="string" table:style-name="ce3">
            <text:p>4.Campagne</text:p>
          </table:table-cell>
          <table:table-cell office:value-type="string" table:style-name="ce3">
            <text:p><text:s/>1. Considérant que la requérante se borne à soutenir qu'une des affiches apposées sur les emplacements réservés au candidat proclamé élu comprenait une combinaison des couleurs bleu, blanc et rouge</text:p>
          </table:table-cell>
          <table:table-cell table:number-columns-repeated="16377"/>
        </table:table-row>
        <table:table-row table:style-name="ro1">
          <table:table-cell office:value-type="string" table:style-name="ce3">
            <text:p>Oui</text:p>
          </table:table-cell>
          <table:table-cell office:value-type="string" table:style-name="ce3">
            <text:p>considérants 1-5, 7, 9, 11-15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262_annot.xml</text:p>
          </table:table-cell>
          <table:table-cell office:value-type="string" table:style-name="ce3">
            <text:p>7.Opérations</text:p>
          </table:table-cell>
          <table:table-cell office:value-type="string" table:style-name="ce3">
            <text:p><text:s/>6. Considérant que le requérant soutient que, dans de nombreux bureaux de vote, les assesseurs et délégués désignés par lui auraient été écartés, expulsés ou contraints sous la menace de quitter les bureaux de vote ou de signer les procès-verbaux ; qu'il résulte, au contraire, des pièces du dossier que, dans plusieurs des bureaux de vote cités par le requérant, ses assesseurs ou délégués ne se sont pas présentés ou ont, pendant le scrutin, quitté spontanément les bureaux de vote ; que si, dans un bureau, l'expulsion d'un délégué du requérant a été envisagée, sur réquisition régulière du président, cette mesure avait été motivée par des incidents suscités par ce délégué ; que, si le requérant soutient que le président du 18 bureau de vote de Saint-Denis aurait irrégulièrement refusé d'accepter en qualité d'assesseur la personne qu'il avait désignée, il résulte des pièces versées au dossier que cette personne n'étant pas inscrite sur la liste électorale de la commune, condition. expressément prévue par l'article R 44 du Code électoral, il n'avait pu lui être délivré le récépissé qui sert de titre à l'assesseur ; que, d'ailleurs, le délégué du requérant a assisté aux opérations électorales de ce bureau de vote et a contresigné le procès-verbal</text:p>
          </table:table-cell>
          <table:table-cell table:number-columns-repeated="16377"/>
        </table:table-row>
        <table:table-row table:style-name="ro1">
          <table:table-cell office:value-type="string" table:style-name="ce4">
            <text:p>Oui</text:p>
          </table:table-cell>
          <table:table-cell office:value-type="string" table:style-name="ce3">
            <text:p>considérants 1-5, 7, 9, 11-15 ne sont pas annotés</text:p>
          </table:table-cell>
          <table:table-cell table:style-name="ce3"/>
          <table:table-cell office:value-type="string" table:style-name="ce3">
            <text:p>3. Candidature</text:p>
          </table:table-cell>
          <table:table-cell office:value-type="string" table:style-name="ce9">
            <text:p><text:a xlink:href="file:///C:/Users/anais/Downloads/AN/1967/rejet/CONSTEXT000017665262_annot.xml">file:\\\P:\CRJ\RECHERCHE\PROJET_JADE\JADE_COMMUN\Annotation\Annotation_automatique_Maritaud\Technologie_light\Super-catégories-objets_0,8\AN\1967\rejet\CONSTEXT000017665262_annot.xml</text:a></text:p>
          </table:table-cell>
          <table:table-cell office:value-type="string" table:style-name="ce3">
            <text:p>4.Campagne</text:p>
          </table:table-cell>
          <table:table-cell office:value-type="string" table:style-name="ce3">
            <text:p><text:s/>8. Considérant que ce grief doit être apprécié par rapport aux dispositions de l'article 1er de l'ordonnance n° 59-224 du 4 février 1959, codifié partiellement à l'article L.0.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4">
            <text:p>Oui</text:p>
          </table:table-cell>
          <table:table-cell office:value-type="string" table:style-name="ce3">
            <text:p>considérants 1-5, 7, 9, 11-15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262_annot.xml</text:p>
          </table:table-cell>
          <table:table-cell office:value-type="string" table:style-name="ce3">
            <text:p>4.Campagne</text:p>
          </table:table-cell>
          <table:table-cell office:value-type="string" table:style-name="ce3">
            <text:p><text:s/>10. Considérant que ce dernier texte édicte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4">
            <text:p>Non</text:p>
          </table:table-cell>
          <table:table-cell office:value-type="string" table:style-name="ce3">
            <text:p>considérants 2-6, 8, 9, 11, 12, 14-17 ne sont pas annotés</text:p>
          </table:table-cell>
          <table:table-cell office:value-type="string" table:style-name="ce3">
            <text:p>ne devrait pas être annoté (Synthèse des griefs)</text:p>
          </table:table-cell>
          <table:table-cell table:style-name="ce3"/>
          <table:table-cell office:value-type="string" table:style-name="ce3">
            <text:p>file:\\\P:\CRJ\RECHERCHE\PROJET_JADE\JADE_COMMUN\Annotation\Annotation_automatique_Maritaud\Technologie_light\Super-catégories-objets_0,8\AN\1967\rejet\CONSTEXT000017665263_annot.xml</text:p>
          </table:table-cell>
          <table:table-cell office:value-type="string" table:style-name="ce3">
            <text:p>4.Campagne</text:p>
          </table:table-cell>
          <table:table-cell office:value-type="string" table:style-name="ce3">
            <text:p><text:s/>7. Considérant, toutefois, qu'il n'est pas établi que ces faits aient été le résultat d'une manoeuvre ni qu'ils aient pu avoir sur le nombre des votes nuls et sur les résultats enregistrés au premier tour une influence suffisante pour remettre en cause l'élection contestée</text:p>
          </table:table-cell>
          <table:table-cell table:number-columns-repeated="16377"/>
        </table:table-row>
        <table:table-row table:style-name="ro1">
          <table:table-cell office:value-type="string" table:style-name="ce3">
            <text:p>Oui</text:p>
          </table:table-cell>
          <table:table-cell office:value-type="string" table:style-name="ce3">
            <text:p>considérants 2-6, 8, 9, 11, 12, 14-17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263_annot.xml</text:p>
          </table:table-cell>
          <table:table-cell office:value-type="string" table:style-name="ce3">
            <text:p>4.Campagne</text:p>
          </table:table-cell>
          <table:table-cell office:value-type="string" table:style-name="ce3">
            <text:p><text:s/>18. Considérant qu'aussi critiquable qu'ait été la façon dont un prêtre a utilisé à des fins électorales la causerie catholique du dimanche, diffusée le matin du deuxième tour par la radiodiffusion de la Guadeloupe, il n'apparaît pas que cette intervention ait eu une influence déterminante sur les résultats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2-6, 8, 9, 11, 12, 14-17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263_annot.xml</text:p>
          </table:table-cell>
          <table:table-cell office:value-type="string" table:style-name="ce3">
            <text:p>7.Opérations</text:p>
          </table:table-cell>
          <table:table-cell office:value-type="string" table:style-name="ce3">
            <text:p><text:s/>20. Considérant que les irrégularités invoquées par le requérant, concernant des votes sans passage par l'isoloir ou des votes sans contrôle de la carte d'identité, ne sont pas mentionnées dans les procès-verbaux et n'ont fait l'objet d'aucune réclamation de la part des délégués du requérant auprès des bureaux ; qu'au surplus ces irrégularités ne portent que sur des cas isolés et n'ont pu avoir une influence sensible sur le résultat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2 et 3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266_annot.xml</text:p>
          </table:table-cell>
          <table:table-cell office:value-type="string" table:style-name="ce3">
            <text:p>4.Campagne</text:p>
          </table:table-cell>
          <table:table-cell office:value-type="string" table:style-name="ce3">
            <text:p><text:s/>4. Considérant, enfin, sans qu'il soit besoin d'ordonner l'enquête sollicitée par le requérant sur ce dernier point, que si une distribution de tracts a eu lieu dans la nuit précédant le scrutin, elle n'a pu exercer sur les opérations électorales une influence suffisante pour en modifier le résultat</text:p>
          </table:table-cell>
          <table:table-cell table:number-columns-repeated="16377"/>
        </table:table-row>
        <table:table-row table:style-name="ro1">
          <table:table-cell office:value-type="string" table:style-name="ce4">
            <text:p>Non</text:p>
          </table:table-cell>
          <table:table-cell office:value-type="string" table:style-name="ce3">
            <text:p>considérants 2, 4-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269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4">
            <text:p>Non</text:p>
          </table:table-cell>
          <table:table-cell office:value-type="string" table:style-name="ce3">
            <text:p>considérants 2, 4-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269_annot.xml</text:p>
          </table:table-cell>
          <table:table-cell office:value-type="string" table:style-name="ce3">
            <text:p>,</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4">
            <text:p>Non</text:p>
          </table:table-cell>
          <table:table-cell office:value-type="string" table:style-name="ce3">
            <text:p>considérants 2, 3, 5, 7-14, 16. et 17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270_annot.xml</text:p>
          </table:table-cell>
          <table:table-cell office:value-type="string" table:style-name="ce3">
            <text:p>4.Campagne</text:p>
          </table:table-cell>
          <table:table-cell office:value-type="string" table:style-name="ce3">
            <text:p><text:s/>4. Considérant que ce grief doit être apprécié par rapport aux dispositions de l'article 1er de l'ordonnance n° 59-224 du 4 février 1959, codifié partiellement à l'article L.0.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4">
            <text:p>Non</text:p>
          </table:table-cell>
          <table:table-cell office:value-type="string" table:style-name="ce3">
            <text:p>considérants 2, 3, 5, 7-14, 16. et 17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270_annot.xml</text:p>
          </table:table-cell>
          <table:table-cell office:value-type="string" table:style-name="ce3">
            <text:p>4.Campagne</text:p>
          </table:table-cell>
          <table:table-cell office:value-type="string" table:style-name="ce3">
            <text:p><text:s/>6. Considérant que ce dernier texte édicte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Oui</text:p>
          </table:table-cell>
          <table:table-cell office:value-type="string" table:style-name="ce3">
            <text:p>considérants 2, 3, 5, 7-14, 16. et 17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270_annot.xml</text:p>
          </table:table-cell>
          <table:table-cell office:value-type="string" table:style-name="ce3">
            <text:p>4.Campagne</text:p>
          </table:table-cell>
          <table:table-cell office:value-type="string" table:style-name="ce3">
            <text:p><text:s/>15. Considérant qu'il n'est pas établi que la sous-préfecture de Calvi ait fait paraître le communiqué susmentionné, qui est l'oeuvre d'un journaliste ; que cette publication ne peut être regardée comme constituant une manoeuvre destinée à fausser le déroulement du scrutin</text:p>
          </table:table-cell>
          <table:table-cell table:number-columns-repeated="16377"/>
        </table:table-row>
        <table:table-row table:style-name="ro1">
          <table:table-cell office:value-type="string" table:style-name="ce4">
            <text:p>Non</text:p>
          </table:table-cell>
          <table:table-cell office:value-type="string" table:style-name="ce3">
            <text:p>considérants 2, 4,5, 7 et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271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4">
            <text:p>Non</text:p>
          </table:table-cell>
          <table:table-cell office:value-type="string" table:style-name="ce3">
            <text:p>considérants 2, 4,5, 7 et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271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4">
            <text:p>Non</text:p>
          </table:table-cell>
          <table:table-cell office:value-type="string" table:style-name="ce3">
            <text:p>considérants 4-7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273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4">
            <text:p>Non</text:p>
          </table:table-cell>
          <table:table-cell office:value-type="string" table:style-name="ce3">
            <text:p>considérants 4-7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273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Oui</text:p>
          </table:table-cell>
          <table:table-cell office:value-type="string" table:style-name="ce3">
            <text:p>considérants 1 et 3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274_annot.xml</text:p>
          </table:table-cell>
          <table:table-cell office:value-type="string" table:style-name="ce3">
            <text:p>4.Campagne</text:p>
          </table:table-cell>
          <table:table-cell office:value-type="string" table:style-name="ce3">
            <text:p><text:s/>2. Considérant que, si par son contenu l'inscription précitée n'excède pas les limites de la propagande électorale, son utilisation dans les conditions sus-indiquées a constitué une irrégularité ; que, toutefois, d'une part, il résulte de l'instruction, que les agissements en cause n'ont été établis que sous la forme d'affichages localisés et que l'inscription litigieuse a, le plus souvent, été lacérée peu de temps après son apparition ; que, d'autre part, M. Cancelier a fait apposer en temps utile sur ses panneaux une déclaration propre à dissiper l'équivoque ; que les faits ci-dessus rappelés n'ont pas été de nature à modifier les résultats de l'élection</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275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considérants 2, 4, 5, 7,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275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5, 7 et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277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considérants 2, 4, 5, 7 et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277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5, 7 et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278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278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5, 7 et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279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279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5, 7 et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47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47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5, 7 et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48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48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5, 7 et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49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49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5, 7 et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50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50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5, 7 et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51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51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Oui</text:p>
          </table:table-cell>
          <table:table-cell office:value-type="string" table:style-name="ce3">
            <text:p>considérant 3 n'est pas annoté ; faut-il annoter les considérants de ce type-là ?</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354_annot.xml</text:p>
          </table:table-cell>
          <table:table-cell office:value-type="string" table:style-name="ce3">
            <text:p>4.Campagne</text:p>
          </table:table-cell>
          <table:table-cell office:value-type="string" table:style-name="ce3">
            <text:p><text:s/>1. Considérant, que d'après les dispositions des articles L. 90 et R. 26 du Code électoral, les candidats peuvent utiliser leurs affiches pour la présentation et la défense de leur candidature et de leur programme, mais ne doivent apposer sur les panneaux mis à leur disposition que deux affiches électorales de grandes dimensions outre celles annonçant la tenue de réunions</text:p>
          </table:table-cell>
          <table:table-cell table:number-columns-repeated="16377"/>
        </table:table-row>
        <table:table-row table:style-name="ro1">
          <table:table-cell office:value-type="string" table:style-name="ce3">
            <text:p>Oui</text:p>
          </table:table-cell>
          <table:table-cell office:value-type="string" table:style-name="ce3">
            <text:p>considérant 3 n'est pas annoté ; faut-il annoter les considérants de ce type-là ?</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354_annot.xml</text:p>
          </table:table-cell>
          <table:table-cell office:value-type="string" table:style-name="ce3">
            <text:p>4.Campagne</text:p>
          </table:table-cell>
          <table:table-cell office:value-type="string" table:style-name="ce3">
            <text:p><text:s/>2. Considérant que M. Tezier a fait apposer sur ses panneaux trois affiches de grand format dont deux comportaient des appels en sa faveur émanant d'une personnalité politique et de maires de la circonscription ; qu'ainsi, ces affiches, régulières quant à leur teneur, étaient, en raison de leur nombre, non conformes aux dispositions précitées du code électoral ; que toutefois, ce fait n'a pu, à lui seul, exercer sur le scrutin une influence de nature à en changer le sens</text:p>
          </table:table-cell>
          <table:table-cell table:number-columns-repeated="16377"/>
        </table:table-row>
        <table:table-row table:style-name="ro1">
          <table:table-cell office:value-type="string" table:style-name="ce3">
            <text:p>Non</text:p>
          </table:table-cell>
          <table:table-cell office:value-type="string" table:style-name="ce3">
            <text:p>considérants 2 4, 5, 7 et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55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55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4">
            <text:p>Non</text:p>
          </table:table-cell>
          <table:table-cell office:value-type="string" table:style-name="ce3">
            <text:p>considérants 1, 3 et ne sont pas annotés</text:p>
          </table:table-cell>
          <table:table-cell table:style-name="ce3"/>
          <table:table-cell office:value-type="string" table:style-name="ce3">
            <text:p>7. Opérations</text:p>
          </table:table-cell>
          <table:table-cell office:value-type="string" table:style-name="ce9">
            <text:p><text:a xlink:href="file:///C:/Users/anais/Downloads/AN/1967/rejet/CONSTEXT000017665357_annot.xml">file:\\\P:\CRJ\RECHERCHE\PROJET_JADE\JADE_COMMUN\Annotation\Annotation_automatique_Maritaud\Technologie_light\Super-catégories-objets_0,8\AN\1967\rejet\CONSTEXT000017665357_annot.xml</text:a></text:p>
          </table:table-cell>
          <table:table-cell office:value-type="string" table:style-name="ce3">
            <text:p>4.Campagne</text:p>
          </table:table-cell>
          <table:table-cell office:value-type="string" table:style-name="ce3">
            <text:p><text:s/>2. Considérant, d'autre part, que, si une électrice votant par correspondance n'avait pas reçu les bulletins lui permettant d'exprimer son opinion, il résulte de l'instruction que ce fait, qui, d'ailleurs, n'a pas constitué une manoeuvre, n'a pu, à lui seul, modifier le résultat du scrutin</text:p>
          </table:table-cell>
          <table:table-cell table:number-columns-repeated="16377"/>
        </table:table-row>
        <table:table-row table:style-name="ro1">
          <table:table-cell office:value-type="string" table:style-name="ce3">
            <text:p>Non</text:p>
          </table:table-cell>
          <table:table-cell office:value-type="string" table:style-name="ce3">
            <text:p>considérants 2 4, 5, 7 et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59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59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5, 7 et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60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60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5, 7 et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62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62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5, 7 et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63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63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5, 7 et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64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64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5, 7 et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65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65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5, 7 et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66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66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Oui</text:p>
          </table:table-cell>
          <table:table-cell office:value-type="string" table:style-name="ce3">
            <text:p>considérants 3, 4, 6, 7, 8 et 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367_annot.xml</text:p>
          </table:table-cell>
          <table:table-cell office:value-type="string" table:style-name="ce3">
            <text:p>7.Opérations</text:p>
          </table:table-cell>
          <table:table-cell office:value-type="string" table:style-name="ce3">
            <text:p><text:s/>2. Considérant que, d'une part, il appartenait aux électeurs qui estimaient avoir été omis ou rayés à tort des listes électorales de présenter, dans les conditions prévues aux articles L. 25 à L.39 du code électoral, une réclamation à la commission municipale et, le cas échéant, au juge d'instance ; qu'il n'est pas allégué que les intéressés aient usé de cette faculté ; que, d'autre part, il n'est établi ni que des électeurs aient été irrégulièrement exclus de la consultation, ni que d'autres électeurs aient émis plusieurs votes ou aient voté au nom de personnes décédées ; qu'enfin il ne résulte pas des pièces du dossier que des personnes régulièrement inscrites n'aient pu exercer leur droit de vote faute d'avoir reçu leur carte électorale</text:p>
          </table:table-cell>
          <table:table-cell table:number-columns-repeated="16377"/>
        </table:table-row>
        <table:table-row table:style-name="ro1">
          <table:table-cell office:value-type="string" table:style-name="ce3">
            <text:p>Oui</text:p>
          </table:table-cell>
          <table:table-cell office:value-type="string" table:style-name="ce3">
            <text:p>considérants 3, 4, 6, 7, 8 et 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367_annot.xml</text:p>
          </table:table-cell>
          <table:table-cell office:value-type="string" table:style-name="ce3">
            <text:p>7.Opérations</text:p>
          </table:table-cell>
          <table:table-cell office:value-type="string" table:style-name="ce3">
            <text:p><text:s/>5. Considérant, par ailleurs, qu'il n'est établi, ni que le président d'un bureau de vote de Cilaos se soit opposé à ce que les électeurs utilisent les isoloirs, ni que des personnes non inscrites aient été admises à voter dans les communes de Saint-Louis et de L'Etang-Salé, ni que des bulletins et enveloppes aient été frauduleusement introduits dans l'urne dans les communes de Saint-Leu et de la Possession ; Sur les griefs relatifs au second tour de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3, 4, 6, 7, 8 et 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367_annot.xml</text:p>
          </table:table-cell>
          <table:table-cell office:value-type="string" table:style-name="ce3">
            <text:p>7.Opérations</text:p>
          </table:table-cell>
          <table:table-cell office:value-type="string" table:style-name="ce3">
            <text:p><text:s/>9. Considérant qu'il ne résulte de l'instruction ni que des bulletins du requérant, retirés de l'urne, n'auraient pas été pointés dans certains bureaux ni que, dans le sixième bureau de Saint-Louis, une feuille de pointage aurait postérieurement au dépouillement, été remplacée par une autre feuille</text:p>
          </table:table-cell>
          <table:table-cell table:number-columns-repeated="16377"/>
        </table:table-row>
        <table:table-row table:style-name="ro1">
          <table:table-cell office:value-type="string" table:style-name="ce3">
            <text:p>Oui</text:p>
          </table:table-cell>
          <table:table-cell office:value-type="string" table:style-name="ce3">
            <text:p>considérants 3, 4, 6, 7, 8 et 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367_annot.xml</text:p>
          </table:table-cell>
          <table:table-cell office:value-type="string" table:style-name="ce3">
            <text:p>7.Opérations</text:p>
          </table:table-cell>
          <table:table-cell office:value-type="string" table:style-name="ce3">
            <text:p><text:s/>10. Considérant que si, en vertu de l'article L. 66 du code électoral, les enveloppes et bulletins déclarés nuls par le bureau de vote doivent être annexés au procès-verbal des opérations électorales, aucune disposition législative ou réglementaire ne s'oppose à la destruction, postérieurement à l'établissement du procès-verbal, des autres enveloppes et bulletins trouvés dans l'urne</text:p>
          </table:table-cell>
          <table:table-cell table:number-columns-repeated="16377"/>
        </table:table-row>
        <table:table-row table:style-name="ro1">
          <table:table-cell office:value-type="string" table:style-name="ce3">
            <text:p>Oui</text:p>
          </table:table-cell>
          <table:table-cell office:value-type="string" table:style-name="ce3">
            <text:p>considérants 2, 3, 4, 5, 6, 8 et 10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368_annot.xml</text:p>
          </table:table-cell>
          <table:table-cell office:value-type="string" table:style-name="ce3">
            <text:p>4.Campagne</text:p>
          </table:table-cell>
          <table:table-cell office:value-type="string" table:style-name="ce3">
            <text:p><text:s/>7. Considérant que si, à la veille du deuxième tour du scrutin, des disques de musique ont été diffusés sur les antennes de Radio-Tahiti 'de la part de M. Sanford ou de ses amis', à l'intention de différents auditeurs des îles, il n'est pas établi que cette propagande, si regrettable qu'elle soit, ait pu modifier les résultats du scrutin ; - Sur les griefs tirés de l'organisation et du déroulement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67\rejet\CONSTEXT000017665368_annot.xml</text:p>
          </table:table-cell>
          <table:table-cell office:value-type="string" table:style-name="ce3">
            <text:p>7.Opérations</text:p>
          </table:table-cell>
          <table:table-cell office:value-type="string" table:style-name="ce3">
            <text:p><text:s/>9. Considérant, toutefois, que de l'examen des procès-verbaux des opérations électorales qui se sont déroulées dans ces bureaux de vote il résulte que, même dans l'hypothèse où il ne serait pas tenu compte des suffrages recueillis par chacun des candidats dans lesdits bureaux, le résultat du scrutin ne s'en trouverait pas pour autant modifié</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77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77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78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78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79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79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80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80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81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81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82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82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83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83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84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84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85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85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86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86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87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87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88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88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89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89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90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90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91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91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92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92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93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93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94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94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95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95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96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96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97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97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98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98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99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399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00_annot.xml</text:p>
          </table:table-cell>
          <table:table-cell office:value-type="string" table:style-name="ce3">
            <text:p>4.Campagne</text:p>
          </table:table-cell>
          <table:table-cell office:value-type="string" table:style-name="ce3">
            <text:p><text:s/>1. Considérant que ce moyen doit être apprécié par rapport aux dispositions de l'article 1er de l'ordonnance n° 59-224 du 4 février 1959, codifié partiellement à l'article L.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00_annot.xml</text:p>
          </table:table-cell>
          <table:table-cell office:value-type="string" table:style-name="ce3">
            <text:p>4.Campagne</text:p>
          </table:table-cell>
          <table:table-cell office:value-type="string" table:style-name="ce3">
            <text:p><text:s/>3. Considérant que ce dernier texte édicte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01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01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3, 6, 8-12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02_annot.xml</text:p>
          </table:table-cell>
          <table:table-cell office:value-type="string" table:style-name="ce3">
            <text:p>4.Campagne</text:p>
          </table:table-cell>
          <table:table-cell office:value-type="string" table:style-name="ce3">
            <text:p><text:s/>0. 134 du Code électoral, dont la rédaction n'a pu avoir pour effet de modifier le sens et la portée du texte de cet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02_annot.xml</text:p>
          </table:table-cell>
          <table:table-cell office:value-type="string" table:style-name="ce3">
            <text:p>4.Campagne</text:p>
          </table:table-cell>
          <table:table-cell office:value-type="string" table:style-name="ce3">
            <text:p><text:s/>7.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03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03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Oui</text:p>
          </table:table-cell>
          <table:table-cell office:value-type="string" table:style-name="ce3">
            <text:p>considérants 5, 8, 9 et 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407_annot.xml</text:p>
          </table:table-cell>
          <table:table-cell office:value-type="string" table:style-name="ce3">
            <text:p>7.Opérations</text:p>
          </table:table-cell>
          <table:table-cell office:value-type="string" table:style-name="ce3">
            <text:p><text:s/>2. Considérant qu'il résulte de l'instruction que les documents nécessaires à l'exercice du vote par correspondance, dans les communes de Locquenolé et Saint-Pol-de-Léon, ont été envoyés en temps utile pour que les électeurs puissent exercer leur droit de vote</text:p>
          </table:table-cell>
          <table:table-cell table:number-columns-repeated="16377"/>
        </table:table-row>
        <table:table-row table:style-name="ro1">
          <table:table-cell office:value-type="string" table:style-name="ce3">
            <text:p>Oui</text:p>
          </table:table-cell>
          <table:table-cell office:value-type="string" table:style-name="ce3">
            <text:p>faut-il annnoter les considérants de ce type?</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407_annot.xml</text:p>
          </table:table-cell>
          <table:table-cell office:value-type="string" table:style-name="ce3">
            <text:p>7.Opérations</text:p>
          </table:table-cell>
          <table:table-cell office:value-type="string" table:style-name="ce3">
            <text:p><text:s/>3. Considérant qu'il n'est établi, ni que, dans la commune de Plougasnou, les enveloppes relatives au vote par correspondance ont été recueillies et postées par des tiers ni que, dans la commune de Plougonven (bureau de Kermeur), les votes par correspondance ont été collectés au domicile des électeurs et remis par des tiers au bureau de vote</text:p>
          </table:table-cell>
          <table:table-cell table:number-columns-repeated="16377"/>
        </table:table-row>
        <table:table-row table:style-name="ro1">
          <table:table-cell office:value-type="string" table:style-name="ce3">
            <text:p>Oui</text:p>
          </table:table-cell>
          <table:table-cell office:value-type="string" table:style-name="ce3">
            <text:p>faut-il annnoter les considérants de ce type?</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407_annot.xml</text:p>
          </table:table-cell>
          <table:table-cell office:value-type="string" table:style-name="ce3">
            <text:p>7.Opérations</text:p>
          </table:table-cell>
          <table:table-cell office:value-type="string" table:style-name="ce3">
            <text:p><text:s/>6. Considérant que s'il est constant que les bulletins comptés comme nuls par les bureaux de vote des communes de Mespaul, Locmaria-Berrien et Locquirec ne sont parvenus à la préfecture que le 14 mars 1967, il résulte de l'instruction que, d'une part, le nombre desdits bulletins correspond aux chiffres portés sur les procès-verbaux et que, d'autre part, ce retard ne constitue pas une manoeuvre destinée à faire obstacle au contrôle de la sincérité du scrutin</text:p>
          </table:table-cell>
          <table:table-cell table:number-columns-repeated="16377"/>
        </table:table-row>
        <table:table-row table:style-name="ro1">
          <table:table-cell office:value-type="string" table:style-name="ce3">
            <text:p>Oui</text:p>
          </table:table-cell>
          <table:table-cell office:value-type="string" table:style-name="ce3">
            <text:p>faut-il annnoter les considérants de ce type?</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407_annot.xml</text:p>
          </table:table-cell>
          <table:table-cell office:value-type="string" table:style-name="ce3">
            <text:p>7.Opérations</text:p>
          </table:table-cell>
          <table:table-cell office:value-type="string" table:style-name="ce3">
            <text:p><text:s/>7. Considérant qu'il résulte des procès-verbaux de recensement des votes que les opérations de dépouillement du scrutin auquel il a été procédé dans le deuxième bureau de la commune de Scrignac, ont fait apparaître que le total des suffrages exprimés était de 320 alors que le nombre des émargements était seulement de 319 ; que, de même, dans le premier bureau de la commune de Plouigneau, le nombre des suffrages exprimés était de 849, alors que le nombre des émargements était seulement de 843 ; qu'il convient, en conséquence, de retenir pour chacun de ces bureaux de vote le moins élevé des deux nombres et de diminuer corrélativement le nombre des votants, celui des suffrages exprimés ainsi que celui des voix recueillies par le candidat le plus favorisé ; qu'après cette réduction, M. Prat conserve 23 291 voix, chiffre supérieur de 42 unités à celui des voix recueillies par le requérant</text:p>
          </table:table-cell>
          <table:table-cell table:number-columns-repeated="16377"/>
        </table:table-row>
        <table:table-row table:style-name="ro1">
          <table:table-cell office:value-type="string" table:style-name="ce3">
            <text:p>Oui</text:p>
          </table:table-cell>
          <table:table-cell office:value-type="string" table:style-name="ce3">
            <text:p>faut-il annoter les considérants de ce type ?</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407_annot.xml</text:p>
          </table:table-cell>
          <table:table-cell office:value-type="string" table:style-name="ce3">
            <text:p>7.Opérations</text:p>
          </table:table-cell>
          <table:table-cell office:value-type="string" table:style-name="ce3">
            <text:p><text:s/>10. Considérant que les moyens tirés : - de ce que des feuilles d'émargement et de pointage auraient manqué dans plusieurs bureaux de vote ; - de ce que des pressions auraient été exercées sur les électeurs dans certains bureaux de vote ; - de ce qu'un électeur, frappé d'une incapacité, aurait voté dans la commune de Morlaix ; - de ce que des électeurs se trouvant dans l'incapacité de se déplacer auraient néanmoins été comptés comme votants dans certains bureaux de vote ne sont pas établis</text:p>
          </table:table-cell>
          <table:table-cell table:number-columns-repeated="16377"/>
        </table:table-row>
        <table:table-row table:style-name="ro1">
          <table:table-cell office:value-type="string" table:style-name="ce4">
            <text:p>Non</text:p>
          </table:table-cell>
          <table:table-cell office:value-type="string" table:style-name="ce3">
            <text:p>faut-il annnoter les considérants de ce type?</text:p>
          </table:table-cell>
          <table:table-cell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1967\rejet\CONSTEXT000017665407_annot.xml</text:p>
          </table:table-cell>
          <table:table-cell office:value-type="string" table:style-name="ce3">
            <text:p>4.Campagne</text:p>
          </table:table-cell>
          <table:table-cell office:value-type="string" table:style-name="ce3">
            <text:p><text:s/>4. Considérant que le moyen tiré de ce qu'un électeur aurait été compté comme ayant voté par correspondance à Plougonven alors qu'il se serait en réalité abstenu, manque en fai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08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08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1, 2, 4, 6-11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09_annot.xml</text:p>
          </table:table-cell>
          <table:table-cell office:value-type="string" table:style-name="ce3">
            <text:p>4.Campagne</text:p>
          </table:table-cell>
          <table:table-cell office:value-type="string" table:style-name="ce3">
            <text:p><text:s/>3. Considérant que ce moyen doit être apprécié par rapport aux dispositions de l'article 1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considérants 1, 2, 4, 6-11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09_annot.xml</text:p>
          </table:table-cell>
          <table:table-cell office:value-type="string" table:style-name="ce3">
            <text:p>4.Campagne</text:p>
          </table:table-cell>
          <table:table-cell office:value-type="string" table:style-name="ce3">
            <text:p><text:s/>5. Considérant que ce dernier texte édicte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4">
            <text:p>Non</text:p>
          </table:table-cell>
          <table:table-cell office:value-type="string" table:style-name="ce3">
            <text:p>considérants 1, 2, 3 et 6 ne sont pas annotés</text:p>
          </table:table-cell>
          <table:table-cell table:style-name="ce3"/>
          <table:table-cell office:value-type="string" table:style-name="ce3">
            <text:p>7. Opérations</text:p>
          </table:table-cell>
          <table:table-cell office:value-type="string" table:style-name="ce9">
            <text:p><text:a xlink:href="file:///C:/Users/anais/Downloads/AN/1967/rejet/CONSTEXT000017665411_annot.xml">file:\\\P:\CRJ\RECHERCHE\PROJET_JADE\JADE_COMMUN\Annotation\Annotation_automatique_Maritaud\Technologie_light\Super-catégories-objets_0,8\AN\1967\rejet\CONSTEXT000017665411_annot.xml</text:a></text:p>
          </table:table-cell>
          <table:table-cell office:value-type="string" table:style-name="ce3">
            <text:p>4.Campagne</text:p>
          </table:table-cell>
          <table:table-cell office:value-type="string" table:style-name="ce3">
            <text:p><text:s/>5. Considérant que, si les imprimés utilisés pour l'établissement des procès-verbaux prévoient à leur page 2 l'indication du nombre des 'bulletins sous enveloppe' trouvés dans l'urne, alors qu'ils auraient dû porter la mention des 'bulletins sans enveloppe' trouvés dans l'urne et que, de ce fait, certains procès-verbaux contiennent des mentions apparemment contradictoires, cette circonstance, due à une simple erreur typographique, est sans influence sur l'exactitude des résultats du dépouillement, lesquels ont été régulièrement arrêtés et consignés à la page 3 desdits procès-verbaux</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12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12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13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13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14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14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15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15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16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16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17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17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18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18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21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21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22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22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Oui</text:p>
          </table:table-cell>
          <table:table-cell office:value-type="string" table:style-name="ce3">
            <text:p>considérant 1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424_annot.xml</text:p>
          </table:table-cell>
          <table:table-cell office:value-type="string" table:style-name="ce3">
            <text:p>4.Campagne</text:p>
          </table:table-cell>
          <table:table-cell office:value-type="string" table:style-name="ce3">
            <text:p><text:s/>2. Considérant que le communiqué incriminé, publié avant l'ouverture de la campagne électorale, précisait une situation de fait, en vue de dissiper la confusion qu'aurait pu faire naître, dans l'esprit des électeurs, la qualité d'ecclésiastique du candidat dont il s'agit ; que la note pastorale parue dans le journal diocésain non plus que la reproduction, sans commentaire, du communiqué initial de l'archevêché dans le journal électoral d'un candidat ne saurait constituer une manoeuvre de nature à porter une atteinte à la sincérité du scrutin ; que l'utilisation polémique du même communiqué au cours de réunions publiques n'est pas établie ; qu'enfin, la reproduction du même communiqué sous forme de tracts anonymes, dont la diffusion a été limitée à un seul canton, n'a pu, en l'espèce, modifier le résultat du scrutin ;</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25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25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26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26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27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27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Oui</text:p>
          </table:table-cell>
          <table:table-cell office:value-type="string" table:style-name="ce3">
            <text:p>considérants 1, 3 et 5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428_annot.xml</text:p>
          </table:table-cell>
          <table:table-cell office:value-type="string" table:style-name="ce3">
            <text:p>4.Campagne</text:p>
          </table:table-cell>
          <table:table-cell office:value-type="string" table:style-name="ce3">
            <text:p><text:s/>2. Considérant que, si M. Rousselet, candidat proclamé élu, a en outre bénéficié du soutien d'un journal mensuel édité à l'occasion de la campagne électorale par la formation politique qu'il représentait, il n'est pas établi que la publication dont s'agit ait été éditée en violation de la législation sur la presse dont aucune prescription n'interdit le lancement d'un journal en période électorale ; qu'en admettant même que la publication incriminée puisse, à certains égards, notamment par son mode de distribution, être assimilée à l'un des moyens interdits par le Code électoral, la propagande exercée en faveur de M. Rousselet par ce journal n'a pu fausser les conditions de la consultation électorale dans les circonstances de l'espèce, eu égard notamment au fait que le requérant à lui-même diffusé des documents de propagande à l'adresse personnelle des électeurs</text:p>
          </table:table-cell>
          <table:table-cell table:number-columns-repeated="16377"/>
        </table:table-row>
        <table:table-row table:style-name="ro1">
          <table:table-cell office:value-type="string" table:style-name="ce3">
            <text:p>Oui</text:p>
          </table:table-cell>
          <table:table-cell office:value-type="string" table:style-name="ce3">
            <text:p>considérants 1, 3 et 5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428_annot.xml</text:p>
          </table:table-cell>
          <table:table-cell office:value-type="string" table:style-name="ce3">
            <text:p>7.Opérations</text:p>
          </table:table-cell>
          <table:table-cell office:value-type="string" table:style-name="ce3">
            <text:p><text:s/>5. Considérant que le requérant allègue que le nombre de bulletins portant son nom qui ont été annulés est anormalement élevé, mais qu'il résulte des pièces du dossier, et notamment de l'examen des procès-verbaux de dépouillement des bureaux de vote ainsi que des enveloppes et bulletins y annexés, que le nombre de bulletins au nom de M. Baudis déchirés ou marqués et, en conséquence, régulièrement annulés ne représente qu'une faible proportion de l'ensemble des bulletins nuls et qu'il est du même ordre que celui des bulletins au nom de M. Rousselet annulés dans les mêmes conditions ; qu'il suit de là que M. Baudis n'est pas fondé à soutenir que des irrégularités commises lors des opérations de dépouillement ont pu modifier le résultat de la consultation ; qu'il en est de même des autres griefs invoqués en matière d'opérations électorales, soit que les faits n'aient pas été établis, soit que leur influence n'ait pu être, en tout état de cause, que négligeable</text:p>
          </table:table-cell>
          <table:table-cell table:number-columns-repeated="16377"/>
        </table:table-row>
        <table:table-row table:style-name="ro1">
          <table:table-cell office:value-type="string" table:style-name="ce3">
            <text:p>Oui</text:p>
          </table:table-cell>
          <table:table-cell office:value-type="string" table:style-name="ce3">
            <text:p>considérants 1-5 et 7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431_annot.xml</text:p>
          </table:table-cell>
          <table:table-cell office:value-type="string" table:style-name="ce3">
            <text:p>7.Opérations</text:p>
          </table:table-cell>
          <table:table-cell office:value-type="string" table:style-name="ce3">
            <text:p><text:s/>6. Considérant, d'une part, qu'il résulte des pièces du dossier que, si la demande de vote par correspondance prévue par les articles L. 79 et R. 81 du Code électoral présentée par 56 pensionnaires de l'asile des petites soeurs des Pauvres a été signée non par ces électeurs mais par une religieuse de cet établissement, il est constant que les documents électoraux ont été adressés individuellement à chacun de ces électeurs ; qu'il n'est pas établi en l'espèce ni qu'une pression ait été exercée, lors de l'émission du vote, sur les pensionnaires dudit établissement ni que la transmission des suffrages n'ait pas été conforme aux prescriptions du Code électoral ; que cette irrégularité, qui a échappé à l'attention des services municipaux, n'a concerné que l'établissement de la seule demande de vote par correspondance et n'a pas, en l'absence de tous autres vices, et si particulièrement regrettable qu'elle ait été, constitué une manoeuvre de nature à porter atteinte à la liberté et à la sincérité du vote</text:p>
          </table:table-cell>
          <table:table-cell table:number-columns-repeated="16377"/>
        </table:table-row>
        <table:table-row table:style-name="ro1">
          <table:table-cell office:value-type="string" table:style-name="ce3">
            <text:p>Oui</text:p>
          </table:table-cell>
          <table:table-cell office:value-type="string" table:style-name="ce3">
            <text:p>considérants 1 et 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432_annot.xml</text:p>
          </table:table-cell>
          <table:table-cell office:value-type="string" table:style-name="ce3">
            <text:p>4.Campagne</text:p>
          </table:table-cell>
          <table:table-cell office:value-type="string" table:style-name="ce3">
            <text:p><text:s/>3. Considérant, enfin, que, si un tract anonyme hostile au requérant a été diffusé à de nombreux exemplaires avant le deuxième tour de scrutin, il n'est pas établi, alors que le requérant a lui-même usé de moyens de propagande irréguliers, que ce fait ait été de nature à modifier le résultat de l'élection ;</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33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33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36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36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4">
            <text:p>Non</text:p>
          </table:table-cell>
          <table:table-cell office:value-type="string" table:style-name="ce3">
            <text:p>considérant 1, 5 et 6 ne sont pas annotés</text:p>
          </table:table-cell>
          <table:table-cell table:style-name="ce3"/>
          <table:table-cell office:value-type="string" table:style-name="ce3">
            <text:p>7. Opérations</text:p>
          </table:table-cell>
          <table:table-cell office:value-type="string" table:style-name="ce9">
            <text:p><text:a xlink:href="file:///C:/Users/anais/Downloads/AN/1967/rejet/CONSTEXT000017665437_annot.xml">file:\\\P:\CRJ\RECHERCHE\PROJET_JADE\JADE_COMMUN\Annotation\Annotation_automatique_Maritaud\Technologie_light\Super-catégories-objets_0,8\AN\1967\rejet\CONSTEXT000017665437_annot.xml</text:a></text:p>
          </table:table-cell>
          <table:table-cell office:value-type="string" table:style-name="ce3">
            <text:p>4.Campagne</text:p>
          </table:table-cell>
          <table:table-cell office:value-type="string" table:style-name="ce3">
            <text:p><text:s/>4. Considérant que la circonstance qu'un seul électeur de la circonscription, lequel n'a pu être atteint en temps utile par les services des postes et télécommunications, n'a pu voter par correspondance, n'a pu vicier le résultat de l'élection ; que le fait que la mairie de Lyon a délivré une carte électorale au nom d'un électeur décédé en septembre 1966 ne saurait laisser présumer une volonté de fraude</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38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38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39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39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Oui</text:p>
          </table:table-cell>
          <table:table-cell office:value-type="string" table:style-name="ce3">
            <text:p>considérants 1, 2, 4-8, 10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440_annot.xml</text:p>
          </table:table-cell>
          <table:table-cell office:value-type="string" table:style-name="ce3">
            <text:p>5.Campagne</text:p>
          </table:table-cell>
          <table:table-cell office:value-type="string" table:style-name="ce3">
            <text:p><text:s/>3. Considérant que, si M. Gratiant prétend que les maires de certaines communes auraient exercé sur leurs administrés bénéficiaires de l'aide sociale des pressions en faveur de son adversaire et, qu'en outre, M. Sablé et ses partisans se seraient livrés à des entreprises de corruption à l'égard d'électeurs nécessiteux, il n'apporte à l'appui de ces allégations aucun commencement de preuve</text:p>
          </table:table-cell>
          <table:table-cell table:number-columns-repeated="16377"/>
        </table:table-row>
        <table:table-row table:style-name="ro1">
          <table:table-cell office:value-type="string" table:style-name="ce3">
            <text:p>Oui</text:p>
          </table:table-cell>
          <table:table-cell office:value-type="string" table:style-name="ce3">
            <text:p>considérants 1, 2, 4-8, 10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440_annot.xml</text:p>
          </table:table-cell>
          <table:table-cell office:value-type="string" table:style-name="ce3">
            <text:p>7.Opérations</text:p>
          </table:table-cell>
          <table:table-cell office:value-type="string" table:style-name="ce3">
            <text:p><text:s/>9. Considérant que, si des électeurs ont été dans certains cas admis à voter sans qu'il soit exigé d'eux qu'ils passent au préalable par l'isoloir ou qu'ils présentent, outre leur carte d'électeur, un titre d'identité, il ne résulte pas de l'instruction que ces faits aient permis des fraudes de nature à altérer la sincérité du scrutin</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46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46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47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47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48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48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49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49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50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50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51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51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52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52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53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53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Oui</text:p>
          </table:table-cell>
          <table:table-cell office:value-type="string" table:style-name="ce3">
            <text:p>considérants 1-3 et 5-7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455_annot.xml</text:p>
          </table:table-cell>
          <table:table-cell office:value-type="string" table:style-name="ce3">
            <text:p>7.Opérations</text:p>
          </table:table-cell>
          <table:table-cell office:value-type="string" table:style-name="ce3">
            <text:p><text:s/>4. Considérant, par ailleurs, que les divers bureaux de vote de la circonscription n'ont enregistré aucune réclamation d'électeurs prétendant avoir été indûment privés de leur droit de vote par suite d'une radiation abusive de la liste électorale</text:p>
          </table:table-cell>
          <table:table-cell table:number-columns-repeated="16377"/>
        </table:table-row>
        <table:table-row table:style-name="ro1">
          <table:table-cell office:value-type="string" table:style-name="ce3">
            <text:p>Oui</text:p>
          </table:table-cell>
          <table:table-cell office:value-type="string" table:style-name="ce3">
            <text:p>considérants 1-3 et 5-7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455_annot.xml</text:p>
          </table:table-cell>
          <table:table-cell office:value-type="string" table:style-name="ce3">
            <text:p>7.Opérations</text:p>
          </table:table-cell>
          <table:table-cell office:value-type="string" table:style-name="ce3">
            <text:p><text:s/>8. Considérant que, si un bureau de vote a cru devoir procéder, à l'appui du deuxième procès-verbal des opérations électorales, d'ailleurs identique au premier, à la reconstitution des pièces annexées au premier, cette irrégularité purement formelle ne saurait constituer une présomption de fraude ; qu'enfin, il n'est pas établi que, dans un bureau de vote, le dépouillement ait eu lieu à huis-clos</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56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56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Oui</text:p>
          </table:table-cell>
          <table:table-cell office:value-type="string" table:style-name="ce3">
            <text:p>considérants 2-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457_annot.xml</text:p>
          </table:table-cell>
          <table:table-cell office:value-type="string" table:style-name="ce3">
            <text:p>4.Campagne</text:p>
          </table:table-cell>
          <table:table-cell office:value-type="string" table:style-name="ce3">
            <text:p><text:s/>1. Considérant que si M. Marcenet allègue que des documents de propagande, adressés à des électeurs inscrits, auraient été retournés avec la mention 'n'habite pas à l'adresse indiquée', il n'établit pas que les électeurs, destinataires de ces envois, aient fait l'objet d'une inscription irrégulière sur les listes électorales ; Sur les griefs tirés d'irrégularités de propagande</text:p>
          </table:table-cell>
          <table:table-cell table:number-columns-repeated="16377"/>
        </table:table-row>
        <table:table-row table:style-name="ro1">
          <table:table-cell office:value-type="string" table:style-name="ce3">
            <text:p>Oui</text:p>
          </table:table-cell>
          <table:table-cell office:value-type="string" table:style-name="ce3">
            <text:p>considérants 2-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7\rejet\CONSTEXT000017665457_annot.xml</text:p>
          </table:table-cell>
          <table:table-cell office:value-type="string" table:style-name="ce3">
            <text:p>4.Campagne</text:p>
          </table:table-cell>
          <table:table-cell office:value-type="string" table:style-name="ce3">
            <text:p><text:s/>5. Considérant que si M. Villa a fait procéder à un affichage hors des panneaux réglementaires et a fait apposer sa deuxième affiche légale après l'expiration du délai fixé par l'article R. 26 du Code électoral, il n'apparaît pas que ces irrégularités aient pu avoir une influence de nature à fausser les résultats de la consultation ;</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59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59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60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60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62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62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63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63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64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64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65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65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68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68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69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69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 4 - 8 ne sont pas annoté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70_annot.xml</text:p>
          </table:table-cell>
          <table:table-cell office:value-type="string" table:style-name="ce3">
            <text:p>4.Campagne</text:p>
          </table:table-cell>
          <table:table-cell office:value-type="string" table:style-name="ce3">
            <text:p><text:s/>1. Considérant que les requêtes soumises à l'examen du Conseil constitutionnel doivent être appréciées par rapport aux dispositions de l'article premier de l'ordonnance n° 59-224 du 4 février 1959, codifié partiellement à l'article L. O. 134 du Code électoral, dont la rédaction n'a pu avoir pour effet de modifier le sens et la portée du texte de ladite ordonnance</text:p>
          </table:table-cell>
          <table:table-cell table:number-columns-repeated="16377"/>
        </table:table-row>
        <table:table-row table:style-name="ro1">
          <table:table-cell office:value-type="string" table:style-name="ce3">
            <text:p>Non</text:p>
          </table:table-cell>
          <table:table-cell office:value-type="string" table:style-name="ce3">
            <text:p>faut-il annoter le considérant qui précède ?</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67\rejet\CONSTEXT000017665470_annot.xml</text:p>
          </table:table-cell>
          <table:table-cell office:value-type="string" table:style-name="ce3">
            <text:p>4.Campagne</text:p>
          </table:table-cell>
          <table:table-cell office:value-type="string" table:style-name="ce3">
            <text:p><text:s/>3. Considérant que ce dernier texte édicté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Non</text:p>
          </table:table-cell>
          <table:table-cell office:value-type="string" table:style-name="ce3">
            <text:p>considérants 2-4 ne sont pas annotés</text:p>
          </table:table-cell>
          <table:table-cell office:value-type="string" table:style-name="ce3">
            <text:p>Problème de découpage</text:p>
          </table:table-cell>
          <table:table-cell table:style-name="ce3"/>
          <table:table-cell office:value-type="string" table:style-name="ce3">
            <text:p>file:\\\P:\CRJ\RECHERCHE\PROJET_JADE\JADE_COMMUN\Annotation\Annotation_automatique_Maritaud\Technologie_light\Super-catégories-objets_0,8\AN\1968\rejet\CONSTEXT000017665472_annot.xml</text:p>
          </table:table-cell>
          <table:table-cell office:value-type="string" table:style-name="ce3">
            <text:p>4.Campagne</text:p>
          </table:table-cell>
          <table:table-cell office:value-type="string" table:style-name="ce3">
            <text:p><text:s/>1. Considérant qu'aux termes de l'article L.</text:p>
          </table:table-cell>
          <table:table-cell table:number-columns-repeated="16377"/>
        </table:table-row>
        <table:table-row table:style-name="ro1">
          <table:table-cell office:value-type="string" table:style-name="ce3">
            <text:p>Oui</text:p>
          </table:table-cell>
          <table:table-cell office:value-type="string" table:style-name="ce3">
            <text:p>considérants 1, 3-6, 9, 10, 12, 13, 15, 16, 1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474_annot.xml</text:p>
          </table:table-cell>
          <table:table-cell office:value-type="string" table:style-name="ce3">
            <text:p>4.Campagne</text:p>
          </table:table-cell>
          <table:table-cell office:value-type="string" table:style-name="ce3">
            <text:p><text:s/>2. Considérant qu'il n'est pas établi que certains électeurs de la commune de Lafarre n'aient pas reçu les documents de propagande électorale ; que le requérant lui-même admet que cette lacune, si elle s'était produite, aurait affecté les deux candidas ; En ce qui concerne le libellé du bulletin de vote de M. Chazelle</text:p>
          </table:table-cell>
          <table:table-cell table:number-columns-repeated="16377"/>
        </table:table-row>
        <table:table-row table:style-name="ro1">
          <table:table-cell office:value-type="string" table:style-name="ce3">
            <text:p>Oui</text:p>
          </table:table-cell>
          <table:table-cell office:value-type="string" table:style-name="ce3">
            <text:p>considérants 1, 3-6, 9, 10, 12, 13, 15, 16, 1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474_annot.xml</text:p>
          </table:table-cell>
          <table:table-cell office:value-type="string" table:style-name="ce3">
            <text:p>7.Opérations</text:p>
          </table:table-cell>
          <table:table-cell office:value-type="string" table:style-name="ce3">
            <text:p><text:s/>7. Considérant, enfin, que, si les procès-verbaux de vingt-sept des vingt-neuf communes citées par le requérant ne mentionnent pas la présence, lors des opérations de dépouillement des votes, d'un nombre le scrutateurs suffisant, les lacunes des procès-verbaux ne sont pas à elles seules de nature à établir que le dépouillement du scrutin s'est effectué dans des conditions irrégulières, dès lors qu'en vertu du second alinéa de l'article R. 64 du Code électoral, les membres du bureau de vote peuvent, en cas d'insuffisance du nombre des scrutateurs, participer au dépouillement du scrutin et que surtout les procès-verbaux dont il s'agit ne contiennent aucune réclamation relative à la régularité du scrutin ; qu'il résulte enfin des attestations produites par le député élu concernant certaines des communes incriminées, que les bureaux de vote avaient été régulièrement complétés par des scrutateurs et que les auteurs des procès-verbaux ont seulement omis de mentionner les noms de ces scrutateurs ; En ce qui concerne la régularité des opérations de vote</text:p>
          </table:table-cell>
          <table:table-cell table:number-columns-repeated="16377"/>
        </table:table-row>
        <table:table-row table:style-name="ro1">
          <table:table-cell office:value-type="string" table:style-name="ce3">
            <text:p>Oui</text:p>
          </table:table-cell>
          <table:table-cell office:value-type="string" table:style-name="ce3">
            <text:p>considérants 1, 3-6, 9, 10, 12, 13, 15, 16, 1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474_annot.xml</text:p>
          </table:table-cell>
          <table:table-cell office:value-type="string" table:style-name="ce3">
            <text:p>7.Opérations</text:p>
          </table:table-cell>
          <table:table-cell office:value-type="string" table:style-name="ce3">
            <text:p><text:s/>8. Considérant qu'il n'est établi ni que les bulletins de vote aient été remis de la main à la main dans le bureau de vote de Saint-Préjet-d'Allier ni que dans le bureau Jeanne-d'Arc de la ville du Puy des électeurs se soient abstenus de passer par les isoloirs</text:p>
          </table:table-cell>
          <table:table-cell table:number-columns-repeated="16377"/>
        </table:table-row>
        <table:table-row table:style-name="ro1">
          <table:table-cell office:value-type="string" table:style-name="ce3">
            <text:p>Oui</text:p>
          </table:table-cell>
          <table:table-cell office:value-type="string" table:style-name="ce3">
            <text:p>considérants 1, 3-6, 9, 10, 12, 13, 15, 16, 1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474_annot.xml</text:p>
          </table:table-cell>
          <table:table-cell office:value-type="string" table:style-name="ce3">
            <text:p>7.Opérations</text:p>
          </table:table-cell>
          <table:table-cell office:value-type="string" table:style-name="ce3">
            <text:p><text:s/>11. Considérant, d'une part, que tout électeur admis à voter par correspondance peut renoncer au bénéfice de ce mode de votation et se rendre, le jour du scrutin, au bureau de vote pour exercer son droit de vote ; que, d'autre part, l'exercice du droit de vote par correspondance au premier tour n'oblige pas l'électeur à recourir au même procédé de vote pour le second tour ; que, dès lors, la circonstance que deux électeurs de la commune de Josat aient voté par correspondance le 23 juin 1968 ne faisait pas obstacle à ce que les intéressés viennent voter en personne, au second tour du scrutin, le 30 juin suivant</text:p>
          </table:table-cell>
          <table:table-cell table:number-columns-repeated="16377"/>
        </table:table-row>
        <table:table-row table:style-name="ro1">
          <table:table-cell office:value-type="string" table:style-name="ce3">
            <text:p>Oui</text:p>
          </table:table-cell>
          <table:table-cell office:value-type="string" table:style-name="ce3">
            <text:p>considérants 1, 3-6, 9, 10, 12, 13, 15, 16, 1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474_annot.xml</text:p>
          </table:table-cell>
          <table:table-cell office:value-type="string" table:style-name="ce3">
            <text:p>7.Opérations</text:p>
          </table:table-cell>
          <table:table-cell office:value-type="string" table:style-name="ce3">
            <text:p><text:s/>14. Considérant que, si les procès-verbaux de dépouillement du scrutin examinés par le requérant pour les communes de SaintPaulien, SaintVincent, Saint-Didier-sur-Doulon, Salzuit, Grenier-Montgon, Mazeyrat-Crispinhac, Reilhac et Espaly-Saint-Marcel ne comportent ni le procès-verbal annexe d'ouverture des votes par correspondance, ni les enveloppes qui doivent y être jointes, il résulte de l'instruction que ces documents et pièces ont été établis et conservés ; que leur examen ne fait apparaître aucune irrégularité ; que si l'une des rubriques du procès-verbal de dépouillement du scrutin du premier bureau de vote du Brignon n'a- pas été remplie, cette lacune est comblée par l'ensemble des mentions du procès-verbal d'ouverture des votes par correspondance, régulièrement dressé le jour du scrutin et annexé au procès-verbal de dépouillement des votes ; que la mention manuscrite du maire d'Espaly-Saint-Marcel concernant le nombre des votes par correspondance reçus dans les deux bureaux de vote de la commune, différent de celui qui figure aux procès-verbaux, se rapporte, eu égard à sa date, au premier tour du scrutin ; qu'enfin, le procès-verbal d'ouverture des votes par correspondance de la commune de Léotoing établit qu'un vote par correspondance a été régulièrement enregistré dans cette commune ; En ce qui concerne le décompte des voix</text:p>
          </table:table-cell>
          <table:table-cell table:number-columns-repeated="16377"/>
        </table:table-row>
        <table:table-row table:style-name="ro1">
          <table:table-cell office:value-type="string" table:style-name="ce3">
            <text:p>Oui</text:p>
          </table:table-cell>
          <table:table-cell office:value-type="string" table:style-name="ce3">
            <text:p>considérants 1, 3-6, 9, 10, 12, 13, 15, 16, 1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474_annot.xml</text:p>
          </table:table-cell>
          <table:table-cell office:value-type="string" table:style-name="ce3">
            <text:p>7.Opérations</text:p>
          </table:table-cell>
          <table:table-cell office:value-type="string" table:style-name="ce3">
            <text:p><text:s/>17. Considérant que, si les feuilles de dépouillement de certains bureaux de vote n'ont pas été établies d'une façon rigoureusement conforme aux normes fixées par l'Administration, il résulte clairement des mentions qui y sont portées que le nombre des voix attribuées aux deux candidats par les procès-verbaux de dépouillement correspond exactement au nombre des bulletins pointés pour chacun d'eux par les scrutateurs ; qu'ainsi les résultats consignés par les procès-verbaux des communes de Sainte-Florine, d'Aiguilhe, de Saint-Ilpize, de Paulhac, de Beaumont, de Cohade, de Polignac, de Cussac, de Grenier-Montgon et de Saint-Victor-sur-Arlane doivent être tenus pour exacts ; En ce qui concerne la régularité des procès-verbaux</text:p>
          </table:table-cell>
          <table:table-cell table:number-columns-repeated="16377"/>
        </table:table-row>
        <table:table-row table:style-name="ro1">
          <table:table-cell office:value-type="string" table:style-name="ce3">
            <text:p>Oui</text:p>
          </table:table-cell>
          <table:table-cell office:value-type="string" table:style-name="ce3">
            <text:p>considérants 1, 3-6, 9, 10, 12, 13, 15, 16, 1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474_annot.xml</text:p>
          </table:table-cell>
          <table:table-cell office:value-type="string" table:style-name="ce3">
            <text:p>7.Opérations</text:p>
          </table:table-cell>
          <table:table-cell office:value-type="string" table:style-name="ce3">
            <text:p><text:s/>19. Considérant que, contrairement aux allégations de la requête, les feuilles de dépouillement du scrutin sont jointes au procès-verbal de la commune d'Alleyras ; que les feuilles de dépouillement des communes de Domeyrat, Saint-Vidac, Anvers, Tailhac, Chanaleilles, Esplantas, Saint-Préjet-d'Allier, Vezezoux, Espalem, Mazeyrat-Crispinhac et de Reilhac ont été communiquées au Conseil constitutionnel ; que leur examen ne révèle aucune irrégularité ou erreur dans le décompte des voix attribuées aux candidats dans chacune de ces communes ; que, si les feuilles de pointage des communes de Brioude (premier bureau), de Cussac, de Félines, de La Besseyre et de Sainte-DIarie-Desges, jointes aux procès-verbaux ne sont pas signées par les scrutateurs, cette irrégularité n'est pas de nature à entraîner l'annulation de l'élection dès lors que les suffrages qui y sont consignés correspondent aux mentions des procès-verbaux ; que ces derniers ne comportent l'énoncé d'aucune réclamation et qu'aucune intention frauduleuse n'est établie ni même alléguée ; qu'enfin, s'il résulte de l'instruction qu'aucune feuille de pointage n'a été établie lors du dépouillement des votes dans les communes de Chastel, Saint-Jean-de-Nay, Saint-Privat-d'Allier et de Saugues, cette irrégularité, qui n'a pas été relevée par la commission de recensement, ne saurait, aussi grave qu'elle soit et dès lors que le requérant ne soutient pas que les énonciations des procès-verbaux relatives au résultat de l'élection seraient entachées d'erreurs, entraîner, dans les circonstances de l'espèce, l'annulation de l'élection</text:p>
          </table:table-cell>
          <table:table-cell table:number-columns-repeated="16377"/>
        </table:table-row>
        <table:table-row table:style-name="ro1">
          <table:table-cell office:value-type="string" table:style-name="ce3">
            <text:p>Oui</text:p>
          </table:table-cell>
          <table:table-cell office:value-type="string" table:style-name="ce3">
            <text:p>considérants 1, 3-5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475_annot.xml</text:p>
          </table:table-cell>
          <table:table-cell office:value-type="string" table:style-name="ce3">
            <text:p>4.Campagne</text:p>
          </table:table-cell>
          <table:table-cell office:value-type="string" table:style-name="ce3">
            <text:p><text:s/>2. Considérant, d'autre part, que la circonstance que le préfet de Seine-et-Marne n'ait pas cru devoir répondre à la demande du requérant tendant à ce qu'il soit mis fin aux irrégularités d'affichage dans la cinquième circonscription de Seine-et-Marne n'a pas été de nature, en l'occurrence, à porter atteinte à la sincérité du scrutin ; Sur les griefs tirés de l'irrégularité des conditions dans lesquelles se serait déroulée 1a campagne électorale</text:p>
          </table:table-cell>
          <table:table-cell table:number-columns-repeated="16377"/>
        </table:table-row>
        <table:table-row table:style-name="ro1">
          <table:table-cell office:value-type="string" table:style-name="ce3">
            <text:p>Oui</text:p>
          </table:table-cell>
          <table:table-cell office:value-type="string" table:style-name="ce3">
            <text:p>considérants 2-5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476_annot.xml</text:p>
          </table:table-cell>
          <table:table-cell office:value-type="string" table:style-name="ce3">
            <text:p>4.Campagne</text:p>
          </table:table-cell>
          <table:table-cell office:value-type="string" table:style-name="ce3">
            <text:p><text:s/>6. Considérant qu'il n'est pas établi que la large diffusion, à la veille du premier tour de scrutin, d'un tract émanant d'un 'comité de coordination des mouvements nationaux de Cannes' soit imputable au candidat proclamé élu ; que le contenu de ce tract, pour violent qu'il fût, reprenait des arguments déjà utilisés publiquement au cours de la campagne électorale et qu'il n'a pu de ce fait exercer une influence déterminante sur le sens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2-5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476_annot.xml</text:p>
          </table:table-cell>
          <table:table-cell office:value-type="string" table:style-name="ce3">
            <text:p>4.Campagne</text:p>
          </table:table-cell>
          <table:table-cell office:value-type="string" table:style-name="ce3">
            <text:p><text:s/>7. Considérant que, si de graves excès de propagande ont été commis par voie tant d'affiches que de tracts, il ressort des pièces du dossier qu'ils n'ont pas été le fait du seul candidat proclamé élu ; que, dès lors, ils n'ont pu avoir une influence de nature à changer le sens de la consultation</text:p>
          </table:table-cell>
          <table:table-cell table:number-columns-repeated="16377"/>
        </table:table-row>
        <table:table-row table:style-name="ro1">
          <table:table-cell office:value-type="string" table:style-name="ce3">
            <text:p>Oui</text:p>
          </table:table-cell>
          <table:table-cell office:value-type="string" table:style-name="ce3">
            <text:p>considérants 1-3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479_annot.xml</text:p>
          </table:table-cell>
          <table:table-cell office:value-type="string" table:style-name="ce3">
            <text:p>4.Campagne</text:p>
          </table:table-cell>
          <table:table-cell office:value-type="string" table:style-name="ce3">
            <text:p><text:s/>4. Considérant qu'il ressort des pièces du dossier qu'à partir du 21 juin 1968, un 'Appel du secrétaire du Centre démocrate des Landes' a été diffusé dans la circonscription sous forme de tracts imprimés invitant les électeurs à voter pour M. Mirtin ; que si des exemplaires du tract précité ont été distribués le matin même du scrutin, cette diffusion n'a pu revêtir une ampleur déterminante ; qu'il résulte de la rédaction de cet appel, qu'il n'engageait que son auteur ; que cette prise de position ne saurait être considérée comme une manoeuvre ;</text:p>
          </table:table-cell>
          <table:table-cell table:number-columns-repeated="16377"/>
        </table:table-row>
        <table:table-row table:style-name="ro1">
          <table:table-cell office:value-type="string" table:style-name="ce3">
            <text:p>Oui</text:p>
          </table:table-cell>
          <table:table-cell office:value-type="string" table:style-name="ce3">
            <text:p>considérants 2-4, 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480_annot.xml</text:p>
          </table:table-cell>
          <table:table-cell office:value-type="string" table:style-name="ce3">
            <text:p>7.Opérations</text:p>
          </table:table-cell>
          <table:table-cell office:value-type="string" table:style-name="ce3">
            <text:p><text:s/>5. Considérant que les requérants allèguent que le préfet aurait, le jour du scrutin, signifié au président du bureau de vote de Santa-Réparata-di-Moriani que dix-huit procurations devaient être annulées, alors qu'elles auraient été valables</text:p>
          </table:table-cell>
          <table:table-cell table:number-columns-repeated="16377"/>
        </table:table-row>
        <table:table-row table:style-name="ro1">
          <table:table-cell office:value-type="string" table:style-name="ce3">
            <text:p>Oui</text:p>
          </table:table-cell>
          <table:table-cell office:value-type="string" table:style-name="ce3">
            <text:p>considérants 1-5, 9, 11 et 1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481_annot.xml</text:p>
          </table:table-cell>
          <table:table-cell office:value-type="string" table:style-name="ce3">
            <text:p>4.Campagne</text:p>
          </table:table-cell>
          <table:table-cell office:value-type="string" table:style-name="ce3">
            <text:p><text:s/>7. Considérant que, la distribution de tracts constituant une propagande illicite, le requérant ne saurait se prévaloir de ce que cette diffusion n'ait pu être effectuée ; Sur les griefs tirés de ce que des irrégularités auraient été commises au cours du scrutin ou des opérations de dépouillement</text:p>
          </table:table-cell>
          <table:table-cell table:number-columns-repeated="16377"/>
        </table:table-row>
        <table:table-row table:style-name="ro1">
          <table:table-cell office:value-type="string" table:style-name="ce3">
            <text:p>Oui</text:p>
          </table:table-cell>
          <table:table-cell office:value-type="string" table:style-name="ce3">
            <text:p>considérants 1-5, 9, 11 et 1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481_annot.xml</text:p>
          </table:table-cell>
          <table:table-cell office:value-type="string" table:style-name="ce3">
            <text:p>7.Opérations</text:p>
          </table:table-cell>
          <table:table-cell office:value-type="string" table:style-name="ce3">
            <text:p><text:s/>8. Considérant que, si l'un des représentants du requérant, à la suite d'une contestation sur l'authenticité de son mandat, s'est vu refuser l'accès des locaux du trente-huitième bureau de vote de Fort-de-France, il n'est pas établi, ni même allégué que cette circonstance ait permis, dans ce bureau, des irrégularités ou des fraudes de nature à modifier les résultats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1-5, 9, 11 et 1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481_annot.xml</text:p>
          </table:table-cell>
          <table:table-cell office:value-type="string" table:style-name="ce3">
            <text:p>7.Opérations</text:p>
          </table:table-cell>
          <table:table-cell office:value-type="string" table:style-name="ce3">
            <text:p><text:s/>10. Considérant que, si le requérant soutient que des listes d'émargement auraient été tenues d'une manière irrégulière et qu'à la faveur de cette circonstance des votes frauduleux auraient pu être émis, il n'apporte aucune preuve à l'appui de cette allégation ; que l'indication qu'un vote irrégulier aurait été émis au vingt-sixième bureau ne saurait à elle seule constituer à cet égard un élément suffisant de preuve, alors qu'aucune observation n'a été consignée au procès-verbal, lequel porte la signature de l'assesseur désigné par le requérant, non plus, d'ailleurs, que dans le rapport des témoins administratif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68\rejet\CONSTEXT000017665486_annot.xml</text:p>
          </table:table-cell>
          <table:table-cell office:value-type="string" table:style-name="ce3">
            <text:p>4.Campagne</text:p>
          </table:table-cell>
          <table:table-cell office:value-type="string" table:style-name="ce3">
            <text:p><text:s/>1. Considérant que la veille du premier tour du scrutin, puis entre les deux tours, des tracts et des affiches ont été distribués ou apposées, qui contenaient des attaques dirigées contre le requérant à propos de graves incidents survenus à Carcassonne dans la nuit du 21 au 22 juin 1968, ces tracts et affiches étant formulés en des termes excédant les limites normales de la polémique électora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68\rejet\CONSTEXT000017665486_annot.xml</text:p>
          </table:table-cell>
          <table:table-cell office:value-type="string" table:style-name="ce3">
            <text:p>4.Campagne</text:p>
          </table:table-cell>
          <table:table-cell office:value-type="string" table:style-name="ce3">
            <text:p><text:s/>2. Considérant, toutefois, que la presse locale et régionale avait très largement commenté ces incidents ; que par suite, les irrégularités de propagande, ci-dessus indiquées et imputables à des adversaires politiques du requérant, n'ont pu, dans les circonstances où se sont déroulés les deux tours du scrutin dans la première circonscription de l'Aude, exercer une influence déterminante sur les résultats de la consultation ;</text:p>
          </table:table-cell>
          <table:table-cell table:number-columns-repeated="16377"/>
        </table:table-row>
        <table:table-row table:style-name="ro1">
          <table:table-cell office:value-type="string" table:style-name="ce3">
            <text:p>Oui</text:p>
          </table:table-cell>
          <table:table-cell office:value-type="string" table:style-name="ce3">
            <text:p>considérants 1-4, 6 et 7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488_annot.xml</text:p>
          </table:table-cell>
          <table:table-cell office:value-type="string" table:style-name="ce3">
            <text:p>7.Opérations</text:p>
          </table:table-cell>
          <table:table-cell office:value-type="string" table:style-name="ce3">
            <text:p><text:s/>5. Considérant que les irrégularités et incidents ainsi allégués n'ont, en aucun cas, fait l'objet de réclamations inscrites aux procès-verbaux des opérations électorales, lesquels sauf à Saint-Leu et à Saint-Louis, ont été signés des représentants de tous les candidats, y compris ceux du requérant ; qu'ils ne sont pas davantage mentionnés au procès-verbal de recensement général des votes ; que s'ils sont attestés par des déclarations émanant des délégués du requérant et d'un représentant d'un autre candidat, en ce qui concerne l'un des bureaux de vote de Trois-Bassins, ils sont démentis par des attestations signées des présidents de tous les bureaux de vote intéressés, à l'exception d'un seul, et de certains de leurs assesseurs ; qu'ils ne peuvent donc être tenus pour établis</text:p>
          </table:table-cell>
          <table:table-cell table:number-columns-repeated="16377"/>
        </table:table-row>
        <table:table-row table:style-name="ro1">
          <table:table-cell office:value-type="string" table:style-name="ce3">
            <text:p>Oui</text:p>
          </table:table-cell>
          <table:table-cell office:value-type="string" table:style-name="ce3">
            <text:p>considérants 2, 3, 5, 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489_annot.xml</text:p>
          </table:table-cell>
          <table:table-cell office:value-type="string" table:style-name="ce3">
            <text:p>7.Opérations</text:p>
          </table:table-cell>
          <table:table-cell office:value-type="string" table:style-name="ce3">
            <text:p><text:s/>4. Considérant qu'il ne ressort pas des pièces versées au dossier que des électeurs aient émis plusieurs votes à la suite de la distribution irrégulière ou erronée de cartes électorales</text:p>
          </table:table-cell>
          <table:table-cell table:number-columns-repeated="16377"/>
        </table:table-row>
        <table:table-row table:style-name="ro1">
          <table:table-cell office:value-type="string" table:style-name="ce3">
            <text:p>Oui</text:p>
          </table:table-cell>
          <table:table-cell office:value-type="string" table:style-name="ce3">
            <text:p>considérant 4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490_annot.xml</text:p>
          </table:table-cell>
          <table:table-cell office:value-type="string" table:style-name="ce3">
            <text:p>4.Campagne</text:p>
          </table:table-cell>
          <table:table-cell office:value-type="string" table:style-name="ce3">
            <text:p><text:s/>1. Considérant qu'il est constant qu'entre les deux tours de scrutin, M. Nègre, député sortant, candidat au premier tour, a remis à deux quotidiens un communiqué par lequel il annonçait son retrait de la compétition électorale ; que ce communiqué n'ayant pas été inséré en entier dans ces quotidiens, M. Nègre a fait diffuser, le 28 juin 1968, un tract ronéotypé reprenant les passages de son texte qui n'avaient pas été publiés dans la presse et contenant en outre, certaines recommandations sur l'attitude que les électeurs ayant voté en sa faveur pourraient adopter au second tour</text:p>
          </table:table-cell>
          <table:table-cell table:number-columns-repeated="16377"/>
        </table:table-row>
        <table:table-row table:style-name="ro1">
          <table:table-cell office:value-type="string" table:style-name="ce3">
            <text:p>Oui</text:p>
          </table:table-cell>
          <table:table-cell office:value-type="string" table:style-name="ce3">
            <text:p>considérant 4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490_annot.xml</text:p>
          </table:table-cell>
          <table:table-cell office:value-type="string" table:style-name="ce3">
            <text:p>4.Campagne</text:p>
          </table:table-cell>
          <table:table-cell office:value-type="string" table:style-name="ce3">
            <text:p><text:s/>2. Considérant que le requérant soutient qu'il n'aurait eu connaissance de ce tract que par la lecture de la presse locale parue la veille du scrutin et, par suite, aurait été dans l'impossibilité d'y répondre avant la clôture de la campagne électorale ;</text:p>
          </table:table-cell>
          <table:table-cell table:number-columns-repeated="16377"/>
        </table:table-row>
        <table:table-row table:style-name="ro1">
          <table:table-cell office:value-type="string" table:style-name="ce3">
            <text:p>Oui</text:p>
          </table:table-cell>
          <table:table-cell office:value-type="string" table:style-name="ce3">
            <text:p>considérant 4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490_annot.xml</text:p>
          </table:table-cell>
          <table:table-cell office:value-type="string" table:style-name="ce3">
            <text:p>4.Campagne</text:p>
          </table:table-cell>
          <table:table-cell office:value-type="string" table:style-name="ce3">
            <text:p><text:s/>3. Mais considérant que la diffusion dudit tract est intervenue plus de vingt-quatre heures avant la clôture de la campagne ; qu'un autre candidat qui s'était désisté, y a d'ailleurs répondu ; que, dès lors, le grief est sans portée</text:p>
          </table:table-cell>
          <table:table-cell table:number-columns-repeated="16377"/>
        </table:table-row>
        <table:table-row table:style-name="ro1">
          <table:table-cell office:value-type="string" table:style-name="ce3">
            <text:p>Oui</text:p>
          </table:table-cell>
          <table:table-cell office:value-type="string" table:style-name="ce3">
            <text:p>considérants 1, 3-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11_annot.xml</text:p>
          </table:table-cell>
          <table:table-cell office:value-type="string" table:style-name="ce3">
            <text:p>7.Opérations</text:p>
          </table:table-cell>
          <table:table-cell office:value-type="string" table:style-name="ce3">
            <text:p><text:s/>2. Considérant qu'il n'est pas contesté que dans les bureaux de vote des communes des Salles-du-Gardon et de Saint-Jean-de-Valériscle, ainsi que dans un bureau de la commune d'Alès, le vote des électeurs n'a pas été constaté sur les listes d'émargement par le paraphe d'un membre du bureau, mais seulement par une croix apposée en face du nom de chaque votant ; que ce procédé est contraire aux dispositions de l'article R. 61 du Code électoral et, par suite, irrégulier, mais que, sauf en ce qui concerne le premier bureau de la commune des Salles-du-Gardon, les procès-verbaux ne mentionnent et le requérant n'allègue aucune tentative ni aucun fait précis de fraude commis à la faveur de cette irrégularité ; que la circonstance que, dans les bureaux en cause, le nombre des votants a été relativement élevé et la majorité recueillie par M. Roucaute importante, ne saurait, à elle seule, faire présumer l'existence de manoeuvres frauduleuses</text:p>
          </table:table-cell>
          <table:table-cell table:number-columns-repeated="16377"/>
        </table:table-row>
        <table:table-row table:style-name="ro1">
          <table:table-cell office:value-type="string" table:style-name="ce3">
            <text:p>Oui</text:p>
          </table:table-cell>
          <table:table-cell office:value-type="string" table:style-name="ce3">
            <text:p>considérants 2-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12_annot.xml</text:p>
          </table:table-cell>
          <table:table-cell office:value-type="string" table:style-name="ce3">
            <text:p>4.Campagne</text:p>
          </table:table-cell>
          <table:table-cell office:value-type="string" table:style-name="ce3">
            <text:p><text:s/>1. Considérant que, si M. Beylot a laissé apposer, au soutien de sa candidature, des affiches comprenant une combinaison des couleurs bleu, blanc et rouge, cette irrégularité, particulièrement regrettable, n'a pu, en l'espèce, être de nature à conférer un caractère officiel à la candidature de M. Beylot</text:p>
          </table:table-cell>
          <table:table-cell table:number-columns-repeated="16377"/>
        </table:table-row>
        <table:table-row table:style-name="ro1">
          <table:table-cell office:value-type="string" table:style-name="ce3">
            <text:p>Oui</text:p>
          </table:table-cell>
          <table:table-cell office:value-type="string" table:style-name="ce3">
            <text:p>considérants 1-3, 5 et 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13_annot.xml</text:p>
          </table:table-cell>
          <table:table-cell office:value-type="string" table:style-name="ce3">
            <text:p>4.Campagne</text:p>
          </table:table-cell>
          <table:table-cell office:value-type="string" table:style-name="ce3">
            <text:p><text:s/>4. Considérant, enfin, que la publicité faite dans divers journaux autour d'un livre publié par le candidat élu député ne saurait être regardée comme une manifestation irrégulière de propagande ; Sur les griefs relatifs aux opérations électorales</text:p>
          </table:table-cell>
          <table:table-cell table:number-columns-repeated="16377"/>
        </table:table-row>
        <table:table-row table:style-name="ro1">
          <table:table-cell office:value-type="string" table:style-name="ce3">
            <text:p>Oui</text:p>
          </table:table-cell>
          <table:table-cell office:value-type="string" table:style-name="ce3">
            <text:p>considérants 1-4, 11 et 1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14_annot.xml</text:p>
          </table:table-cell>
          <table:table-cell office:value-type="string" table:style-name="ce3">
            <text:p>7.Opérations</text:p>
          </table:table-cell>
          <table:table-cell office:value-type="string" table:style-name="ce3">
            <text:p><text:s/>5. Considérant qu'il résulte des pièces du dossier que le vote par correspondance de M. Pommerie est parvenu en temps utile au dixième bureau de vote de Villeurbanne</text:p>
          </table:table-cell>
          <table:table-cell table:number-columns-repeated="16377"/>
        </table:table-row>
        <table:table-row table:style-name="ro1">
          <table:table-cell office:value-type="string" table:style-name="ce3">
            <text:p>Oui</text:p>
          </table:table-cell>
          <table:table-cell office:value-type="string" table:style-name="ce3">
            <text:p>considérants 1-4, 11 et 1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14_annot.xml</text:p>
          </table:table-cell>
          <table:table-cell office:value-type="string" table:style-name="ce3">
            <text:p>7.Opérations</text:p>
          </table:table-cell>
          <table:table-cell office:value-type="string" table:style-name="ce3">
            <text:p><text:s/>6. Considérant qu'il résulte de l'instruction que l'on ne peut pas établir que deux électeurs de Vaulx-en-Velin aient été absents le jour du scrutin et n'aient pas pris part au vote</text:p>
          </table:table-cell>
          <table:table-cell table:number-columns-repeated="16377"/>
        </table:table-row>
        <table:table-row table:style-name="ro1">
          <table:table-cell office:value-type="string" table:style-name="ce3">
            <text:p>Oui</text:p>
          </table:table-cell>
          <table:table-cell office:value-type="string" table:style-name="ce3">
            <text:p>considérants 1-4, 11 et 1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14_annot.xml</text:p>
          </table:table-cell>
          <table:table-cell office:value-type="string" table:style-name="ce3">
            <text:p>7.Opérations</text:p>
          </table:table-cell>
          <table:table-cell office:value-type="string" table:style-name="ce3">
            <text:p><text:s/>7. Considérant qu'il n'est pas établi que des irrégularités aient été commises dans la désignation des scrutateurs lors du dépouillement du scrutin du bureau de vote numéro quarante de Villeurbanne et du bureau de vote numéro huit de Vénissieux</text:p>
          </table:table-cell>
          <table:table-cell table:number-columns-repeated="16377"/>
        </table:table-row>
        <table:table-row table:style-name="ro1">
          <table:table-cell office:value-type="string" table:style-name="ce3">
            <text:p>Oui</text:p>
          </table:table-cell>
          <table:table-cell office:value-type="string" table:style-name="ce3">
            <text:p>considérants 1-4, 11 et 1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14_annot.xml</text:p>
          </table:table-cell>
          <table:table-cell office:value-type="string" table:style-name="ce3">
            <text:p>7.Opérations</text:p>
          </table:table-cell>
          <table:table-cell office:value-type="string" table:style-name="ce3">
            <text:p><text:s/>8. Considérant que si le requérant allègue qu'au bureau de vote numéro cinq de Vénissieux le nombre des votants a été porté au procès-verbal sans vérification préalable des émargements, résulte de l'instruction que les mentions du procès-verbal coïncident sur ce point avec celles des listes d'émargement</text:p>
          </table:table-cell>
          <table:table-cell table:number-columns-repeated="16377"/>
        </table:table-row>
        <table:table-row table:style-name="ro1">
          <table:table-cell office:value-type="string" table:style-name="ce3">
            <text:p>Oui</text:p>
          </table:table-cell>
          <table:table-cell office:value-type="string" table:style-name="ce3">
            <text:p>considérants 1-4, 11 et 1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14_annot.xml</text:p>
          </table:table-cell>
          <table:table-cell office:value-type="string" table:style-name="ce3">
            <text:p>7.Opérations</text:p>
          </table:table-cell>
          <table:table-cell office:value-type="string" table:style-name="ce3">
            <text:p><text:s/>9. Considérant qu'il n'est pas établi que des bulletins au nom de M. Garnier aient été annulés à tort</text:p>
          </table:table-cell>
          <table:table-cell table:number-columns-repeated="16377"/>
        </table:table-row>
        <table:table-row table:style-name="ro1">
          <table:table-cell office:value-type="string" table:style-name="ce3">
            <text:p>Oui</text:p>
          </table:table-cell>
          <table:table-cell office:value-type="string" table:style-name="ce3">
            <text:p>considérants 1-4, 11 et 1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14_annot.xml</text:p>
          </table:table-cell>
          <table:table-cell office:value-type="string" table:style-name="ce3">
            <text:p>7.Opérations</text:p>
          </table:table-cell>
          <table:table-cell office:value-type="string" table:style-name="ce3">
            <text:p><text:s/>10. Considérant que si, au bureau de vote numéro quarante de Villeurbanne, les scrutateurs ont été invités à parapher seulement les enveloppes correspondant à trente suffrages considérés comme nuls, il résulte des pièces du dossier que les suffrages en cause ont été annulés pour le motif que les enveloppes ne contenaient pas de bulletin ; qu'ainsi, aucune méconnaissance des prescriptions du Code électoral ne saurait, en l'espèce, être invoquée</text:p>
          </table:table-cell>
          <table:table-cell table:number-columns-repeated="16377"/>
        </table:table-row>
        <table:table-row table:style-name="ro1">
          <table:table-cell office:value-type="string" table:style-name="ce3">
            <text:p>Oui</text:p>
          </table:table-cell>
          <table:table-cell office:value-type="string" table:style-name="ce3">
            <text:p>considérants 2, 3, 5-16, 1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15_annot.xml</text:p>
          </table:table-cell>
          <table:table-cell office:value-type="string" table:style-name="ce3">
            <text:p>7.Opérations</text:p>
          </table:table-cell>
          <table:table-cell office:value-type="string" table:style-name="ce3">
            <text:p><text:s/>4. Considérant que les requérants soutiennent que le scrutin aurait été clos dans la commune d'Espinousse à 18 h 30 ; qu'il résulte des énonciations du procès-verbal des opérations électorales dans cette commune, qui ne comporte aucune observation, que le scrutin y a été clos à 18 heures ; que, dès lors, la réalité du grief invoqué, qui n'est assorti d'aucun commencement de preuve, ne saurait être regardée comme établie ; Sur les griefs relatifs aux isoloirs</text:p>
          </table:table-cell>
          <table:table-cell table:number-columns-repeated="16377"/>
        </table:table-row>
        <table:table-row table:style-name="ro1">
          <table:table-cell office:value-type="string" table:style-name="ce3">
            <text:p>Oui</text:p>
          </table:table-cell>
          <table:table-cell office:value-type="string" table:style-name="ce3">
            <text:p>considérants 2, 3, 5-16, 1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15_annot.xml</text:p>
          </table:table-cell>
          <table:table-cell office:value-type="string" table:style-name="ce3">
            <text:p>7.Opérations</text:p>
          </table:table-cell>
          <table:table-cell office:value-type="string" table:style-name="ce3">
            <text:p><text:s/>17. Considérant qu'aucune disposition législative ou réglementaire n'impose l'obligation d'annexer au procès-verbal des opérations électorales les enveloppes vides trouvées dans l'urne</text:p>
          </table:table-cell>
          <table:table-cell table:number-columns-repeated="16377"/>
        </table:table-row>
        <table:table-row table:style-name="ro1">
          <table:table-cell office:value-type="string" table:style-name="ce3">
            <text:p>Oui</text:p>
          </table:table-cell>
          <table:table-cell office:value-type="string" table:style-name="ce3">
            <text:p>considérants 1-5, 7, 10, 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16_annot.xml</text:p>
          </table:table-cell>
          <table:table-cell office:value-type="string" table:style-name="ce3">
            <text:p>7.Opérations</text:p>
          </table:table-cell>
          <table:table-cell office:value-type="string" table:style-name="ce3">
            <text:p><text:s/>6. Considérant que si le requérant soutient qu'un vote par correspondance admis par le bureau de Pompignan n'aurait pas été adressé à ce bureau sous pli recommandé, ainsi que le prescrit l'article R. 87 du Code électoral, il n'indique pas le nom de l'électeur dont le suffrage est contesté ; que le moyen ne saurait dès lors être accueilli ; En ce qui concerne la régularité des opérations de vote et des opérations de dépouillement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1-5, 7, 10, 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16_annot.xml</text:p>
          </table:table-cell>
          <table:table-cell office:value-type="string" table:style-name="ce3">
            <text:p>7.Opérations</text:p>
          </table:table-cell>
          <table:table-cell office:value-type="string" table:style-name="ce3">
            <text:p><text:s/>8. Considérant que le moyen tiré de ce que la feuille de dépouillement des votes du bureau de Brignon ne serait pas jointe au procès-verbal des opérations électorales de cette commune manque en fait</text:p>
          </table:table-cell>
          <table:table-cell table:number-columns-repeated="16377"/>
        </table:table-row>
        <table:table-row table:style-name="ro1">
          <table:table-cell office:value-type="string" table:style-name="ce3">
            <text:p>Oui</text:p>
          </table:table-cell>
          <table:table-cell office:value-type="string" table:style-name="ce3">
            <text:p>considérants 1-5, 7, 10, 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16_annot.xml</text:p>
          </table:table-cell>
          <table:table-cell office:value-type="string" table:style-name="ce3">
            <text:p>7.Opérations</text:p>
          </table:table-cell>
          <table:table-cell office:value-type="string" table:style-name="ce3">
            <text:p><text:s/>9. Considérant qu'en vertu de l'article L. 66 du Code électoral les bulletins blancs et nuls ainsi que les enveloppes vides doivent être annexés au procès-verbal et contresignés par les membres du bureau de vote et qu'au cas où l'annexion de ce document ne serait pas faite, cette circonstance n'entraîne l'annulation des opérations électorales qu'autant qu'il est établi qu'elle a eu pour but et pour conséquence de porter atteinte à la sincérité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1-5, 7, 10, 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16_annot.xml</text:p>
          </table:table-cell>
          <table:table-cell office:value-type="string" table:style-name="ce3">
            <text:p>7.Opérations</text:p>
          </table:table-cell>
          <table:table-cell office:value-type="string" table:style-name="ce3">
            <text:p><text:s/>12. Considérant qu'un bulletin déchiré portant le nom de M. Jalu a été compté comme valable par le bureau de vote de la commune de Montardier bien que la validité de ce vote ait fait l'objet d'une réserve mentionnée au procès-verbal ; qu'il résulte de l'examen du bulletin litigieux, régulièrement annexé au procès-verbal et paraphé par le président et les assesseurs, que ce bulletin porte une déchirure irrégulière susceptible de constituer un signe de reconnaissance ; que ce vote doit être tenu pour nul et une voix défalquée tant du nombre des suffrages valablement exprimés qui se trouve ainsi ramené à 37 430, que du nombre des voix obtenues par M. Jalu qui passe de 18 723 à 18 722</text:p>
          </table:table-cell>
          <table:table-cell table:number-columns-repeated="16377"/>
        </table:table-row>
        <table:table-row table:style-name="ro1">
          <table:table-cell office:value-type="string" table:style-name="ce3">
            <text:p>Oui</text:p>
          </table:table-cell>
          <table:table-cell office:value-type="string" table:style-name="ce3">
            <text:p>considérants 1-5, 7, 10, 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16_annot.xml</text:p>
          </table:table-cell>
          <table:table-cell office:value-type="string" table:style-name="ce3">
            <text:p>7.Opérations</text:p>
          </table:table-cell>
          <table:table-cell office:value-type="string" table:style-name="ce3">
            <text:p><text:s/>13. Considérant, en revanche, que si l'une des enveloppes annexées au procès-verbal du bureau d'Arre et comptée dans ce procès-verbal comme suffrage nul au motif que l'enveloppe contient plusieurs bulletins en faveur de candidats différents, ne contient qu'un seul bulletin régulier au nom de M. Millet, le procès-verbal ne porte parmi les observations aucune réserve à ce sujet et le bulletin restant est paraphé par le président et les assesseurs du bureau de vote ; que, dans ces circonstances, les mentions du procès-verbal ne peuvent être tenues pour inexactes ; que le requérant n'est dès lors pas fondé à réclamer le bénéfice d'une voix supplémentaire</text:p>
          </table:table-cell>
          <table:table-cell table:number-columns-repeated="16377"/>
        </table:table-row>
        <table:table-row table:style-name="ro1">
          <table:table-cell office:value-type="string" table:style-name="ce3">
            <text:p>Oui</text:p>
          </table:table-cell>
          <table:table-cell office:value-type="string" table:style-name="ce3">
            <text:p>considérants 1, 2, 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19_annot.xml</text:p>
          </table:table-cell>
          <table:table-cell office:value-type="string" table:style-name="ce3">
            <text:p>4.Campagne</text:p>
          </table:table-cell>
          <table:table-cell office:value-type="string" table:style-name="ce3">
            <text:p><text:s/>3. Considérant que, si un tract a été diffusé la veille du scrutin par le parti communiste, cette diffusion irrégulière ne peut être regardée comme ayant exercé sur les opérations électorales une influence suffisante pour en modifier le résultat</text:p>
          </table:table-cell>
          <table:table-cell table:number-columns-repeated="16377"/>
        </table:table-row>
        <table:table-row table:style-name="ro1">
          <table:table-cell office:value-type="string" table:style-name="ce3">
            <text:p>Oui</text:p>
          </table:table-cell>
          <table:table-cell office:value-type="string" table:style-name="ce3">
            <text:p>considérants 1, 2 et 5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20_annot.xml</text:p>
          </table:table-cell>
          <table:table-cell office:value-type="string" table:style-name="ce3">
            <text:p>7.Opérations</text:p>
          </table:table-cell>
          <table:table-cell office:value-type="string" table:style-name="ce3">
            <text:p><text:s/>4. Considérant que, si le requérant prétend que dans le 8e bureau de vote de La Ciotat les électeurs ont été admis à voter jusqu'à 11 h 30 sans que soit exigée d'eux, en sus de leur carte d'électeur, la production d'un titre d'identité, ainsi que le prescrit l'article R. 60 du Code électoral, il n'est pas établi ni même allégué que ces faits aient permis l'existence de fraudes de nature à altérer la sincérité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1, 2 et 5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20_annot.xml</text:p>
          </table:table-cell>
          <table:table-cell office:value-type="string" table:style-name="ce3">
            <text:p>7.Opérations</text:p>
          </table:table-cell>
          <table:table-cell office:value-type="string" table:style-name="ce3">
            <text:p><text:s/>6. Considérant enfin que si le requérant soutient que des surcharges auraient été apportées à de nombreux procès-verbaux, il résulte de l'examen des procès-verbaux que lesdites surcharges ne sont révélatrices d'aucune fraude</text:p>
          </table:table-cell>
          <table:table-cell table:number-columns-repeated="16377"/>
        </table:table-row>
        <table:table-row table:style-name="ro1">
          <table:table-cell office:value-type="string" table:style-name="ce3">
            <text:p>Oui</text:p>
          </table:table-cell>
          <table:table-cell office:value-type="string" table:style-name="ce3">
            <text:p>considérants 1, 2 et 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21_annot.xml</text:p>
          </table:table-cell>
          <table:table-cell office:value-type="string" table:style-name="ce3">
            <text:p>4.Campagne</text:p>
          </table:table-cell>
          <table:table-cell office:value-type="string" table:style-name="ce3">
            <text:p><text:s/>3. Considérant, en troisième lieu, que, si les affiches présentées comme émanant d'un groupe de dirigeants du centre démocrate de la circonscription et favorables à M. Pierre Cot ont été, à la veille du second tour, altérées par l'apposition systématique d'affiches formant bandeaux et invitant les électeurs centristes à voter pour M. Modiano, cette irrégularité, pour blâmable qu'elle soit, n'a pas été par elle-même, et notamment en raison de la différence de teinte des affiches, de nature à induire en erreur lesdits électeurs</text:p>
          </table:table-cell>
          <table:table-cell table:number-columns-repeated="16377"/>
        </table:table-row>
        <table:table-row table:style-name="ro1">
          <table:table-cell office:value-type="string" table:style-name="ce3">
            <text:p>Oui</text:p>
          </table:table-cell>
          <table:table-cell office:value-type="string" table:style-name="ce3">
            <text:p>considérants 1, 2 et 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21_annot.xml</text:p>
          </table:table-cell>
          <table:table-cell office:value-type="string" table:style-name="ce3">
            <text:p>4.Campagne</text:p>
          </table:table-cell>
          <table:table-cell office:value-type="string" table:style-name="ce3">
            <text:p><text:s/>5. Considérant qu'il résulte des pièces du dossier que la diffusion de ces tracts n'a pas, dans les circonstances de l'espèce, constitué une manoeuvre de nature à abuser les électeurs, dès lors que lesdits tracts ne faisaient que reprendre un appel largement diffusé sur des affiches qui mentionnaient explicitement les prénoms de ses auteurs dont les deux premières lettres figuraient d'ailleurs clairement à la fin dudit tract ; qu'au surplus, des affiches de protestation contre ces tracts et rappelant la position de M. Pierre de Chambrun ont pu être diffusées en temps utile ; que, dès lors, le moyen doit être écarté</text:p>
          </table:table-cell>
          <table:table-cell table:number-columns-repeated="16377"/>
        </table:table-row>
        <table:table-row table:style-name="ro1">
          <table:table-cell office:value-type="string" table:style-name="ce3">
            <text:p>Oui</text:p>
          </table:table-cell>
          <table:table-cell office:value-type="string" table:style-name="ce3">
            <text:p>considérants (2), 3-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22_annot.xml</text:p>
          </table:table-cell>
          <table:table-cell office:value-type="string" table:style-name="ce3">
            <text:p>4.Campagne</text:p>
          </table:table-cell>
          <table:table-cell office:value-type="string" table:style-name="ce3">
            <text:p><text:s/>1. Considérant que le requérant allègue, en premier lieu, que des affiches de propagande électorale en faveur d'une personne dont la candidature n'avait pas été admise par le préfet ont été apposées sur les panneaux officiels dans les jours qui ont précédé le premier tour de scrutin</text:p>
          </table:table-cell>
          <table:table-cell table:number-columns-repeated="16377"/>
        </table:table-row>
        <table:table-row table:style-name="ro1">
          <table:table-cell office:value-type="string" table:style-name="ce3">
            <text:p>Oui</text:p>
          </table:table-cell>
          <table:table-cell office:value-type="string" table:style-name="ce3">
            <text:p>considérant 2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23_annot.xml</text:p>
          </table:table-cell>
          <table:table-cell office:value-type="string" table:style-name="ce3">
            <text:p>7.Opérations</text:p>
          </table:table-cell>
          <table:table-cell office:value-type="string" table:style-name="ce3">
            <text:p><text:s/>3. Considérant que si les requérants soutiennent que l'urne du bureau de vote de Buxières-les-Mines n'était pas cadenassée, que les malades de l'hôpital de Gannat n'ont pas voté dans des conditions respectant l'anonymat du vote et que des électeurs de la commune de Tronget, dont le nombre n'est pas précisé, se sont abstenus de passer par l'isoloir, ces allégations ne sont appuyées d'aucun commencement de preuve ; qu'ainsi les trois griefs sus-analyses ne sont pas établis;</text:p>
          </table:table-cell>
          <table:table-cell table:number-columns-repeated="16377"/>
        </table:table-row>
        <table:table-row table:style-name="ro1">
          <table:table-cell office:value-type="string" table:style-name="ce3">
            <text:p>Oui</text:p>
          </table:table-cell>
          <table:table-cell office:value-type="string" table:style-name="ce3">
            <text:p>considérants 2, 5-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25_annot.xml</text:p>
          </table:table-cell>
          <table:table-cell office:value-type="string" table:style-name="ce3">
            <text:p>4.Campagne</text:p>
          </table:table-cell>
          <table:table-cell office:value-type="string" table:style-name="ce3">
            <text:p><text:s/>1. Considérant que les requérants n'établissent pas qu'un véhicule couvert de panneaux 'votez Didier' ait circulé le jour du scrutin à Aspremont et à Aspres-sur-Buech ; Sur les moyens tirés d'irrégularités dans le déroulement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2, 5-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25_annot.xml</text:p>
          </table:table-cell>
          <table:table-cell office:value-type="string" table:style-name="ce3">
            <text:p>7.Opérations</text:p>
          </table:table-cell>
          <table:table-cell office:value-type="string" table:style-name="ce3">
            <text:p><text:s/>3. Considérant, en second lieu que, si à plusieurs reprises, certains membres du bureau de vote de la commune de Chabestan se sont absentés de la salle de vote, il n'est pas établi que cette irrégularité ait eu pour but ni pour effet de fausser la sincérité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2, 5-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25_annot.xml</text:p>
          </table:table-cell>
          <table:table-cell office:value-type="string" table:style-name="ce3">
            <text:p>7.Opérations</text:p>
          </table:table-cell>
          <table:table-cell office:value-type="string" table:style-name="ce3">
            <text:p><text:s/>4. Considérant, enfin, que les requérants invoquent diverses irrégularités qui auraient entaché le déroulement du scrutin dans les bureaux de vote de la commune de Gap ; mais que, d'une part, il ne résulte pas des pièces du dossier qu'un sourd-muet ait été empêché d'accomplir son devoir électoral le 30 juin ; que, d'autre part, si l'article L. 62 du Code électoral dispose que dans chaque bureau de vote il y a un isoloir pour trois cents électeurs inscrits ou par fraction, et s'il est constant que les isoloirs installés dans les différents bureaux de vote de Gap ne répondaient pas à ces prescriptions, il ne ressort d'aucune des pièces du dossier que cette circonstance ait eu pour conséquence d'empêcher des électeurs de voter ou de les obliger à voter sans faire usage desdits isoloirs ; qu'enfin, en admettant même que les bulletins de vote aient été uniquement déposés dans les isoloirs, il ne résulte pas de l'instruction que cette circonstance ait été de nature à fausser les résultats du scrutin ; qu'il n'est pas établi, notamment, que des électeurs aient été empêchés de voter en faveur de M. Arrighi de Casanova, faute de bulletins au nom de celui-ci ; que, par ailleurs, il résulte de l'examen des bulletins annulés que dans l'ensemble des bureaux de vote de la commune de Gap, un seul bulletin au nom de M. Arrighi de Casanova a été annulé, parce qu'il était déchiré ; que les requérants n'établissent pas que ledit bulletin ait été frauduleusement déchiré dans l'isoloir ni qu'un électeur ait été ainsi amené, malgré lui, à émettre un suffrage nul ; Sur les moyens tirés d'irrégularités dans les opérations de dépouillement et de décompte des bulletins</text:p>
          </table:table-cell>
          <table:table-cell table:number-columns-repeated="16377"/>
        </table:table-row>
        <table:table-row table:style-name="ro1">
          <table:table-cell office:value-type="string" table:style-name="ce3">
            <text:p>Oui</text:p>
          </table:table-cell>
          <table:table-cell office:value-type="string" table:style-name="ce3">
            <text:p>considérants 2, 5-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25_annot.xml</text:p>
          </table:table-cell>
          <table:table-cell office:value-type="string" table:style-name="ce3">
            <text:p>7.Opérations</text:p>
          </table:table-cell>
          <table:table-cell office:value-type="string" table:style-name="ce3">
            <text:p><text:s/>9. Considérant, d'autre part, que s'il est constant que le procès-verbal des élections de la ville de Gap n'a été transmis que le lendemain de l'élection à dix heures, alors que la commission de recensement siégeait depuis 9 heures, il n'est pas établi que ce retard, pour irrégulier qu'il soit, ait été à l'origine de manoeuvres frauduleuses ; que, notamment, il ne résulte pas des pièces du dossier que des bulletins au nom de M. Arrighi de Casanova aient été, pendant la nuit du 30 juin 1968, raturés ; qu'enfin, si les requérants allèguent qu'un bulletin en faveur de M. Arrighi de Casanova, annulé pour déchirure le 30 juin au soir, portait en outre le lendemain des traits de crayon, ils ne contestent pas que ledit bulletin ait été annulé à bon droit lors des opérations de dépouillement</text:p>
          </table:table-cell>
          <table:table-cell table:number-columns-repeated="16377"/>
        </table:table-row>
        <table:table-row table:style-name="ro1">
          <table:table-cell office:value-type="string" table:style-name="ce3">
            <text:p>Oui</text:p>
          </table:table-cell>
          <table:table-cell office:value-type="string" table:style-name="ce3">
            <text:p>considérants 2, 5-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25_annot.xml</text:p>
          </table:table-cell>
          <table:table-cell office:value-type="string" table:style-name="ce3">
            <text:p>7.Opérations</text:p>
          </table:table-cell>
          <table:table-cell office:value-type="string" table:style-name="ce3">
            <text:p><text:s/>10. Considérant, par ailleurs, que deux bulletins au nom de M. Arrighi de Casanova, qui avaient été déclarés nuls par le bureau de vote de la commune d'Orpierre, au motif qu'ils comportaient un signe de reconnaissance, sous la forme de papillons annexés auxdits bulletins, ont été déclarés réguliers par la commission, par le motif que les signes de reconnaissance n'apparaissaient pas sur les bulletins ; qu'il résulte de l'instruction que ces papillons se trouvaient à l'intérieur de l'enveloppe électorale et portaient aussi atteinte au secret du vote ; que, dans ces conditions, il y a lieu d'annuler lesdits bulletins</text:p>
          </table:table-cell>
          <table:table-cell table:number-columns-repeated="16377"/>
        </table:table-row>
        <table:table-row table:style-name="ro1">
          <table:table-cell office:value-type="string" table:style-name="ce3">
            <text:p>Oui</text:p>
          </table:table-cell>
          <table:table-cell office:value-type="string" table:style-name="ce3">
            <text:p>considérants 1-4, 6 et 7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27_annot.xml</text:p>
          </table:table-cell>
          <table:table-cell office:value-type="string" table:style-name="ce3">
            <text:p>7.Opérations</text:p>
          </table:table-cell>
          <table:table-cell office:value-type="string" table:style-name="ce3">
            <text:p><text:s/>5. Considérant, enfin que, si le procès-verbal de la commission de recensement mentionne l'impossibilité où s'est trouvée la commission de contrôler un certain nombre de votes comptés nuls, ce fait résulte soit d'erreurs de ventilation entre votes blancs et votes nuls soit d'un défaut de signature des pièces annexées ; que ces irrégularités ont été commises dans des bureaux où le requérant était représenté et ne peuvent, dès lors, avoir donné lieu à des fraudes ; Sur le moyen tiré d'irrégularités diverses dans la propagande électora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68\rejet\CONSTEXT000017665528_annot.xml</text:p>
          </table:table-cell>
          <table:table-cell office:value-type="string" table:style-name="ce3">
            <text:p>7.Opérations</text:p>
          </table:table-cell>
          <table:table-cell office:value-type="string" table:style-name="ce3">
            <text:p><text:s/>1. Considérant que, pour demander l'annulation des opérations électorales aux quelles il a été procédé les 23 et 30 juin 1968 dans la septième circonscription du département des Bouches-du-Rhône, le requérant soutient que des irrégularités auraient été commises et, notamment, qu'à l'occasion du second tour de scrutin, les votes dans les bureaux n° 42, 46, 47, 64, 66, 67, 68 et 75 auraient été entachés de fraude</text:p>
          </table:table-cell>
          <table:table-cell table:number-columns-repeated="16377"/>
        </table:table-row>
        <table:table-row table:style-name="ro1">
          <table:table-cell office:value-type="string" table:style-name="ce3">
            <text:p>Oui</text:p>
          </table:table-cell>
          <table:table-cell office:value-type="string" table:style-name="ce3">
            <text:p>considérants 1 et 3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29_annot.xml</text:p>
          </table:table-cell>
          <table:table-cell office:value-type="string" table:style-name="ce3">
            <text:p>4.Campagne</text:p>
          </table:table-cell>
          <table:table-cell office:value-type="string" table:style-name="ce3">
            <text:p><text:s/>2. Considérant, d'une part, qu'il résulte des pièces du dossier que, dès le premier tour, M. Baudis n'a pas caché aux électeurs qu'il se présentait sous une double étiquette ; que, notamment, sa profession de foi portait en tête : 'Républicain indépendant de progrès ', 'Union pour la défense de la République ' ; que, d'ailleurs, aucune disposition législative ou réglementaire n'oblige les candidats à faire figurer sur leurs bulletins de vote une mention relative à leur affiliation politique ; que, dès lors, le moyen invoqué ne saurait être retenu</text:p>
          </table:table-cell>
          <table:table-cell table:number-columns-repeated="16377"/>
        </table:table-row>
        <table:table-row table:style-name="ro1">
          <table:table-cell office:value-type="string" table:style-name="ce3">
            <text:p>Non</text:p>
          </table:table-cell>
          <table:table-cell office:value-type="string" table:style-name="ce3">
            <text:p>considérants 1 et 3 ne sont pas annotés</text:p>
          </table:table-cell>
          <table:table-cell office:value-type="string" table:style-name="ce3">
            <text:p>ne devrait pas être annoté (Synthèse des griefs)</text:p>
          </table:table-cell>
          <table:table-cell table:style-name="ce3"/>
          <table:table-cell office:value-type="string" table:style-name="ce3">
            <text:p>file:\\\P:\CRJ\RECHERCHE\PROJET_JADE\JADE_COMMUN\Annotation\Annotation_automatique_Maritaud\Technologie_light\Super-catégories-objets_0,8\AN\1968\rejet\CONSTEXT000017665529_annot.xml</text:p>
          </table:table-cell>
          <table:table-cell office:value-type="string" table:style-name="ce3">
            <text:p>4.Campagne</text:p>
          </table:table-cell>
          <table:table-cell office:value-type="string" table:style-name="ce3">
            <text:p><text:s/>4. Considérant qu'il résulte de tout ce qui précède que le requérant n'est pas fondé à soutenir que les résultats du premier tour ont été viciés</text:p>
          </table:table-cell>
          <table:table-cell table:number-columns-repeated="16377"/>
        </table:table-row>
        <table:table-row table:style-name="ro1">
          <table:table-cell office:value-type="string" table:style-name="ce3">
            <text:p>Oui</text:p>
          </table:table-cell>
          <table:table-cell office:value-type="string" table:style-name="ce3">
            <text:p>considérants 1 et 3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29_annot.xml</text:p>
          </table:table-cell>
          <table:table-cell office:value-type="string" table:style-name="ce3">
            <text:p>4.Campagne</text:p>
          </table:table-cell>
          <table:table-cell office:value-type="string" table:style-name="ce3">
            <text:p><text:s/>5. Considérant que si, dans une émission régionale diffusée le samedi 29 juin, à 13 heures, l'O. R. T. F. a annoncé que M. Segond s'était désisté en faveur de M. Baudis, un démenti a été apporté à cette annonce dans une nouvelle émission diffusée le même jour vers 19 h 30 ; que, dès lors, l'information erronée donnée le samedi 29 juin n'a pu exercer sur les résultats du second tour une influence suffisante pour en modifier le sens ;</text:p>
          </table:table-cell>
          <table:table-cell table:number-columns-repeated="16377"/>
        </table:table-row>
        <table:table-row table:style-name="ro1">
          <table:table-cell office:value-type="string" table:style-name="ce3">
            <text:p>Oui</text:p>
          </table:table-cell>
          <table:table-cell office:value-type="string" table:style-name="ce3">
            <text:p>considérants 1-3, 5, 7-9, 12-15, 17-19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30_annot.xml</text:p>
          </table:table-cell>
          <table:table-cell office:value-type="string" table:style-name="ce3">
            <text:p>7.Opérations</text:p>
          </table:table-cell>
          <table:table-cell office:value-type="string" table:style-name="ce3">
            <text:p><text:s/>4. Considérant qu'en admettant même que les demandes de vote par correspondance prévues par les articles L. 79 et L. 81 du Code électoral présentées par un certain nombre d'électeurs de la ville de Vienne n'aient pas été signées par ces électeurs, mais par des tiers, cette irrégularité, aussi regrettable qu'elle soit, n'est pas de nature à entraîner l'annulation des votes émis par les intéressés, dès lors qu'il n'est pas allégué que ceux-ci n'aient pas reçu personnellement des documents électoraux ou que des pressions aient été exercées sur eux au moment du vote</text:p>
          </table:table-cell>
          <table:table-cell table:number-columns-repeated="16377"/>
        </table:table-row>
        <table:table-row table:style-name="ro1">
          <table:table-cell office:value-type="string" table:style-name="ce3">
            <text:p>Oui</text:p>
          </table:table-cell>
          <table:table-cell office:value-type="string" table:style-name="ce3">
            <text:p>considérants 1-3, 5, 7-9, 12-15, 17-19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30_annot.xml</text:p>
          </table:table-cell>
          <table:table-cell office:value-type="string" table:style-name="ce3">
            <text:p>7.Opérations</text:p>
          </table:table-cell>
          <table:table-cell office:value-type="string" table:style-name="ce3">
            <text:p><text:s/>6. Considérant que tout électeur admis à voter par correspondance peut renoncer au bénéfice de ce mode de votation et se rendre, le jour du scrutin au bureau de vote, pour exercer son droit de vote ; que, par suite, la circonstance que les époux Roussier, admis à voter par correspondance, n'aient pas exercé ce droit, mais aient voté dans l'un des bureaux de vote de Vienne le 30 juin 1968, ne saurait entacher leur vote d'irrégularité</text:p>
          </table:table-cell>
          <table:table-cell table:number-columns-repeated="16377"/>
        </table:table-row>
        <table:table-row table:style-name="ro1">
          <table:table-cell office:value-type="string" table:style-name="ce3">
            <text:p>Oui</text:p>
          </table:table-cell>
          <table:table-cell office:value-type="string" table:style-name="ce3">
            <text:p>considérants 1-3, 5, 7-9, 12-15, 17-19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30_annot.xml</text:p>
          </table:table-cell>
          <table:table-cell office:value-type="string" table:style-name="ce3">
            <text:p>7.Opérations</text:p>
          </table:table-cell>
          <table:table-cell office:value-type="string" table:style-name="ce3">
            <text:p><text:s/>11. Considérant qu'il est établi que cinq électeurs ont exercé le droit de vote par correspondance sans expédier les votes sous pli recommandé, comme l'imposent les dispositions de l'article R. 87 du Code électoral ; que, déduction faite d'un de ces votes déjà annulé ainsi qu'il a été dit ci-dessus pour un motif tiré de l'irrégularité de l'admission de cet électeur au bénéfice de la procédure de vote par correspondance, il y a lieu de retrancher les quatre votes restants du nombre de voix obtenues par le candidat proclamé élu ; que, le requérant ne précisant pas les noms des dix autres électeurs dont le vote par correspondance n'aurait pas été régulièrement acheminé, le surplus du moyen doit être rejeté ; En ce qui concerne les votes par correspondance des communes de Chassieu et de Meyzieu</text:p>
          </table:table-cell>
          <table:table-cell table:number-columns-repeated="16377"/>
        </table:table-row>
        <table:table-row table:style-name="ro1">
          <table:table-cell office:value-type="string" table:style-name="ce3">
            <text:p>Oui</text:p>
          </table:table-cell>
          <table:table-cell office:value-type="string" table:style-name="ce3">
            <text:p>considérants 1-3, 5, 7-9, 12-15, 17-19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30_annot.xml</text:p>
          </table:table-cell>
          <table:table-cell office:value-type="string" table:style-name="ce3">
            <text:p>7.Opérations</text:p>
          </table:table-cell>
          <table:table-cell office:value-type="string" table:style-name="ce3">
            <text:p><text:s/>16. Considérant qu'en vertu du dernier alinéa de l'article L. 66 du Code électoral, le défaut d'annexion au procès-verbal des bulletins et enveloppes annulés n'entraîne l'annulation de l'élection que s'il est établi que ce fait a eu pour but et pour conséquence de porter atteinte à la sincérité du scrutin ; qu'il suit de là que la circonstance qu'un certain nombre de bulletins et enveloppes annulés dans les bureaux de vote de Pont-de-Chéruy et de Villette-de-Vienne aient été égarés n'est pas, à elle seule, de nature à entraîner l'annulation de l'élection, aucune intention frauduleuse n'étant alléguée par le requérant</text:p>
          </table:table-cell>
          <table:table-cell table:number-columns-repeated="16377"/>
        </table:table-row>
        <table:table-row table:style-name="ro1">
          <table:table-cell office:value-type="string" table:style-name="ce4">
            <text:p>Non</text:p>
          </table:table-cell>
          <table:table-cell office:value-type="string" table:style-name="ce3">
            <text:p>considérants 2-11, 13, 14, 16 ne sont pas annotés</text:p>
          </table:table-cell>
          <table:table-cell table:style-name="ce3"/>
          <table:table-cell office:value-type="string" table:style-name="ce3">
            <text:p>5. Campagne</text:p>
          </table:table-cell>
          <table:table-cell office:value-type="string" table:style-name="ce9">
            <text:p><text:a xlink:href="file:///C:/Users/anais/Downloads/AN/1968/rejet/CONSTEXT000017665532_annot.xml">file:\\\P:\CRJ\RECHERCHE\PROJET_JADE\JADE_COMMUN\Annotation\Annotation_automatique_Maritaud\Technologie_light\Super-catégories-objets_0,8\AN\1968\rejet\CONSTEXT000017665532_annot.xml</text:a></text:p>
          </table:table-cell>
          <table:table-cell office:value-type="string" table:style-name="ce3">
            <text:p>4.Campagne</text:p>
          </table:table-cell>
          <table:table-cell office:value-type="string" table:style-name="ce3">
            <text:p><text:s/>15. Considérant qu'il ressort des pièces du dossier que le climat de violence ne résultait pas du seul fait des partisans du candidat élu et qu'il n'a pas atteint, avant le scrutin, une gravité telle qu'il ait pu modifier le sens de la consultation</text:p>
          </table:table-cell>
          <table:table-cell table:number-columns-repeated="16377"/>
        </table:table-row>
        <table:table-row table:style-name="ro1">
          <table:table-cell office:value-type="string" table:style-name="ce3">
            <text:p>Non</text:p>
          </table:table-cell>
          <table:table-cell office:value-type="string" table:style-name="ce3">
            <text:p>considérant 2 n'est pas annoté</text:p>
          </table:table-cell>
          <table:table-cell table:style-name="ce3"/>
          <table:table-cell office:value-type="string" table:style-name="ce3">
            <text:p>2. Préalable scrutin</text:p>
          </table:table-cell>
          <table:table-cell office:value-type="string" table:style-name="ce3">
            <text:p>file:\\\P:\CRJ\RECHERCHE\PROJET_JADE\JADE_COMMUN\Annotation\Annotation_automatique_Maritaud\Technologie_light\Super-catégories-objets_0,8\AN\1968\rejet\CONSTEXT000017665533_annot.xml</text:p>
          </table:table-cell>
          <table:table-cell office:value-type="string" table:style-name="ce3">
            <text:p>4.Campagne</text:p>
          </table:table-cell>
          <table:table-cell office:value-type="string" table:style-name="ce3">
            <text:p><text:s/>1. Considérant, d'une part, que la requérante fait état de ce qu'un nombre anormalement élevé de plis contenant des documents électoraux adressés à des électeurs ont été renvoyés à la commission de propagande avec la mention 'inconnu' ; que cette circonstance, qui révèle une regrettable négligence dans la tenue des listes électorales ; ne suffit pas à établir l'existence de la manoeuvre alléguée par la requérante et n'a pu avoir une influence déterminante sur le résultat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4-6 ne sont pas annotés</text:p>
          </table:table-cell>
          <table:table-cell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1968\rejet\CONSTEXT000017665569_annot.xml</text:p>
          </table:table-cell>
          <table:table-cell office:value-type="string" table:style-name="ce3">
            <text:p>7.Opérations</text:p>
          </table:table-cell>
          <table:table-cell office:value-type="string" table:style-name="ce3">
            <text:p><text:s/>7. Considérant que les irrégularités ainsi alléguées de même que celles relatives au déroulement du scrutin ne sont pas établies et seraient d'ailleurs sans influence sur le résultat du vote</text:p>
          </table:table-cell>
          <table:table-cell table:number-columns-repeated="16377"/>
        </table:table-row>
        <table:table-row table:style-name="ro1">
          <table:table-cell office:value-type="string" table:style-name="ce3">
            <text:p>Oui</text:p>
          </table:table-cell>
          <table:table-cell office:value-type="string" table:style-name="ce3">
            <text:p>considérants 2, 3, (4), 6-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68\rejet\CONSTEXT000017665571_annot.xml</text:p>
          </table:table-cell>
          <table:table-cell office:value-type="string" table:style-name="ce3">
            <text:p>4.Campagne</text:p>
          </table:table-cell>
          <table:table-cell office:value-type="string" table:style-name="ce3">
            <text:p><text:s/>5. Considérant que, si de nombreuses affiches en faveur de M. Aubert ont été apposées en dehors des panneaux affectés à ce candidat et que si des discours de propagande électorale ont été diffusés par haut-parleurs sur la voie publique, ces irrégularités ou pratiques ne peuvent être regardées comme ayant faussé les conditions de la consultation alors que des irrégularités de même nature, notamment en matière d'affichage, ont été également commises par d'autres candidats</text:p>
          </table:table-cell>
          <table:table-cell table:number-columns-repeated="16377"/>
        </table:table-row>
        <table:table-row table:style-name="ro1">
          <table:table-cell office:value-type="string" table:style-name="ce3">
            <text:p>Oui</text:p>
          </table:table-cell>
          <table:table-cell office:value-type="string" table:style-name="ce3">
            <text:p>considérants 2, 3, 5, 6, 8 et 9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0\rejet\CONSTEXT000017665499_annot.xml</text:p>
          </table:table-cell>
          <table:table-cell office:value-type="string" table:style-name="ce3">
            <text:p>7.Opérations</text:p>
          </table:table-cell>
          <table:table-cell office:value-type="string" table:style-name="ce3">
            <text:p><text:s/>7. Considérant que le grief tiré par le requérant de ce que les bulletins de vote établis au nom de Mme Vernhes et de lui-même ne seraient pas conformes aux indications qu'il avait données n'est assorti d'aucune précision ni d'aucun commencement de preuve et ne saurait, dès lors, en tout état de cause, être accueilli</text:p>
          </table:table-cell>
          <table:table-cell table:number-columns-repeated="16377"/>
        </table:table-row>
        <table:table-row table:style-name="ro1">
          <table:table-cell office:value-type="string" table:style-name="ce3">
            <text:p>Oui</text:p>
          </table:table-cell>
          <table:table-cell office:value-type="string" table:style-name="ce3">
            <text:p>considérants 1, 2, 4, 6, 9, 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575_annot.xml</text:p>
          </table:table-cell>
          <table:table-cell office:value-type="string" table:style-name="ce3">
            <text:p>4.Campagne</text:p>
          </table:table-cell>
          <table:table-cell office:value-type="string" table:style-name="ce3">
            <text:p><text:s/>3. Considérant que M.Griotteray fait valoir que, dans la profession de foi du député proclamé élu, réglementairement diffusée avant le second tour de scrutin, le requérant n'est pas présenté, comme les autres candidats, sous son étiquette politique véritable, mais qu'il s'y trouve qualifié inexactement de candidat d''extrême droite'; que certains électeurs ont pu, de ce fait, lui refuser leurs suffrages</text:p>
          </table:table-cell>
          <table:table-cell table:number-columns-repeated="16377"/>
        </table:table-row>
        <table:table-row table:style-name="ro1">
          <table:table-cell office:value-type="string" table:style-name="ce3">
            <text:p>Oui</text:p>
          </table:table-cell>
          <table:table-cell office:value-type="string" table:style-name="ce3">
            <text:p>considérants 1, 2, 4, 6, 9, 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575_annot.xml</text:p>
          </table:table-cell>
          <table:table-cell office:value-type="string" table:style-name="ce3">
            <text:p>4.Campagne</text:p>
          </table:table-cell>
          <table:table-cell office:value-type="string" table:style-name="ce3">
            <text:p><text:s/>5. Considérant que le requérant invoque, tout d'abord, à l'appui de ce moyen, l'apposition par M. Franceschi sur les emplacements déterminés à l'article L. 51 du code électoral, en sus des affiches prévues à l'article R. 26 dudit code, d'une petite affiche non autorisée par ce texte ; qu'il n'apparaît pas cependant que cette irrégularité ait pu avoir d'influence sensible sur le résultat de là consultation</text:p>
          </table:table-cell>
          <table:table-cell table:number-columns-repeated="16377"/>
        </table:table-row>
        <table:table-row table:style-name="ro1">
          <table:table-cell office:value-type="string" table:style-name="ce3">
            <text:p>Non</text:p>
          </table:table-cell>
          <table:table-cell office:value-type="string" table:style-name="ce3">
            <text:p>considérants 1, 2, 4, 6, 9, 11 ne sont pas annotés</text:p>
          </table:table-cell>
          <table:table-cell table:style-name="ce3"/>
          <table:table-cell office:value-type="string" table:style-name="ce3">
            <text:p>5. Campagne</text:p>
          </table:table-cell>
          <table:table-cell office:value-type="string" table:style-name="ce3">
            <text:p>file:\\\P:\CRJ\RECHERCHE\PROJET_JADE\JADE_COMMUN\Annotation\Annotation_automatique_Maritaud\Technologie_light\Super-catégories-objets_0,8\AN\1973\rejet\CONSTEXT000017665575_annot.xml</text:p>
          </table:table-cell>
          <table:table-cell office:value-type="string" table:style-name="ce3">
            <text:p>4.Campagne</text:p>
          </table:table-cell>
          <table:table-cell office:value-type="string" table:style-name="ce3">
            <text:p><text:s/>7. Considérant que, si le requérant fait valoir qu''il semble résulter d'un certain nombre de témoignages recueillis' que le député proclamé élu aurait commis le délit prévu à l'article L. 106 du code électoral, il formule cette grave accusation sans en apporter la preuve ; Sur le moyen tiré d'entraves apportées à la diffusion d'un journal, local soutenant la candidature du requérant</text:p>
          </table:table-cell>
          <table:table-cell table:number-columns-repeated="16377"/>
        </table:table-row>
        <table:table-row table:style-name="ro1">
          <table:table-cell office:value-type="string" table:style-name="ce3">
            <text:p>Oui</text:p>
          </table:table-cell>
          <table:table-cell office:value-type="string" table:style-name="ce3">
            <text:p>considérants 1, 2, 4, 6, 9, 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575_annot.xml</text:p>
          </table:table-cell>
          <table:table-cell office:value-type="string" table:style-name="ce3">
            <text:p>4.Campagne</text:p>
          </table:table-cell>
          <table:table-cell office:value-type="string" table:style-name="ce3">
            <text:p><text:s/>8. Considérant que les faits invoqués, qui ne se rapportent d'ailleurs pas à l'utilisation des moyens officiels de propagande électorale, n'ont pu avoir, compte tenu notamment de la seconde distribution du journal à laquelle il a été procédé, une incidence appréciable sur les résultats du scrutin ; Sur le grief tiré d'irrégularités commises en ce qui concerne les votes par correspondance</text:p>
          </table:table-cell>
          <table:table-cell table:number-columns-repeated="16377"/>
        </table:table-row>
        <table:table-row table:style-name="ro1">
          <table:table-cell office:value-type="string" table:style-name="ce3">
            <text:p>Non</text:p>
          </table:table-cell>
          <table:table-cell office:value-type="string" table:style-name="ce3">
            <text:p>considérants 2-5 et 7 ne sont pas annotés</text:p>
          </table:table-cell>
          <table:table-cell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1973\rejet\CONSTEXT000017665576_annot.xml</text:p>
          </table:table-cell>
          <table:table-cell office:value-type="string" table:style-name="ce3">
            <text:p>4.Campagne</text:p>
          </table:table-cell>
          <table:table-cell office:value-type="string" table:style-name="ce3">
            <text:p><text:s/>6. Considérant que les erreurs de transmission alléguées n'ont pu que retarder la proclamation des résultats et n'en ont pas altéré le sens ; Sur les autres griefs</text:p>
          </table:table-cell>
          <table:table-cell table:number-columns-repeated="16377"/>
        </table:table-row>
        <table:table-row table:style-name="ro1">
          <table:table-cell office:value-type="string" table:style-name="ce3">
            <text:p>Oui</text:p>
          </table:table-cell>
          <table:table-cell office:value-type="string" table:style-name="ce3">
            <text:p>considérant 2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577_annot.xml</text:p>
          </table:table-cell>
          <table:table-cell office:value-type="string" table:style-name="ce3">
            <text:p>4.Campagne</text:p>
          </table:table-cell>
          <table:table-cell office:value-type="string" table:style-name="ce3">
            <text:p><text:s/>3. Considérant que, si des tracts anonymes, ne comportant d'ailleurs aucune allégation diffamatoire, ont été distribués et s'il peut être reproché à M. Sourdille d'avoir fait diffuser une lettre circulaire en plus de celle à laquelle il avait droit, il n'est pas établi, alors qu'il résulte du dossier que le requérant a lui-même bénéficié de moyens de propagande irréguliers, que ces faits aient été de nature à modifier les résultats de l'élection</text:p>
          </table:table-cell>
          <table:table-cell table:number-columns-repeated="16377"/>
        </table:table-row>
        <table:table-row table:style-name="ro1">
          <table:table-cell office:value-type="string" table:style-name="ce3">
            <text:p>Non</text:p>
          </table:table-cell>
          <table:table-cell office:value-type="string" table:style-name="ce3">
            <text:p>considérant 2 n'est pas annoté</text:p>
          </table:table-cell>
          <table:table-cell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1973\rejet\CONSTEXT000017665577_annot.xml</text:p>
          </table:table-cell>
          <table:table-cell office:value-type="string" table:style-name="ce3">
            <text:p>4.Campagne</text:p>
          </table:table-cell>
          <table:table-cell office:value-type="string" table:style-name="ce3">
            <text:p><text:s/>4. Considérant que s'il est allégué qu'un vote par correspondance n'a pu être émis en raison de l'arrivée tardive des documents nécessaires, ce fait à lui seul ne saurait faire présumer d'autres irrégularités de même nature et n'a pu avoir d'influence sur le résultat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73\rejet\CONSTEXT000017665580_annot.xml</text:p>
          </table:table-cell>
          <table:table-cell office:value-type="string" table:style-name="ce3">
            <text:p>4.Campagne</text:p>
          </table:table-cell>
          <table:table-cell office:value-type="string" table:style-name="ce3">
            <text:p><text:s/>1. Considérant que le requérant allègue que M. DUGOUJON, député, proclamé élu après le deuxième tour de scrutin, et plusieurs autres candidats, ont eu recours à des moyens de propagande irréguliers notamment des affiches apposées en dehors des emplacements réglementaires, ou ne respectant pas les dimensions prévues par l'article L. 165 du code électoral, ou comprenant une combinaison des trois couleurs bleu, blanc et rouge, ainsi que des circulaires, bulletins et tracts non conformes aux prescriptions de l'article L. 165 précité</text:p>
          </table:table-cell>
          <table:table-cell table:number-columns-repeated="16377"/>
        </table:table-row>
        <table:table-row table:style-name="ro1">
          <table:table-cell office:value-type="string" table:style-name="ce3">
            <text:p>Oui</text:p>
          </table:table-cell>
          <table:table-cell office:value-type="string" table:style-name="ce3">
            <text:p>considérants 2, 3, 5, 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33_annot.xml</text:p>
          </table:table-cell>
          <table:table-cell office:value-type="string" table:style-name="ce3">
            <text:p>7.Opérations</text:p>
          </table:table-cell>
          <table:table-cell office:value-type="string" table:style-name="ce3">
            <text:p><text:s/>7. Considérant qu'il est allégué par les requérants que ces empêchements ou retards sont dus aux manoeuvres, menaces ou violences de leurs adversaires politiques ; qu'il est également allégué que d'autres délégués, irrégulièrement expulsés de certains bureaux de vote, n'auraient pas été en mesure d'exercer leur contrôle ; que, de ce fait, des votes frauduleux auraient été émis</text:p>
          </table:table-cell>
          <table:table-cell table:number-columns-repeated="16377"/>
        </table:table-row>
        <table:table-row table:style-name="ro1">
          <table:table-cell office:value-type="string" table:style-name="ce3">
            <text:p>Non</text:p>
          </table:table-cell>
          <table:table-cell office:value-type="string" table:style-name="ce3">
            <text:p>considérant 2 n'est pas annoté</text:p>
          </table:table-cell>
          <table:table-cell table:style-name="ce3"/>
          <table:table-cell office:value-type="string" table:style-name="ce3">
            <text:p>1. Procédure</text:p>
          </table:table-cell>
          <table:table-cell office:value-type="string" table:style-name="ce3">
            <text:p>file:\\\P:\CRJ\RECHERCHE\PROJET_JADE\JADE_COMMUN\Annotation\Annotation_automatique_Maritaud\Technologie_light\Super-catégories-objets_0,8\AN\1973\rejet\CONSTEXT000017665634_annot.xml</text:p>
          </table:table-cell>
          <table:table-cell office:value-type="string" table:style-name="ce3">
            <text:p>8.Autres</text:p>
          </table:table-cell>
          <table:table-cell office:value-type="string" table:style-name="ce3">
            <text:p><text:s/>3. Considérant qu'en vertu des dispositions de l'article 33 de l'ordonnance du 7 novembre 1958 susvisée, les contestations en matière électorale ne peuvent être formées que 'durant les dix jours qui suivent la proclamation des résultats du scrutin'</text:p>
          </table:table-cell>
          <table:table-cell table:number-columns-repeated="16377"/>
        </table:table-row>
        <table:table-row table:style-name="ro1">
          <table:table-cell office:value-type="string" table:style-name="ce3">
            <text:p>Non</text:p>
          </table:table-cell>
          <table:table-cell office:value-type="string" table:style-name="ce3">
            <text:p>considérants 3, 4, 5, 7, 9, 11, 13, 14 et 15 ne sont pas annotés</text:p>
          </table:table-cell>
          <table:table-cell table:style-name="ce3"/>
          <table:table-cell office:value-type="string" table:style-name="ce3">
            <text:p>1. Procédure</text:p>
          </table:table-cell>
          <table:table-cell office:value-type="string" table:style-name="ce3">
            <text:p>file:\\\P:\CRJ\RECHERCHE\PROJET_JADE\JADE_COMMUN\Annotation\Annotation_automatique_Maritaud\Technologie_light\Super-catégories-objets_0,8\AN\1973\rejet\CONSTEXT000017665635_annot.xml</text:p>
          </table:table-cell>
          <table:table-cell office:value-type="string" table:style-name="ce3">
            <text:p>4.Campagne</text:p>
          </table:table-cell>
          <table:table-cell office:value-type="string" table:style-name="ce3">
            <text:p><text:s/>0. 160 du code électoral ; que la forclusion opposée au requérant est fondée sur les dispositions de, l'article L. 161 du même code ; qu'ainsi elle n'est pas au nombre des cas relevant de la compétence du tribunal administratif en vertu des dispositions des articles L. 159 et L.</text:p>
          </table:table-cell>
          <table:table-cell table:number-columns-repeated="16377"/>
        </table:table-row>
        <table:table-row table:style-name="ro1">
          <table:table-cell office:value-type="string" table:style-name="ce3">
            <text:p>Oui</text:p>
          </table:table-cell>
          <table:table-cell office:value-type="string" table:style-name="ce3">
            <text:p>considérants 3, 4, 5, 7, 9, 11, 13, 14 et 15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35_annot.xml</text:p>
          </table:table-cell>
          <table:table-cell office:value-type="string" table:style-name="ce3">
            <text:p>7.Opérations</text:p>
          </table:table-cell>
          <table:table-cell office:value-type="string" table:style-name="ce3">
            <text:p><text:s/>6. Considérant que, si certaines cartes électorales déposées dans les bureaux de vote n'ont été remises à leurs titulaires que le jour du scrutin, il n'est pas établi que ce procédé, si regrettable qu'il soit, ait été à l'origine de votes frauduleux ; Sur les griefs relatifs à des irrégularités d'affichage et à la distribution de tracte diffamatoires</text:p>
          </table:table-cell>
          <table:table-cell table:number-columns-repeated="16377"/>
        </table:table-row>
        <table:table-row table:style-name="ro1">
          <table:table-cell office:value-type="string" table:style-name="ce3">
            <text:p>Oui</text:p>
          </table:table-cell>
          <table:table-cell office:value-type="string" table:style-name="ce3">
            <text:p>considérants 3, 4, 5, 7, 9, 11, 13, 14 et 15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35_annot.xml</text:p>
          </table:table-cell>
          <table:table-cell office:value-type="string" table:style-name="ce3">
            <text:p>7.Opérations</text:p>
          </table:table-cell>
          <table:table-cell office:value-type="string" table:style-name="ce3">
            <text:p><text:s/>10. Considérant que, si les requérants font état d'un nombre anormalement élevé de votes par procuration, ils ne citent, à l'appui de leurs allégations, d'autres chiffres que ceux du septième bureau de la commune de Saint-Joseph où, sur un total de 621 inscrits, 23 suffrages seulement auraient été exprimés par vote de vote par procuration ; que, d'ailleurs, aucune irrégularité n'est alléguée dans l'exercice de ces votes ; que, si le mandataire d'une dame Jamps a été empêché de voter, l'irrégularité alléguée est demeurée en tout état de cause sans influence sur le résultat du scrutin; En ce qui concerne le défaut de contrôle de l'identité des électeurs</text:p>
          </table:table-cell>
          <table:table-cell table:number-columns-repeated="16377"/>
        </table:table-row>
        <table:table-row table:style-name="ro1">
          <table:table-cell office:value-type="string" table:style-name="ce3">
            <text:p>Oui</text:p>
          </table:table-cell>
          <table:table-cell office:value-type="string" table:style-name="ce3">
            <text:p>considérants 1, 3, 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38_annot.xml</text:p>
          </table:table-cell>
          <table:table-cell office:value-type="string" table:style-name="ce3">
            <text:p>4.Campagne</text:p>
          </table:table-cell>
          <table:table-cell office:value-type="string" table:style-name="ce3">
            <text:p><text:s/>2. Considérant, d'autre part, que la diffusion, sous forme de tract, d'une déclaration par laquelle le suppléant d'un candidat éliminé au premier tour faisait savoir qu'il se désolidarisait de l'appel lancé par ce candidat contre M. Weber, appel lui-même largement diffusé par les soins de M. Richard, a constitué une simple précision de la position personnelle de son auteur ; que, dès lors, bien que cette diffusion ait été tardive, elle n'a pas été de nature à altérer la sincérité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1, 3, 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38_annot.xml</text:p>
          </table:table-cell>
          <table:table-cell office:value-type="string" table:style-name="ce3">
            <text:p>7.Opérations</text:p>
          </table:table-cell>
          <table:table-cell office:value-type="string" table:style-name="ce3">
            <text:p><text:s/>5. Considérant que, si le nombre des votes par Correspondance parvenus en temps utile aux bureaux de vote s'est élevé à 541 seulement, alors que 627 électeurs avaient été admis à utiliser ce mode de votation, il n'est pas allégué que ces faits soient imputables à une manoeuvre destinée à modifier le résultat du scrutin ; qu'en admettant même qu'ils soient dus au retard des services postaux et non à la négligence des électeurs intéressés, cette circonstance n'est pas de nature à entraîner l'annulation des opérations électorales ;</text:p>
          </table:table-cell>
          <table:table-cell table:number-columns-repeated="16377"/>
        </table:table-row>
        <table:table-row table:style-name="ro1">
          <table:table-cell office:value-type="string" table:style-name="ce3">
            <text:p>Non</text:p>
          </table:table-cell>
          <table:table-cell office:value-type="string" table:style-name="ce3">
            <text:p>considérants (2, 3), 5-8, 10 ne sont pas annotès</text:p>
          </table:table-cell>
          <table:table-cell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73\rejet\CONSTEXT000017665644_annot.xml</text:p>
          </table:table-cell>
          <table:table-cell office:value-type="string" table:style-name="ce3">
            <text:p>4.Campagne</text:p>
          </table:table-cell>
          <table:table-cell office:value-type="string" table:style-name="ce3">
            <text:p><text:s/>4. Considérant que le préfet n'aurait pas dû refuser de sa propre autorité la candidature du requérant mais aurait dû saisir le tribunal administratif</text:p>
          </table:table-cell>
          <table:table-cell table:number-columns-repeated="16377"/>
        </table:table-row>
        <table:table-row table:style-name="ro1">
          <table:table-cell office:value-type="string" table:style-name="ce3">
            <text:p>Oui</text:p>
          </table:table-cell>
          <table:table-cell office:value-type="string" table:style-name="ce3">
            <text:p>considérants 2-5, 9-12, 14, 1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45_annot.xml</text:p>
          </table:table-cell>
          <table:table-cell office:value-type="string" table:style-name="ce3">
            <text:p>7.Opérations</text:p>
          </table:table-cell>
          <table:table-cell office:value-type="string" table:style-name="ce3">
            <text:p><text:s/>7. Considérant, en premier lieu, que si, dans trois bureaux de vote, les listes électorales ont été émargées par l'apposition d'un simple trait ou d'une lettre majuscule et non par ]à signature ou le paraphe prescrits par l'article R. 61 du code électoral, cette irrégularité est sans importance dès lors qu'aucune ambiguïté n'en résulte quant au nombre réel des votants ; qu'il ne résulte pas du dossier que les émargements n'aient pas été apposés par des membres du bureau ; qu'au surplus aucun des procès-verbaux ne mentionne d'observation relative aux émargements</text:p>
          </table:table-cell>
          <table:table-cell table:number-columns-repeated="16377"/>
        </table:table-row>
        <table:table-row table:style-name="ro1">
          <table:table-cell office:value-type="string" table:style-name="ce3">
            <text:p>Oui</text:p>
          </table:table-cell>
          <table:table-cell office:value-type="string" table:style-name="ce3">
            <text:p>considérants 2-5, 9-12, 14, 1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45_annot.xml</text:p>
          </table:table-cell>
          <table:table-cell office:value-type="string" table:style-name="ce3">
            <text:p>7.Opérations</text:p>
          </table:table-cell>
          <table:table-cell office:value-type="string" table:style-name="ce3">
            <text:p><text:s/>8. Considérant, en second lieu, que si, dans quelques bureaux de vote, des électeurs ont été admis à voter sans justifier de leur identité par la présentation d'un document réglementaire et si le président du 5e bureau de Fort-de-France s'est opposé à ce que les assesseurs de ce bureau participent au contrôle des pièces d'identité, il ne résulte pas de l'instruction que ces irrégularités condamnables aient été, dans les circonstances de l'affaire, de nature à modifier le résultat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2-5, 9-12, 14, 1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45_annot.xml</text:p>
          </table:table-cell>
          <table:table-cell office:value-type="string" table:style-name="ce3">
            <text:p>7.Opérations</text:p>
          </table:table-cell>
          <table:table-cell office:value-type="string" table:style-name="ce3">
            <text:p><text:s/>13. Considérant, d'une part, que si les portes des locaux des 32e et 48e bureaux de vote de Fort-de-France ont été fermées pendant le dépouillement du scrutin, il ne résulte pas de l'instruction que cette irrégularité ait permis des fraudes ; que les procès-verbaux de ces bureaux ne comportent aucune observation et sont revêtus de la signature des assesseurs et des délégués des candidats, dont il n'est pas allégué qu'ils n'aient pas assisté au dépouillement</text:p>
          </table:table-cell>
          <table:table-cell table:number-columns-repeated="16377"/>
        </table:table-row>
        <table:table-row table:style-name="ro1">
          <table:table-cell office:value-type="string" table:style-name="ce3">
            <text:p>Oui</text:p>
          </table:table-cell>
          <table:table-cell office:value-type="string" table:style-name="ce3">
            <text:p>considérants 2-5, 9-12, 14, 1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45_annot.xml</text:p>
          </table:table-cell>
          <table:table-cell office:value-type="string" table:style-name="ce3">
            <text:p>7.Opérations</text:p>
          </table:table-cell>
          <table:table-cell office:value-type="string" table:style-name="ce3">
            <text:p><text:s/>15. Considérant, enfin, qu'aucune disposition législative ou réglementaire ne prescrit l'annexion au procès-verbal des enveloppes trouvées vides dans l'urne ; que si une soixantaine de bulletins nuls n'ont pas été annexés aux procès-verbaux et si quatre cents environ y ont été annexés sans être contresignés par les membres des bureaux, il n'est pas établi que ces irrégularités aient eu pour but et pour conséquence de porter atteinte à la sincérité du scrutin ; qu'au demeurant les bulletins et enveloppes annexés, mais non contresignés, correspondent dans l'ensemble à la description qui en est faite par les procès-verbaux ; que les requérants ne font état d'aucun cas précis où un bulletin aurait été déclaré nul à tort, et qu'aucune observation en ce sens ne figure à aucun procès-verbal ; que, dès lors, conformément au dernier alinéa de l'article L. 66 du code électoral, il y a lieu de rejeter le grief ; Sur le grief tiré des conditions du recensement général des votes dans la commune de -Fort-de-France</text:p>
          </table:table-cell>
          <table:table-cell table:number-columns-repeated="16377"/>
        </table:table-row>
        <table:table-row table:style-name="ro1">
          <table:table-cell office:value-type="string" table:style-name="ce3">
            <text:p>Oui</text:p>
          </table:table-cell>
          <table:table-cell office:value-type="string" table:style-name="ce3">
            <text:p>considérants 2-5, 9-12, 14, 1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45_annot.xml</text:p>
          </table:table-cell>
          <table:table-cell office:value-type="string" table:style-name="ce3">
            <text:p>7.Opérations</text:p>
          </table:table-cell>
          <table:table-cell office:value-type="string" table:style-name="ce3">
            <text:p><text:s/>17. Mais considérant qu'il ne résulte pas de l'instruction que cette irrégularité, au demeurant fort regrettable, ait été à l'origine de fraudes ; qu'il n'est pas établi que les assesseurs du 1e bureau, et notamment ceux désignés par les requérants, n'aient pas été en mesure d'assister aux opérations ; qu'ils ont signé le procès-verbal de recensement ; que ce procès-verbal reproduit exactement, conformément à l'article R.69 précité, les chiffres portés sur chacun des cinquante-six procès-verbaux de bureaux, dont il n'est pas allégué qu'ils aient été falsifiés ; que le procès-verbal récapitulatif et les procès-verbaux des bureaux ont été soigneusement examinés par la commission de recensement qui a opéré quelques rectifications de détail ; que, dans ces conditions, le grief ne saurait être retenu,</text:p>
          </table:table-cell>
          <table:table-cell table:number-columns-repeated="16377"/>
        </table:table-row>
        <table:table-row table:style-name="ro1">
          <table:table-cell office:value-type="string" table:style-name="ce3">
            <text:p>Oui</text:p>
          </table:table-cell>
          <table:table-cell office:value-type="string" table:style-name="ce3">
            <text:p>considérants 2, 4 et 5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46_annot.xml</text:p>
          </table:table-cell>
          <table:table-cell office:value-type="string" table:style-name="ce3">
            <text:p>4.Campagne</text:p>
          </table:table-cell>
          <table:table-cell office:value-type="string" table:style-name="ce3">
            <text:p><text:s/>3. Considérant, d'autre part, que si un constat d'huissier dressé le lendemain du scrutin a relevé l'absence des affiches de M. Chazelle sur les panneaux réglementaires de quatre communes, il n'est établi, ni que ces affiches fussent absentes le jour du scrutin et les jours précédents, ni que leur disparition fût imputable à M. Simon ou à ses partisans, ni enfin que M.Chazelle n'ait pas été en mesure de faire remplacer en temps utile les affiches qui auraient été enlevées ; que l'apposition, sur le mur de la mairie de Saulgues, d'une affichette dénonçant la présence des 'sbires de Chazelle' et visant vraisemblablement les assesseurs et délégués de ce candidat, pour regrettable qu'elle soit, n'a pas été davantage de nature à modifier le résultat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 2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47_annot.xml</text:p>
          </table:table-cell>
          <table:table-cell office:value-type="string" table:style-name="ce3">
            <text:p>4.Campagne</text:p>
          </table:table-cell>
          <table:table-cell office:value-type="string" table:style-name="ce3">
            <text:p><text:s/>1. Considérant que, si des affiches, émanant de la fédération départementale du parti radical socialiste et invitant les électeurs 'à tout faire pour battre R. Couveinhes et U. D. R.', ont été apposées, le matin du jour du scrutin, sur les panneaux officiels, cette irrégularité flagrante, pour condamnable qu'elle soit, n'a pas été, en l'espèce, de nature à tromper une partie de l'électorat suffisamment importante pour fausser le résultat du scrutin ; Sur le moyen tiré de l'irrégularité des votes par correspondance</text:p>
          </table:table-cell>
          <table:table-cell table:number-columns-repeated="16377"/>
        </table:table-row>
        <table:table-row table:style-name="ro1">
          <table:table-cell office:value-type="string" table:style-name="ce3">
            <text:p>Oui</text:p>
          </table:table-cell>
          <table:table-cell office:value-type="string" table:style-name="ce3">
            <text:p>considérants 2, 3, 5 et 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48_annot.xml</text:p>
          </table:table-cell>
          <table:table-cell office:value-type="string" table:style-name="ce3">
            <text:p>4.Campagne</text:p>
          </table:table-cell>
          <table:table-cell office:value-type="string" table:style-name="ce3">
            <text:p><text:s/>4. Considérant, dès lors, que si des excès de propagande ont été commis par voie de tracts, il apparaît qu'ils n'ont pas été le fait du seul candidat proclamé élu ; qu'il n'est pas démontré que ces irrégularités aient exercé une influence de nature à changer, le sens de la consultation</text:p>
          </table:table-cell>
          <table:table-cell table:number-columns-repeated="16377"/>
        </table:table-row>
        <table:table-row table:style-name="ro1">
          <table:table-cell office:value-type="string" table:style-name="ce3">
            <text:p>Oui</text:p>
          </table:table-cell>
          <table:table-cell office:value-type="string" table:style-name="ce3">
            <text:p>considérants 3, 5-9, 13-1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50_annot.xml</text:p>
          </table:table-cell>
          <table:table-cell office:value-type="string" table:style-name="ce3">
            <text:p>7.Opérations</text:p>
          </table:table-cell>
          <table:table-cell office:value-type="string" table:style-name="ce3">
            <text:p>; 10. Considérant, d'autre part, que la circonstance que l'identité de certains électeurs n'ait pas été contrôlée, dans certains bureaux de vote n'a pu, compte tenu de l'écart important des voix, altérer les résultats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3, 5-9, 13-1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50_annot.xml</text:p>
          </table:table-cell>
          <table:table-cell office:value-type="string" table:style-name="ce3">
            <text:p>7.Opérations</text:p>
          </table:table-cell>
          <table:table-cell office:value-type="string" table:style-name="ce3">
            <text:p>; 11. Considérant, enfin, que si certains électeurs ne sont pas passés par un isoloir, cette irrégularité n'a pas été de nature à modifier le sens du scrutin ; Sur les griefs relatifs au déroulement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1, 5 et 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52_annot.xml</text:p>
          </table:table-cell>
          <table:table-cell office:value-type="string" table:style-name="ce3">
            <text:p>4.Campagne</text:p>
          </table:table-cell>
          <table:table-cell office:value-type="string" table:style-name="ce3">
            <text:p><text:s/>2. Considérant, d'autre part, que si la surface des emplacements a ce destinés n'a pas toujours permis aux candidats d'apposer simultanément les deux affiches prévues à l'article R. 26 du code électoral, tous les candidats en présence se sont trouvés dans la même situation ; que le résultat des élections n'en a donc pas été modifié ; Sur le moyen tiré de l'apposition d'affiches après la date limite fixée par l'article R. 26 du code électoral</text:p>
          </table:table-cell>
          <table:table-cell table:number-columns-repeated="16377"/>
        </table:table-row>
        <table:table-row table:style-name="ro1">
          <table:table-cell office:value-type="string" table:style-name="ce3">
            <text:p>Oui</text:p>
          </table:table-cell>
          <table:table-cell office:value-type="string" table:style-name="ce3">
            <text:p>considérants 1, 5 et 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52_annot.xml</text:p>
          </table:table-cell>
          <table:table-cell office:value-type="string" table:style-name="ce3">
            <text:p>4.Campagne</text:p>
          </table:table-cell>
          <table:table-cell office:value-type="string" table:style-name="ce3">
            <text:p><text:s/>3. Considérant que, si le requérant prétend que des affiches auraient été apposées après l'expiration du délai prévu à l'article R. 26 du code électoral, il n'apporte pas la preuve de cette allégation ; Sur le grief tiré des moyens supplémentaires de propagande dont aurait disposé le candidat élu</text:p>
          </table:table-cell>
          <table:table-cell table:number-columns-repeated="16377"/>
        </table:table-row>
        <table:table-row table:style-name="ro1">
          <table:table-cell office:value-type="string" table:style-name="ce3">
            <text:p>Oui</text:p>
          </table:table-cell>
          <table:table-cell office:value-type="string" table:style-name="ce3">
            <text:p>considérants 1, 5 et 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52_annot.xml</text:p>
          </table:table-cell>
          <table:table-cell office:value-type="string" table:style-name="ce3">
            <text:p>4.Campagne</text:p>
          </table:table-cell>
          <table:table-cell office:value-type="string" table:style-name="ce3">
            <text:p><text:s/>4. Considérant que, si M. Forens, candidat proclamé élu, a bénéficié du soutien, d'un journal dont une édition spéciale a été publiée à l'occasion de la campagne électorale il n'est pas établi que cette publication ait été éditée en violation de la législation sur la presse ; que la preuve n'est pas apportée que ladite publication ait été distribuée dans des conditions qui permettent de l'assimiler à l'un des moyens interdits par le code électoral ; qu'il n'est pas établi, au surplus, que la propagande. exercée en faveur de M. Forens par le journal incriminé ait pu, dans les circonstances de l'espèce, fausser les conditions de la consultation électorale</text:p>
          </table:table-cell>
          <table:table-cell table:number-columns-repeated="16377"/>
        </table:table-row>
        <table:table-row table:style-name="ro1">
          <table:table-cell office:value-type="string" table:style-name="ce3">
            <text:p>Oui</text:p>
          </table:table-cell>
          <table:table-cell office:value-type="string" table:style-name="ce3">
            <text:p>considérants 2-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54_annot.xml</text:p>
          </table:table-cell>
          <table:table-cell office:value-type="string" table:style-name="ce3">
            <text:p>4.Campagne</text:p>
          </table:table-cell>
          <table:table-cell office:value-type="string" table:style-name="ce3">
            <text:p><text:s/>1. Considérant, d'une part, que, si le candidat proclamé élu a pu distribuer dans la nuit qui précédait le scrutin de nombreux tracts invitant à voter contre le requérant, cette irrégularité, pour regrettable qu'elle soit, n'a pas été, en l'espèce, de nature à altérer les résultats du scrutin dès lors que les tracts en cause ne dépassaient pas les limites de la polémique électorale et que de tels agissements peuvent également être reprochés au requérant</text:p>
          </table:table-cell>
          <table:table-cell table:number-columns-repeated="16377"/>
        </table:table-row>
        <table:table-row table:style-name="ro1">
          <table:table-cell office:value-type="string" table:style-name="ce3">
            <text:p>Oui</text:p>
          </table:table-cell>
          <table:table-cell office:value-type="string" table:style-name="ce3">
            <text:p>considérants 2-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54_annot.xml</text:p>
          </table:table-cell>
          <table:table-cell office:value-type="string" table:style-name="ce3">
            <text:p>7.Opérations</text:p>
          </table:table-cell>
          <table:table-cell office:value-type="string" table:style-name="ce3">
            <text:p><text:s/>5. Considérant. enfin, que si le requérant soutient qu'à Longwy-Haut des erreurs auraient été commises, à son détriment, dans le décompte des voix, et s'il produit à cette occasion divers témoignages de personnes qui d'ailleurs se bornaient à assister au dépouillement, ce moyen ne saurait être accueilli dès lors qu'aucune réclamation n'a été inscrite au procès-verbal, lequel, au surplus, a été signé par l'ensemble des membres du bureau de vote ; Sur les griefs tirés de l'irrégularité de certains votes par correspondance</text:p>
          </table:table-cell>
          <table:table-cell table:number-columns-repeated="16377"/>
        </table:table-row>
        <table:table-row table:style-name="ro1">
          <table:table-cell office:value-type="string" table:style-name="ce3">
            <text:p>Oui</text:p>
          </table:table-cell>
          <table:table-cell office:value-type="string" table:style-name="ce3">
            <text:p>considérants 2-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54_annot.xml</text:p>
          </table:table-cell>
          <table:table-cell office:value-type="string" table:style-name="ce3">
            <text:p>7.Opérations</text:p>
          </table:table-cell>
          <table:table-cell office:value-type="string" table:style-name="ce3">
            <text:p><text:s/>6. Considérant, d'une part, que si le requérant soutient qu'à Mexy deux demandes de vote sont arrivées hors délai et n'auraient ainsi pas dû recevoir satisfaction, aucune disposition législative ou réglementaire ne fixe une date limite pour le dépôt des demandes de vote par correspondance ; que dès lors le moyen doit être écarté</text:p>
          </table:table-cell>
          <table:table-cell table:number-columns-repeated="16377"/>
        </table:table-row>
        <table:table-row table:style-name="ro1">
          <table:table-cell office:value-type="string" table:style-name="ce3">
            <text:p>Oui</text:p>
          </table:table-cell>
          <table:table-cell office:value-type="string" table:style-name="ce3">
            <text:p>considérants 2-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54_annot.xml</text:p>
          </table:table-cell>
          <table:table-cell office:value-type="string" table:style-name="ce3">
            <text:p>7.Opérations</text:p>
          </table:table-cell>
          <table:table-cell office:value-type="string" table:style-name="ce3">
            <text:p><text:s/>7. Considérant, d'autre part, que si le requérant soutient que des irrégularités graves entachent le vote par correspondance des pensionnaires de l'hospice de Longuyon, il résulte de instruction que neuf seulement des pensionnaires de cet établissement ont voté par correspondance ; que la fraude alléguée par le requérant n'est pas établie</text:p>
          </table:table-cell>
          <table:table-cell table:number-columns-repeated="16377"/>
        </table:table-row>
        <table:table-row table:style-name="ro1">
          <table:table-cell office:value-type="string" table:style-name="ce3">
            <text:p>Oui</text:p>
          </table:table-cell>
          <table:table-cell office:value-type="string" table:style-name="ce3">
            <text:p>considérants 1, 3-5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56_annot.xml</text:p>
          </table:table-cell>
          <table:table-cell office:value-type="string" table:style-name="ce3">
            <text:p>7.Opérations</text:p>
          </table:table-cell>
          <table:table-cell office:value-type="string" table:style-name="ce3">
            <text:p><text:s/>2. Considérant qu'en admettant que dans ce bureau de vote, il ait été procédé au dépouillement des résultats du scrutin dans des conditions non conformes à celles prescrites par l'article L. 65 du code électoral, il n'est pas établi que l'irrégularité ainsi commise ait eu pour effet de faciliter des fraudes ou des erreurs de calcul ; Sur le décompte des voix</text:p>
          </table:table-cell>
          <table:table-cell table:number-columns-repeated="16377"/>
        </table:table-row>
        <table:table-row table:style-name="ro1">
          <table:table-cell office:value-type="string" table:style-name="ce3">
            <text:p>Oui</text:p>
          </table:table-cell>
          <table:table-cell office:value-type="string" table:style-name="ce3">
            <text:p>considérants 1-3, 5 et 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60_annot.xml</text:p>
          </table:table-cell>
          <table:table-cell office:value-type="string" table:style-name="ce3">
            <text:p>4.Campagne</text:p>
          </table:table-cell>
          <table:table-cell office:value-type="string" table:style-name="ce3">
            <text:p><text:s/>4. Considérant que les pièces du dossier ne permettent pas d'établir si, comme le soutient le requérant, cette diffusion a été faite la veille du scrutin, mettant ainsi M. Pasquini dans l'impossibilité de répondre ; qu'en tout état de cause, et même si cette circonstance était établie, une telle propagande, pour regrettable qu'elle soit, n'a pu avoir, compte-tenu des résultats du scrutin, une influence suffisante pour changer le sens de la consultation</text:p>
          </table:table-cell>
          <table:table-cell table:number-columns-repeated="16377"/>
        </table:table-row>
        <table:table-row table:style-name="ro1">
          <table:table-cell office:value-type="string" table:style-name="ce3">
            <text:p>Oui</text:p>
          </table:table-cell>
          <table:table-cell office:value-type="string" table:style-name="ce3">
            <text:p>considérants 1-3, 5 et 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60_annot.xml</text:p>
          </table:table-cell>
          <table:table-cell office:value-type="string" table:style-name="ce3">
            <text:p>7.Opérations</text:p>
          </table:table-cell>
          <table:table-cell office:value-type="string" table:style-name="ce3">
            <text:p><text:s/>7. Considérant qu'il n'est pas établi par les pièces produites au dossier que des bulletins de vote au nom de M. Cornut-Gentille aient été distribués hors des bureaux de vote le jour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2-6, 8 et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65_annot.xml</text:p>
          </table:table-cell>
          <table:table-cell office:value-type="string" table:style-name="ce3">
            <text:p>7.Opérations</text:p>
          </table:table-cell>
          <table:table-cell office:value-type="string" table:style-name="ce3">
            <text:p><text:s/>1. Considérant, d'une part, que si, dans douze communes de la circonscription, les bureaux de vote n'ont pu être ouverts, le jour du scrutin, par suite de très abondantes chutes de neige, cette circonstance n'a pas été, en l'espèce, de nature à entacher d'irrégularité le scrutin dès lors qu'il était matériellement impossible de procéder aux opérations électorales dans les communes dont s'agit</text:p>
          </table:table-cell>
          <table:table-cell table:number-columns-repeated="16377"/>
        </table:table-row>
        <table:table-row table:style-name="ro1">
          <table:table-cell office:value-type="string" table:style-name="ce3">
            <text:p>Oui</text:p>
          </table:table-cell>
          <table:table-cell office:value-type="string" table:style-name="ce3">
            <text:p>considérants 2-6, 8 et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65_annot.xml</text:p>
          </table:table-cell>
          <table:table-cell office:value-type="string" table:style-name="ce3">
            <text:p>4.Campagne</text:p>
          </table:table-cell>
          <table:table-cell office:value-type="string" table:style-name="ce3">
            <text:p><text:s/>7. Considérant, en cinquième lieu, que si des banderoles apposées sur la permanence du candidat proclamé élu le présentaient, à la veille du premier tour, comme appartenant au 'parti radical socialiste U. R. D. G. ', cette circonstance n'a pas été, en l'espèce. de nature à tromper une partie de l'électorat et à altérer ainsi les résultats du scrutin ; Sur les irrégularités qui entacheraient les votes par correspondance :</text:p>
          </table:table-cell>
          <table:table-cell table:number-columns-repeated="16377"/>
        </table:table-row>
        <table:table-row table:style-name="ro1">
          <table:table-cell office:value-type="string" table:style-name="ce3">
            <text:p>Oui</text:p>
          </table:table-cell>
          <table:table-cell office:value-type="string" table:style-name="ce3">
            <text:p>considérants 3-11, 14-1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66_annot.xml</text:p>
          </table:table-cell>
          <table:table-cell office:value-type="string" table:style-name="ce3">
            <text:p>7.Opérations</text:p>
          </table:table-cell>
          <table:table-cell office:value-type="string" table:style-name="ce3">
            <text:p><text:s/>13. Considérant que M. Fouet soutient et qu'il est établi que deux électeurs de la commune du Lude, deux électeurs de. Poncé-sur-Loir et trois électeurs de Luceau ont exercé le droit de vote par correspondance sans expédier leur vote sous pli recommandé, comme l'imposent les dispositions de l'article R. 87 du code électoral , que le requérant est, par suite, fondé, de ce chef, à demander que sept suffrages soient retranchés du nombre de voix attribuées au candidat proclamé élu ; Sur les griefs tirés des opérations de dépouillement et du décompte des voix</text:p>
          </table:table-cell>
          <table:table-cell table:number-columns-repeated="16377"/>
        </table:table-row>
        <table:table-row table:style-name="ro1">
          <table:table-cell office:value-type="string" table:style-name="ce3">
            <text:p>Oui</text:p>
          </table:table-cell>
          <table:table-cell office:value-type="string" table:style-name="ce3">
            <text:p>considérants 1-11, 14-16, 18, 21, 23, 24, 2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68_annot.xml</text:p>
          </table:table-cell>
          <table:table-cell office:value-type="string" table:style-name="ce3">
            <text:p>7.Opérations</text:p>
          </table:table-cell>
          <table:table-cell office:value-type="string" table:style-name="ce3">
            <text:p><text:s/>12. Considérant enfin qu'ont voté par correspondance trois électeurs dans les communes d'Assier, Frontenac et Sousceyrac et deux électeurs dans la commune de Le Bastit alors qu'ils n'appartenaient à aucune catégorie d'électeurs admis au bénéfice du vote par correspondance ; que ces cinq votes doivent dès lors être déclarés nuls ; Sur les griefs tirés d'irrégularités entachant les demandes de vote par correspondance</text:p>
          </table:table-cell>
          <table:table-cell table:number-columns-repeated="16377"/>
        </table:table-row>
        <table:table-row table:style-name="ro1">
          <table:table-cell office:value-type="string" table:style-name="ce3">
            <text:p>Oui</text:p>
          </table:table-cell>
          <table:table-cell office:value-type="string" table:style-name="ce3">
            <text:p>considérants 1-11, 14-16, 18, 21, 23, 24, 2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68_annot.xml</text:p>
          </table:table-cell>
          <table:table-cell office:value-type="string" table:style-name="ce3">
            <text:p>7.Opérations</text:p>
          </table:table-cell>
          <table:table-cell office:value-type="string" table:style-name="ce3">
            <text:p><text:s/>13. Considérant qu'en vertu de l'article R. 81 du code électoral tout électeur appartenant à une catégorie admise à voter par correspondance et désirant utiliser cette procédure doit présenter au maire de la commune une demande ; que le défaut de présentation de cette demande a pour effet d'entacher de nullité le vote émis, sauf dans le cas où l'intéressé a produit une attestation sur l'honneur ; qu'il est établi que deux électeurs dans la commune de Linac et un électeur dans la commune de Béduer ont voté par correspondance alors qu'ils n'avaient adressé aux maires ni demande ni attestation sur l'honneur et que ces trois suffrages doivent être annulés ; qu'en revanche la circonstance que quelques demandes n'aient pas comporté toutes les mentions réglementaires ou n'aient pas été signées par leur auteur n'est pas de nature à entraîner l'annulation des votes ainsi émis dès lors qu'il n'est établi ni que les intéressés aient illégalement voté par correspondance ni qu'à la faveur de ces omissions des votes par correspondance aient été frauduleusement enregistrés</text:p>
          </table:table-cell>
          <table:table-cell table:number-columns-repeated="16377"/>
        </table:table-row>
        <table:table-row table:style-name="ro1">
          <table:table-cell office:value-type="string" table:style-name="ce3">
            <text:p>Oui</text:p>
          </table:table-cell>
          <table:table-cell office:value-type="string" table:style-name="ce3">
            <text:p>considérants 1-11, 14-16, 18, 21, 23, 24, 2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68_annot.xml</text:p>
          </table:table-cell>
          <table:table-cell office:value-type="string" table:style-name="ce3">
            <text:p>7.Opérations</text:p>
          </table:table-cell>
          <table:table-cell office:value-type="string" table:style-name="ce3">
            <text:p><text:s/>17. Considérant que, dans la commune de Veyrac, un électeur domicilé à Pontoise a adressé un certificat médical au maire à une date trop tardive pour permettre l'accomplissement des formalités prescrites par les articles R. 83 et R. 87 du, code électoral qu'il y a lieu pour ce motif, d'annuler le vote par correspondance émis par cet électeur ; qu'en revanche, en ce qui concerne les autres votes contestés, il n'est pas établi que la date à laquelle les justifications sont parvenues au maire ait fait obstacle à l'accomplissement desdites formalités ; Sur les griefs tirés d'irrégularités entachant l'envoi aux électeurs des documents nécessaires à l'exercice du vote par correspondance et l'envoi des votes par correspondance aux bureaux de vote</text:p>
          </table:table-cell>
          <table:table-cell table:number-columns-repeated="16377"/>
        </table:table-row>
        <table:table-row table:style-name="ro1">
          <table:table-cell office:value-type="string" table:style-name="ce3">
            <text:p>Oui</text:p>
          </table:table-cell>
          <table:table-cell office:value-type="string" table:style-name="ce3">
            <text:p>considérants 1-11, 14-16, 18, 21, 23, 24, 2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68_annot.xml</text:p>
          </table:table-cell>
          <table:table-cell office:value-type="string" table:style-name="ce3">
            <text:p>7.Opérations</text:p>
          </table:table-cell>
          <table:table-cell office:value-type="string" table:style-name="ce3">
            <text:p><text:s/>19. Considérant qu'il est établi que soixante-dix électeurs inscrits sur les listes électorales des communes de Cahus, Cambes, Flaujac, Molières, Saint-Céré, Saint-Jean-Lagineste, Saint-Laurent-les-Tours, Saint-Chels, Souillac, Lachapelle-Aulac, Saint-Cirgues, Latronquière, Gorses, Martel, Baladou, Capdenac, Saint-Denis près-Martel, Carennac, Figeac, Felzins, Lunan et Béduer ont exercé le droit de vote par correspondance sans expédier leur vote sous pli recommandé comme l'imposent les dispositions de l'article R. 87 du code électoral que ces soixante-dix votes sont, dès lors, entachés de nullité que, par contre, le fait que des électeurs aient envoyé leur vote avant qu'aient été officiellement connus les noms des candidats au second tour de scrutin, que quelques électeurs n'aient pas signé la carte électorale qu'ils ont jointe à leur envoi, est sans influence sur la régularité des votes ainsi émis ; qu'il en est de même de la circonstance que des enveloppes contenant des votes par correspondance aient été expédiées d'une commune autre que celle ou l'intéressé avait demandé que lui fussent adressés les documents relatifs au vote par correspondance, dès lors qu'il n'est pas établi que ces votes, qui pouvaient régulièrement être postés par des tiers, n'aient pas été émis par les intéressés eux-mêmes ; Sur les griefs tirés d'irrégularités commises dans l'accomplissement des opérations incombant aux bureaux de vote pendant le scrutin et aux maires postérieurement à là clôture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1-11, 14-16, 18, 21, 23, 24, 2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68_annot.xml</text:p>
          </table:table-cell>
          <table:table-cell office:value-type="string" table:style-name="ce3">
            <text:p>7.Opérations</text:p>
          </table:table-cell>
          <table:table-cell office:value-type="string" table:style-name="ce3">
            <text:p><text:s/>20. Considérant qu'il résulte de l'instruction, et notamment des procès-verbaux d'affichage annexés aux procès-verbaux des opérations électorales, que ; contrairement à ce que soutient le requérant, la liste des électeurs ayant demandé à voter par correspondance a été régulièrement affichée dans les bureaux de vote des communes de Sonac, Boussac et Brengues ; que si deux de ces listes ne portaient pas mention du nom des électeurs admis à voter par correspondance, cette omission ne fait pas, en l'espèce, obstacle à la vérification de la régularité des votes émis, et que l'instruction ne révèle l'existence d'aucune manoeuvre frauduleuse ; qu'il en est de même de la circonstance que dans les communes de Lacapelle-Marival, Grèzes et Padirac le procès-verbal des opérations de réception et d'ouverture des plis et d'enregistrement des votes ne comporte pas toutes les mentions réglementaires</text:p>
          </table:table-cell>
          <table:table-cell table:number-columns-repeated="16377"/>
        </table:table-row>
        <table:table-row table:style-name="ro1">
          <table:table-cell office:value-type="string" table:style-name="ce3">
            <text:p>Oui</text:p>
          </table:table-cell>
          <table:table-cell office:value-type="string" table:style-name="ce3">
            <text:p>considérants 1-11, 14-16, 18, 21, 23, 24, 2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68_annot.xml</text:p>
          </table:table-cell>
          <table:table-cell office:value-type="string" table:style-name="ce3">
            <text:p>7.Opérations</text:p>
          </table:table-cell>
          <table:table-cell office:value-type="string" table:style-name="ce3">
            <text:p><text:s/>22. Considérant que si, dans la commune d'Aynac, deux votes ont été émis au vu d'une procuration qui ne faisait mention que du scrutin du 4 mars 1973, il résulte de l'instruction et, notamment, d'une attestation du juge d'instance devant lequel ces procurations ont été données, que dans l'intention de leurs auteurs, lesdites procurations étaient également valables pour le second tour du scrutin ; Sur les griefs autres que ceux relatifs au vote par correspondance et au vote par procuration</text:p>
          </table:table-cell>
          <table:table-cell table:number-columns-repeated="16377"/>
        </table:table-row>
        <table:table-row table:style-name="ro1">
          <table:table-cell office:value-type="string" table:style-name="ce3">
            <text:p>Oui</text:p>
          </table:table-cell>
          <table:table-cell office:value-type="string" table:style-name="ce3">
            <text:p>considérants 3, 4, 7-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71_annot.xml</text:p>
          </table:table-cell>
          <table:table-cell office:value-type="string" table:style-name="ce3">
            <text:p>7.Opérations</text:p>
          </table:table-cell>
          <table:table-cell office:value-type="string" table:style-name="ce3">
            <text:p><text:s/>5. Considérant, en second lieu, que les allégations relatives au désordre qui aurait régné au premier bureau de vote du Lamentin et à la non-fermeture de l'urne dans ce bureau ne sont confirmées que par les délégués et assesseurs du candidat, alors qu'aucune mention en ce sens ne figure au Procès-verbal</text:p>
          </table:table-cell>
          <table:table-cell table:number-columns-repeated="16377"/>
        </table:table-row>
        <table:table-row table:style-name="ro1">
          <table:table-cell office:value-type="string" table:style-name="ce3">
            <text:p>Oui</text:p>
          </table:table-cell>
          <table:table-cell office:value-type="string" table:style-name="ce3">
            <text:p>considérants 3, 4, 7-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3\rejet\CONSTEXT000017665671_annot.xml</text:p>
          </table:table-cell>
          <table:table-cell office:value-type="string" table:style-name="ce3">
            <text:p>7.Opérations</text:p>
          </table:table-cell>
          <table:table-cell office:value-type="string" table:style-name="ce3">
            <text:p><text:s/>6. Considérant, en troisième lieu, qu'il n'est établi, ni que des électeurs régulièrement inscrits aient été empêchés de voter à Morne-à-l'Eau, ni que des procurations aient été irrégulièrement établies et utilisées au nom de certains électeurs de cette commune</text:p>
          </table:table-cell>
          <table:table-cell table:number-columns-repeated="16377"/>
        </table:table-row>
        <table:table-row table:style-name="ro1">
          <table:table-cell office:value-type="string" table:style-name="ce3">
            <text:p>Oui</text:p>
          </table:table-cell>
          <table:table-cell office:value-type="string" table:style-name="ce3">
            <text:p>considérants 1-9, 11-14, 16, 18 et 19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4\rejet\CONSTEXT000017665592_annot.xml</text:p>
          </table:table-cell>
          <table:table-cell office:value-type="string" table:style-name="ce3">
            <text:p>7.Opérations</text:p>
          </table:table-cell>
          <table:table-cell office:value-type="string" table:style-name="ce3">
            <text:p><text:s/>10. Considérant que si, pour la ville de Pau qui compte 31 bureaux de vote, trois registres seulement de récépissés d'envoi des instruments de vote aux électeurs ont été établis et si, par voie de conséquence, il n'a pas été possible de déposer sur la table de vote de chacun des 31 bureaux les récépissés de dépôt délivrés par l'Administration des Postes pour les envois recommandés effectués par le maire, ainsi que le prévoit le 2e alinéa de l'article R. 88 du code électoral, il résulte des déclarations du maire de Pau, dont l'exactitude n'est pas contestée par le requérant, que ces trois registres ont été laissés à la disposition du public, à la mairie, pendant les heures de scrutin ; que, si les envois de plis aux électeurs étant groupés, des récépissés collectifs ont été établis par l'Administration des Postes, cette pratique, qui n'est pas le fait des services municipaux chargés de l'instruction des dossiers de vote par correspondance, n'est pas irrégulière ; Sur l'envoi des votes par correspondance aux bureaux de vote</text:p>
          </table:table-cell>
          <table:table-cell table:number-columns-repeated="16377"/>
        </table:table-row>
        <table:table-row table:style-name="ro1">
          <table:table-cell office:value-type="string" table:style-name="ce3">
            <text:p>Oui</text:p>
          </table:table-cell>
          <table:table-cell office:value-type="string" table:style-name="ce3">
            <text:p>considérants 1-9, 11-14, 16, 18 et 19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4\rejet\CONSTEXT000017665592_annot.xml</text:p>
          </table:table-cell>
          <table:table-cell office:value-type="string" table:style-name="ce3">
            <text:p>7.Opérations</text:p>
          </table:table-cell>
          <table:table-cell office:value-type="string" table:style-name="ce3">
            <text:p><text:s/>15. Considérant qu'il résulte de l'instruction qu'au 6e bureau de vote de la ville de Pau un bulletin de vote a été introduit par un assesseur qui était allé recueillir ce suffrage en dehors du bureau de vote auprès d'un électeur infirme; qu'en l'absence de procuration le vote ainsi émis par l'intermédiaire d'un tiers est nul ; que, M. LABARRERE étant arrivé en tête dans ce bureau de vote, il y a lieu de réduire d'une voix le nombre des suffrages qu'il a obtenus ; En ce gui concerne le décompte des voix</text:p>
          </table:table-cell>
          <table:table-cell table:number-columns-repeated="16377"/>
        </table:table-row>
        <table:table-row table:style-name="ro1">
          <table:table-cell office:value-type="string" table:style-name="ce3">
            <text:p>Oui</text:p>
          </table:table-cell>
          <table:table-cell office:value-type="string" table:style-name="ce3">
            <text:p>considérants 1-9, 11-14, 16, 18 et 19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4\rejet\CONSTEXT000017665592_annot.xml</text:p>
          </table:table-cell>
          <table:table-cell office:value-type="string" table:style-name="ce3">
            <text:p>7.Opérations</text:p>
          </table:table-cell>
          <table:table-cell office:value-type="string" table:style-name="ce3">
            <text:p><text:s/>17. Considérant qu'il résulte de l'examen des bulletins de vote annexés au procès-verbal de l'élection dans la commune d'Artigueloutan que c'est à bon droit que trois bulletins de vote au nom du requérant ont été tenus pour nuls au motif que le nom du suppléant avait été rayé ; qu'il n'est pas établi que ces bulletins avaient été rayés par avance et glissés dans la pile de bulletins de vote mis à la disposition des électeurs</text:p>
          </table:table-cell>
          <table:table-cell table:number-columns-repeated="16377"/>
        </table:table-row>
        <table:table-row table:style-name="ro1">
          <table:table-cell office:value-type="string" table:style-name="ce3">
            <text:p>Non</text:p>
          </table:table-cell>
          <table:table-cell office:value-type="string" table:style-name="ce3">
            <text:p>considérant 4 n'est pas annoté</text:p>
          </table:table-cell>
          <table:table-cell office:value-type="string" table:style-name="ce3">
            <text:p>annotation intervient au milieu du considérant.</text:p>
          </table:table-cell>
          <table:table-cell office:value-type="string" table:style-name="ce3">
            <text:p><text:s/>3. Candidature</text:p>
          </table:table-cell>
          <table:table-cell office:value-type="string" table:style-name="ce3">
            <text:p>file:\\\P:\CRJ\RECHERCHE\PROJET_JADE\JADE_COMMUN\Annotation\Annotation_automatique_Maritaud\Technologie_light\Super-catégories-objets_0,8\AN\1976\rejet\CONSTEXT000017665710_annot.xml</text:p>
          </table:table-cell>
          <table:table-cell office:value-type="string" table:style-name="ce3">
            <text:p>4.Campagne</text:p>
          </table:table-cell>
          <table:table-cell office:value-type="string" table:style-name="ce3">
            <text:p><text:s/>0. 153 du code électoral ni telles de l'article L.</text:p>
          </table:table-cell>
          <table:table-cell table:number-columns-repeated="16377"/>
        </table:table-row>
        <table:table-row table:style-name="ro1">
          <table:table-cell office:value-type="string" table:style-name="ce3">
            <text:p>Oui</text:p>
          </table:table-cell>
          <table:table-cell office:value-type="string" table:style-name="ce3">
            <text:p>considérants 2 et 3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7\rejet\CONSTEXT000017665738_annot.xml</text:p>
          </table:table-cell>
          <table:table-cell office:value-type="string" table:style-name="ce3">
            <text:p>7.Opérations</text:p>
          </table:table-cell>
          <table:table-cell office:value-type="string" table:style-name="ce3">
            <text:p><text:s/>1. Considérant, en premier lieu, que, s'il résulte de l'examen des procès-verbaux des opérations électorales que le nombre des enveloppes et bulletins trouvés dans les urnes est supérieur de quatre unités à celui des émargements pour l'ensemble des bureaux N° 5, 18 et 32 et inférieur de 52 unités pour l'ensemble des bureaux N° 6, 19 et 33, il n'apparaît pas que ces discordances proviennent de manoeuvres frauduleuses ; qu'en tout état de cause elles n'ont pu influer sur le résultat du scrutin, le candidat proclamé élu ayant obtenu mille voix de plus que la majorité absolue</text:p>
          </table:table-cell>
          <table:table-cell table:number-columns-repeated="16377"/>
        </table:table-row>
        <table:table-row table:style-name="ro1">
          <table:table-cell office:value-type="string" table:style-name="ce3">
            <text:p>Oui</text:p>
          </table:table-cell>
          <table:table-cell office:value-type="string" table:style-name="ce3">
            <text:p>considérants 1, 3 et 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8\rejet\CONSTEXT000017665704_annot.xml</text:p>
          </table:table-cell>
          <table:table-cell office:value-type="string" table:style-name="ce3">
            <text:p>4.Campagne</text:p>
          </table:table-cell>
          <table:table-cell office:value-type="string" table:style-name="ce3">
            <text:p><text:s/>2. Considérant, d'autre part, que, si M. Mondargent a fait diffuser une brochure dont la typographie faisait usage des trois couleurs bleu, blanc et rouge, le mode de présentation et la diffusion de cette brochure n'ont pas exercé une influence appréciable sur le résultat du scrutin ; Sur les griefs tirés des pressions qui ont été exercées sur les électeurs</text:p>
          </table:table-cell>
          <table:table-cell table:number-columns-repeated="16377"/>
        </table:table-row>
        <table:table-row table:style-name="ro1">
          <table:table-cell office:value-type="string" table:style-name="ce5">
            <text:p>Oui</text:p>
          </table:table-cell>
          <table:table-cell office:value-type="string" table:style-name="ce3">
            <text:p>considérants 2, 3 et 4 ne sont pas annotés</text:p>
          </table:table-cell>
          <table:table-cell table:number-columns-repeated="2" table:style-name="ce3"/>
          <table:table-cell office:value-type="string" table:style-name="ce9">
            <text:p><text:a xlink:href="file:///C:/Users/anais/Downloads/AN/1978/rejet/CONSTEXT000017665790_annot.xml">file:\\\P:\CRJ\RECHERCHE\PROJET_JADE\JADE_COMMUN\Annotation\Annotation_automatique_Maritaud\Technologie_light\Super-catégories-objets_0,8\AN\1978\rejet\CONSTEXT000017665790_annot.xml</text:a></text:p>
          </table:table-cell>
          <table:table-cell office:value-type="string" table:style-name="ce3">
            <text:p>4.Campagne</text:p>
          </table:table-cell>
          <table:table-cell office:value-type="string" table:style-name="ce3">
            <text:p><text:s/>5. Considérant que cette mise au point, émanant d'un organisme officiel institué par la loi, avait été établie sur réclamation de M. Hernu et adressée à celui-ci ainsi qu'à M. Benoist ; qu'elle faisait suite à la diffusion de tracts mentionnant des 'sondages officiels' favorables à M. Benoist et des estimations 'lui donnant 25 p. 100 au premier tour' ; que la commission des sondages se bornait à rappeler qu'il n'y a pas de sondages officiels, qu'il ne doit pas être fait état de sondages sans indication de leur origine et à préciser que les estimations données dans le tract contesté ne résultaient pas de sondages ; qu'ainsi la publicité donnée à ladite mise au point a constitué, de la part de ses auteurs, une réplique à la propagande électorale de M. Benoist</text:p>
          </table:table-cell>
          <table:table-cell table:number-columns-repeated="16377"/>
        </table:table-row>
        <table:table-row table:style-name="ro1">
          <table:table-cell office:value-type="string" table:style-name="ce3">
            <text:p>Oui</text:p>
          </table:table-cell>
          <table:table-cell office:value-type="string" table:style-name="ce3">
            <text:p>considérants 2, 3, 5, 7, 8, 9 et 10 ne sont pas annotés</text:p>
          </table:table-cell>
          <table:table-cell table:number-columns-repeated="2" table:style-name="ce3"/>
          <table:table-cell office:value-type="string" table:style-name="ce9">
            <text:p><text:a xlink:href="file:///C:/Users/anais/Downloads/AN/1978/rejet/CONSTEXT000017665793_annot.xml">file:\\\P:\CRJ\RECHERCHE\PROJET_JADE\JADE_COMMUN\Annotation\Annotation_automatique_Maritaud\Technologie_light\Super-catégories-objets_0,8\AN\1978\rejet\CONSTEXT000017665793_annot.xml</text:a></text:p>
          </table:table-cell>
          <table:table-cell office:value-type="string" table:style-name="ce3">
            <text:p>4.Campagne</text:p>
          </table:table-cell>
          <table:table-cell office:value-type="string" table:style-name="ce3">
            <text:p><text:s/>4. Considérant que l'intervention du sénateur Valcin, sur les antennes de la station de radiodiffusion FR 3 Martinique, le 10 mars 1978, pour regrettables qu'en soient certains passages, n'a pu, eu égard au nombre des suffrages recueillis par M. Petit, exercer sur l'élection une influence suffisante pour modifier le sens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1, 2, 3 et 4 ne sont pas annotés</text:p>
          </table:table-cell>
          <table:table-cell table:number-columns-repeated="2" table:style-name="ce3"/>
          <table:table-cell office:value-type="string" table:style-name="ce9">
            <text:p><text:a xlink:href="file:///C:/Users/anais/Downloads/AN/1978/rejet/CONSTEXT000017665795_annot.xml">file:\\\P:\CRJ\RECHERCHE\PROJET_JADE\JADE_COMMUN\Annotation\Annotation_automatique_Maritaud\Technologie_light\Super-catégories-objets_0,8\AN\1978\rejet\CONSTEXT000017665795_annot.xml</text:a></text:p>
          </table:table-cell>
          <table:table-cell office:value-type="string" table:style-name="ce3">
            <text:p>7.Opérations</text:p>
          </table:table-cell>
          <table:table-cell office:value-type="string" table:style-name="ce3">
            <text:p><text:s/>5. Considérant que les observations formulées aux procès-verbaux des premier et deuxième bureaux de Bonifacio, du bureau de vote de Sota et du deuxième bureau de vote de Levie, indiquent que 43 procurations au total comportent des vices de forme, tels que défaut de signature, de cachet ou mentions incomplètes ; que même en tenant pour nulles ces 43 procurations et en retranchant les 43 votes ainsi émis tant du nombre des suffrages exprimés que du nombre des voix recueillies par le candidat proclamé élu, arrivé en tête dans ces bureaux, les résultats du premier tour de scrutin n'auraient pu en être modifiés</text:p>
          </table:table-cell>
          <table:table-cell table:number-columns-repeated="16377"/>
        </table:table-row>
        <table:table-row table:style-name="ro1">
          <table:table-cell office:value-type="string" table:style-name="ce3">
            <text:p>Oui</text:p>
          </table:table-cell>
          <table:table-cell office:value-type="string" table:style-name="ce3">
            <text:p>considérants 1, 2, 3, 4, 5, 6, 7, 8, 9, 11 et 13 ne sont pas annotés</text:p>
          </table:table-cell>
          <table:table-cell table:number-columns-repeated="2" table:style-name="ce3"/>
          <table:table-cell office:value-type="string" table:style-name="ce9">
            <text:p><text:a xlink:href="file:///C:/Users/anais/Downloads/AN/1978/rejet/CONSTEXT000017665799_annot.xml">file:\\\P:\CRJ\RECHERCHE\PROJET_JADE\JADE_COMMUN\Annotation\Annotation_automatique_Maritaud\Technologie_light\Super-catégories-objets_0,8\AN\1978\rejet\CONSTEXT000017665799_annot.xml</text:a></text:p>
          </table:table-cell>
          <table:table-cell office:value-type="string" table:style-name="ce3">
            <text:p>7.Opérations</text:p>
          </table:table-cell>
          <table:table-cell office:value-type="string" table:style-name="ce3">
            <text:p><text:s/>10. Considérant que le requérant soutient que des votes ont été émis au nom de personnes décédées, que des attestations d'inscription sur les listes électorales ont été irrégulièrement délivrées à certains électeurs à l'intérieur des bureaux de vote, que certains électeurs ont voté plusieurs fois et que des distributions de bulletins ont eu lieu à l'intérieur des bureaux de vote ; qu'il n'apporte à l'appui de ces allégations aucun commencement de preuve</text:p>
          </table:table-cell>
          <table:table-cell table:number-columns-repeated="16377"/>
        </table:table-row>
        <table:table-row table:style-name="ro1">
          <table:table-cell office:value-type="string" table:style-name="ce3">
            <text:p>Oui</text:p>
          </table:table-cell>
          <table:table-cell office:value-type="string" table:style-name="ce3">
            <text:p>considérants 1, 2, 3, 4, 5, 6, 7, 8, 9, 11 et 13 ne sont pas annotés</text:p>
          </table:table-cell>
          <table:table-cell table:number-columns-repeated="2" table:style-name="ce3"/>
          <table:table-cell office:value-type="string" table:style-name="ce9">
            <text:p><text:a xlink:href="file:///C:/Users/anais/Downloads/AN/1978/rejet/CONSTEXT000017665799_annot.xml">file:\\\P:\CRJ\RECHERCHE\PROJET_JADE\JADE_COMMUN\Annotation\Annotation_automatique_Maritaud\Technologie_light\Super-catégories-objets_0,8\AN\1978\rejet\CONSTEXT000017665799_annot.xml</text:a></text:p>
          </table:table-cell>
          <table:table-cell office:value-type="string" table:style-name="ce3">
            <text:p>7.Opérations</text:p>
          </table:table-cell>
          <table:table-cell office:value-type="string" table:style-name="ce3">
            <text:p><text:s/>12. Considérant que le requérant soutient que des électeurs ont voté sans passer par les isoloirs ; qu'il n'est pas établi que cette irrégularité, constatée dans un seul bureau de vote de la commune de Fort-de-France, aurait résulté d'une pression ou d'une contrainte ; que, dès lors, elle n'a pas porté atteinte à la sincérité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1 et 3 ne sont pas annotés</text:p>
          </table:table-cell>
          <table:table-cell table:number-columns-repeated="2" table:style-name="ce3"/>
          <table:table-cell office:value-type="string" table:style-name="ce9">
            <text:p><text:a xlink:href="file:///C:/Users/anais/Downloads/AN/1978/rejet/CONSTEXT000017665800_annot.xml">file:\\\P:\CRJ\RECHERCHE\PROJET_JADE\JADE_COMMUN\Annotation\Annotation_automatique_Maritaud\Technologie_light\Super-catégories-objets_0,8\AN\1978\rejet\CONSTEXT000017665800_annot.xml</text:a></text:p>
          </table:table-cell>
          <table:table-cell office:value-type="string" table:style-name="ce3">
            <text:p>4.Campagne</text:p>
          </table:table-cell>
          <table:table-cell office:value-type="string" table:style-name="ce3">
            <text:p><text:s/>2. Considérant que la date de diffusion du tract incriminé, ainsi que son origine, sont incertaines ; que les faits évoqués dans ce tract avaient fait l'objet, depuis plusieurs mois, d'articles de presse et qu'ils ne constituaient donc pas des éléments nouveaux introduits dans le débat électoral à la veille du scrutin ; que l'allégation selon laquelle des affiches auraient été irrégulièrement apposées n'est assortie d'aucune précision permettant d'en apprécier la réalité</text:p>
          </table:table-cell>
          <table:table-cell table:number-columns-repeated="16377"/>
        </table:table-row>
        <table:table-row table:style-name="ro1">
          <table:table-cell office:value-type="string" table:style-name="ce3">
            <text:p>Oui</text:p>
          </table:table-cell>
          <table:table-cell office:value-type="string" table:style-name="ce3">
            <text:p>considérants 1 et 2 ne sont pas annotés</text:p>
          </table:table-cell>
          <table:table-cell table:number-columns-repeated="2" table:style-name="ce3"/>
          <table:table-cell office:value-type="string" table:style-name="ce9">
            <text:p><text:a xlink:href="file:///C:/Users/anais/Downloads/AN/1978/rejet/CONSTEXT000017665803_annot.xml">file:\\\P:\CRJ\RECHERCHE\PROJET_JADE\JADE_COMMUN\Annotation\Annotation_automatique_Maritaud\Technologie_light\Super-catégories-objets_0,8\AN\1978\rejet\CONSTEXT000017665803_annot.xml</text:a></text:p>
          </table:table-cell>
          <table:table-cell office:value-type="string" table:style-name="ce3">
            <text:p>4.Campagne</text:p>
          </table:table-cell>
          <table:table-cell office:value-type="string" table:style-name="ce3">
            <text:p><text:s/>3. Considérant qu'il résulte de ce qui précède que la diffusion de ces tracts, si elle a été faite en méconnaissance des dispositions de l'article L. 165 du Code électoral, n'a pu avoir pour conséquence de tromper les électeurs ; que, dès lors, la requête de M. Garson doit être rejetée ;</text:p>
          </table:table-cell>
          <table:table-cell table:number-columns-repeated="16377"/>
        </table:table-row>
        <table:table-row table:style-name="ro1">
          <table:table-cell office:value-type="string" table:style-name="ce3">
            <text:p>Oui</text:p>
          </table:table-cell>
          <table:table-cell office:value-type="string" table:style-name="ce3">
            <text:p>considérant 1 n'est pas annoté</text:p>
          </table:table-cell>
          <table:table-cell table:number-columns-repeated="2" table:style-name="ce3"/>
          <table:table-cell office:value-type="string" table:style-name="ce9">
            <text:p><text:a xlink:href="file:///C:/Users/anais/Downloads/AN/1978/rejet/CONSTEXT000017665804_annot.xml">file:\\\P:\CRJ\RECHERCHE\PROJET_JADE\JADE_COMMUN\Annotation\Annotation_automatique_Maritaud\Technologie_light\Super-catégories-objets_0,8\AN\1978\rejet\CONSTEXT000017665804_annot.xml</text:a></text:p>
          </table:table-cell>
          <table:table-cell office:value-type="string" table:style-name="ce3">
            <text:p>4.Campagne</text:p>
          </table:table-cell>
          <table:table-cell office:value-type="string" table:style-name="ce3">
            <text:p><text:s/>2. Considérant, d'autre part, que la circonstance que les bulletins de M. de Robien, lors du premier tour, comportaient la mention 'Pour le président' ne peut être regardée comme une irrégularité au regard des prescriptions de l'article R. 103 du Code électoral ; qu'elle n'a pas présenté, en l'espèce, le caractère d'une manoeuvre destinée à abuser le corps électoral</text:p>
          </table:table-cell>
          <table:table-cell table:number-columns-repeated="16377"/>
        </table:table-row>
        <table:table-row table:style-name="ro1">
          <table:table-cell office:value-type="string" table:style-name="ce3">
            <text:p>Oui</text:p>
          </table:table-cell>
          <table:table-cell office:value-type="string" table:style-name="ce3">
            <text:p>considérants 1, 2 et 4 ne sont pas annotés</text:p>
          </table:table-cell>
          <table:table-cell table:number-columns-repeated="2" table:style-name="ce3"/>
          <table:table-cell office:value-type="string" table:style-name="ce9">
            <text:p><text:a xlink:href="file:///C:/Users/anais/Downloads/AN/1978/rejet/CONSTEXT000017665806_annot.xml">file:\\\P:\CRJ\RECHERCHE\PROJET_JADE\JADE_COMMUN\Annotation\Annotation_automatique_Maritaud\Technologie_light\Super-catégories-objets_0,8\AN\1978\rejet\CONSTEXT000017665806_annot.xml</text:a></text:p>
          </table:table-cell>
          <table:table-cell office:value-type="string" table:style-name="ce3">
            <text:p>4.Campagne</text:p>
          </table:table-cell>
          <table:table-cell office:value-type="string" table:style-name="ce3">
            <text:p><text:s/>3. Considérant, d'une part, que, si le requérant indique que M. Janot se serait livré à un affichage irrégulier, qu'il aurait suscité dans la presse locale une campagne de dénigrement à son encontre et qu'il aurait procédé au lancement d'un journal électoral distribué pendant la campagne, la réalité des griefs qu'il invoque n'est pas établie</text:p>
          </table:table-cell>
          <table:table-cell table:number-columns-repeated="16377"/>
        </table:table-row>
        <table:table-row table:style-name="ro1">
          <table:table-cell office:value-type="string" table:style-name="ce3">
            <text:p>Oui</text:p>
          </table:table-cell>
          <table:table-cell office:value-type="string" table:style-name="ce3">
            <text:p>considérants 1, 4, 5, 7, 8, 9, 11 et 12 ne sont pas annotés</text:p>
          </table:table-cell>
          <table:table-cell table:number-columns-repeated="2" table:style-name="ce3"/>
          <table:table-cell office:value-type="string" table:style-name="ce9">
            <text:p><text:a xlink:href="file:///C:/Users/anais/Downloads/AN/1978/rejet/CONSTEXT000017665807_annot.xml">file:\\\P:\CRJ\RECHERCHE\PROJET_JADE\JADE_COMMUN\Annotation\Annotation_automatique_Maritaud\Technologie_light\Super-catégories-objets_0,8\AN\1978\rejet\CONSTEXT000017665807_annot.xml</text:a></text:p>
          </table:table-cell>
          <table:table-cell office:value-type="string" table:style-name="ce3">
            <text:p>4.Campagne</text:p>
          </table:table-cell>
          <table:table-cell office:value-type="string" table:style-name="ce3">
            <text:p><text:s/>6. Considérant enfin que, si un tract faussement attribué au Parti socialiste préconisait l'installation d'une centrale nucléaire à Paris, la diffusion de ce document, dont les requérants n'établissent pas quelle a été l'importance dans la deuxième circonscription, n'a pu avoir, en raison même du caractère fantaisiste des propositions qu'il contenait, d'influence appréciable sur les résultats du scrutin ; Sur le grief relatif à certains votes par procuration</text:p>
          </table:table-cell>
          <table:table-cell table:number-columns-repeated="16377"/>
        </table:table-row>
        <table:table-row table:style-name="ro1">
          <table:table-cell office:value-type="string" table:style-name="ce3">
            <text:p>Oui</text:p>
          </table:table-cell>
          <table:table-cell office:value-type="string" table:style-name="ce3">
            <text:p>considérants 1, 4, 5, 7, 8, 9, 11 et 1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8\rejet\CONSTEXT000017665807_annot.xml</text:p>
          </table:table-cell>
          <table:table-cell office:value-type="string" table:style-name="ce3">
            <text:p>7.Opérations</text:p>
          </table:table-cell>
          <table:table-cell office:value-type="string" table:style-name="ce3">
            <text:p><text:s/>10. Considérant, d'une part, qu'il résulte du procès-verbal des opérations électorales du premier tour dans le onzième bureau de vote du 3e arrondissement que, si, dans ce bureau, une centaine d'enveloppes ne provenant pas de l'urne ont été déposées sur une table de dépouillement, ces enveloppes ont pu être identifiées et ont été dépouillées séparément des enveloppes provenant de l'urne ; qu'ainsi, les bulletins contenus dans ces enveloppes introduites frauduleusement n'ont été décomptés ni dans l'état des suffrages du onzième bureau, ni dans les résultats d'ensemble de la circonscription ; que, toutefois, le nombre d'enveloppes trouvées dans l'urne est supérieur de sept unités au nombre des émargements ; qu'il convient, par suite, de retrancher sept voix du nombre des suffrages exprimés au premier tour en faveur de M. Dominati qui est arrivé en tête des candidats dans le onzième bureau de vote</text:p>
          </table:table-cell>
          <table:table-cell table:number-columns-repeated="16377"/>
        </table:table-row>
        <table:table-row table:style-name="ro1">
          <table:table-cell office:value-type="string" table:style-name="ce3">
            <text:p>Non</text:p>
          </table:table-cell>
          <table:table-cell office:value-type="string" table:style-name="ce3">
            <text:p>considérants 1, 4, 5, 7, 8, 9, 11 et 12 ne sont pas annotés</text:p>
          </table:table-cell>
          <table:table-cell office:value-type="string" table:style-name="ce3">
            <text:p>Synthèse griefs</text:p>
          </table:table-cell>
          <table:table-cell table:style-name="ce3"/>
          <table:table-cell office:value-type="string" table:style-name="ce3">
            <text:p>file:\\\P:\CRJ\RECHERCHE\PROJET_JADE\JADE_COMMUN\Annotation\Annotation_automatique_Maritaud\Technologie_light\Super-catégories-objets_0,8\AN\1978\rejet\CONSTEXT000017665807_annot.xml</text:p>
          </table:table-cell>
          <table:table-cell office:value-type="string" table:style-name="ce3">
            <text:p>7.Opérations</text:p>
          </table:table-cell>
          <table:table-cell office:value-type="string" table:style-name="ce3">
            <text:p><text:s/>13. Considérant qu'il résulte de tout ce qui précède que les requérants ne sont pas fondés à demander l'annulation des opérations électorales du premier tour de scrutin et, par voie de conséquence, celle des opérations du deuxième tour dans la deuxième circonscription de Paris ;</text:p>
          </table:table-cell>
          <table:table-cell table:number-columns-repeated="16377"/>
        </table:table-row>
        <table:table-row table:style-name="ro1">
          <table:table-cell office:value-type="string" table:style-name="ce3">
            <text:p>Oui</text:p>
          </table:table-cell>
          <table:table-cell office:value-type="string" table:style-name="ce3">
            <text:p>considérants 6, 7 et 8 ne sont pas annotés</text:p>
          </table:table-cell>
          <table:table-cell table:number-columns-repeated="2" table:style-name="ce3"/>
          <table:table-cell office:value-type="string" table:style-name="ce9">
            <text:p><text:a xlink:href="file:///C:/Users/anais/Downloads/AN/1978/rejet/CONSTEXT000017665811_annot.xml">file:\\\P:\CRJ\RECHERCHE\PROJET_JADE\JADE_COMMUN\Annotation\Annotation_automatique_Maritaud\Technologie_light\Super-catégories-objets_0,8\AN\1978\rejet\CONSTEXT000017665811_annot.xml</text:a></text:p>
          </table:table-cell>
          <table:table-cell office:value-type="string" table:style-name="ce3">
            <text:p>7.Opérations</text:p>
          </table:table-cell>
          <table:table-cell office:value-type="string" table:style-name="ce3">
            <text:p><text:s/>9. Considérant que, si le même bureau de vote ne comprenait, au moment de l'ouverture du scrutin, que le président et le secrétaire, alors que le dernier alinéa de l'article R. 42 du Code électoral dispose que trois membres du bureau de vote au moins doivent être présents pendant tout le cours des opérations électorales, cette irrégularité, dont il n'est pas allégué qu'elle ait favorisé une manoeuvre quelconque, ne peut être regardée comme ayant pu altérer la sincérité du scrutin dans ce bureau de vote,</text:p>
          </table:table-cell>
          <table:table-cell table:number-columns-repeated="16377"/>
        </table:table-row>
        <table:table-row table:style-name="ro1">
          <table:table-cell office:value-type="string" table:style-name="ce3">
            <text:p>Oui</text:p>
          </table:table-cell>
          <table:table-cell office:value-type="string" table:style-name="ce3">
            <text:p>considérants 2, 3, 4, 5, 6, 8, 9, 10 et 11 ne sont pas annotés</text:p>
          </table:table-cell>
          <table:table-cell table:number-columns-repeated="2" table:style-name="ce3"/>
          <table:table-cell office:value-type="string" table:style-name="ce9">
            <text:p><text:a xlink:href="file:///C:/Users/anais/Downloads/AN/1978/rejet/CONSTEXT000017665813_annot.xml">file:\\\P:\CRJ\RECHERCHE\PROJET_JADE\JADE_COMMUN\Annotation\Annotation_automatique_Maritaud\Technologie_light\Super-catégories-objets_0,8\AN\1978\rejet\CONSTEXT000017665813_annot.xml</text:a></text:p>
          </table:table-cell>
          <table:table-cell office:value-type="string" table:style-name="ce3">
            <text:p>4.Campagne</text:p>
          </table:table-cell>
          <table:table-cell office:value-type="string" table:style-name="ce3">
            <text:p><text:s/>1. Considérant que le requérant allègue que M.Maximin a fait apposer, en dehors des emplacements réglementaires, des affiches comportant une combinaison des trois couleurs bleu, blanc, rouge ; que cette infraction aux dispositions du code électoral, qui n'a pas eu pour effet de conférer à la candidature de M. Maximin un caractère officiel, n'a été constatée que sur une partie de la commune de Sainte-Pose et n'a donc pu exercer une influence appréciable sur le résultat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2, 3, 4, 5, 6, 8, 9, 10 et 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8\rejet\CONSTEXT000017665813_annot.xml</text:p>
          </table:table-cell>
          <table:table-cell office:value-type="string" table:style-name="ce3">
            <text:p>7.Opérations</text:p>
          </table:table-cell>
          <table:table-cell office:value-type="string" table:style-name="ce3">
            <text:p><text:s/>8. Considérant que, s'il résulte de l'instruction que dans plusieurs bureaux de vote de la commune de Sainte-Rose des électeurs ont voté sans passer par l'isoloir, cette irrégularité, dont il n'est pas allégué qu'elle aurait résulté d'une pression ou d'une contrainte, n'a pas porté atteinte à la sincérité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1, 3, 4, 5 et 6 ne sont pas annotés</text:p>
          </table:table-cell>
          <table:table-cell table:number-columns-repeated="2" table:style-name="ce3"/>
          <table:table-cell office:value-type="string" table:style-name="ce9">
            <text:p><text:a xlink:href="file:///C:/Users/anais/Downloads/AN/1978/rejet/CONSTEXT000017665818_annot.xml">file:\\\P:\CRJ\RECHERCHE\PROJET_JADE\JADE_COMMUN\Annotation\Annotation_automatique_Maritaud\Technologie_light\Super-catégories-objets_0,8\AN\1978\rejet\CONSTEXT000017665818_annot.xml</text:a></text:p>
          </table:table-cell>
          <table:table-cell office:value-type="string" table:style-name="ce3">
            <text:p>4.Campagne</text:p>
          </table:table-cell>
          <table:table-cell office:value-type="string" table:style-name="ce3">
            <text:p><text:s/>2. Considérant que le seul fait qu'une information soit diffusée par un émetteur public de radiodiffusion ou de télévision ne saurait suffire à lui conférer un caractère officiel ; que le requérant n'apporte aucun élément de preuve de nature à établir le caractère officiel de l'information contestée</text:p>
          </table:table-cell>
          <table:table-cell table:number-columns-repeated="16377"/>
        </table:table-row>
        <table:table-row table:style-name="ro1">
          <table:table-cell office:value-type="string" table:style-name="ce3">
            <text:p>Oui</text:p>
          </table:table-cell>
          <table:table-cell office:value-type="string" table:style-name="ce3">
            <text:p>considérants 3, 4, 6, 7, 8, 9 et 11 ne sont pas annotés</text:p>
          </table:table-cell>
          <table:table-cell table:number-columns-repeated="2" table:style-name="ce3"/>
          <table:table-cell office:value-type="string" table:style-name="ce9">
            <text:p><text:a xlink:href="file:///C:/Users/anais/Downloads/AN/1978/rejet/CONSTEXT000017665820_annot.xml">file:\\\P:\CRJ\RECHERCHE\PROJET_JADE\JADE_COMMUN\Annotation\Annotation_automatique_Maritaud\Technologie_light\Super-catégories-objets_0,8\AN\1978\rejet\CONSTEXT000017665820_annot.xml</text:a></text:p>
          </table:table-cell>
          <table:table-cell office:value-type="string" table:style-name="ce3">
            <text:p>4.Campagne</text:p>
          </table:table-cell>
          <table:table-cell office:value-type="string" table:style-name="ce3">
            <text:p><text:s/>5. Considérant que, si M. Jans a fait placarder sur ses panneaux électoraux des affichettes indiquant : ' Parfait Jans : Touche n° 1' à l'intention des électeurs de Levallois-Perret appelés à utiliser la machine à voter, cette simple information, qui ne faisait que rappeler une précision déjà donnée par des documents adressés par la préfecture au domicile des électeurs de cette commune, n'a pas constitué une pression susceptible d'altérer la sincérité du scrutin ; - Sur les griefs tirés des pressions qu'aurait exercées M. Jans en sa qualité de maire de Levallois-Perret</text:p>
          </table:table-cell>
          <table:table-cell table:number-columns-repeated="16377"/>
        </table:table-row>
        <table:table-row table:style-name="ro1">
          <table:table-cell office:value-type="string" table:style-name="ce3">
            <text:p>Oui</text:p>
          </table:table-cell>
          <table:table-cell office:value-type="string" table:style-name="ce3">
            <text:p>considérants 3, 4, 6, 7, 8, 9 et 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8\rejet\CONSTEXT000017665820_annot.xml</text:p>
          </table:table-cell>
          <table:table-cell office:value-type="string" table:style-name="ce3">
            <text:p>7.Opérations</text:p>
          </table:table-cell>
          <table:table-cell office:value-type="string" table:style-name="ce3">
            <text:p><text:s/>10. Considérant que, si deux personnes se sont plaintes de ce que les bureaux de vote de Clichy auraient été interdits au public à partir de 17 H 30, seuls les électeurs y étant admis pour voter, il n'est pas allégué que ce fait, qui n'a d'ailleurs fait l'objet d'aucune mention au procès-verbal des opérations de ces bureaux, aurait permis des fraudes de nature à altérer la sincérité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3, 4, 6, 7, 8, 9 et 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8\rejet\CONSTEXT000017665820_annot.xml</text:p>
          </table:table-cell>
          <table:table-cell office:value-type="string" table:style-name="ce3">
            <text:p>7.Opérations</text:p>
          </table:table-cell>
          <table:table-cell office:value-type="string" table:style-name="ce3">
            <text:p><text:s/>12. Considérant enfin que, s'il n'est pas contesté que l'émargement d'une électrice, munie d'une procuration qu'elle n'avait en fait pas pu utiliser, a été porté à tort, lors du premier tout de scrutin, sur la liste du douzième bureau de vote de Levallois-Perret, la nullité de ce vote ne saurait affecter les résultats des opérations électorales contestées ;</text:p>
          </table:table-cell>
          <table:table-cell table:number-columns-repeated="16377"/>
        </table:table-row>
        <table:table-row table:style-name="ro1">
          <table:table-cell office:value-type="string" table:style-name="ce6">
            <text:p>Oui</text:p>
          </table:table-cell>
          <table:table-cell office:value-type="string" table:style-name="ce3">
            <text:p>considérants 3, 4, 5 ne sont pas annotés</text:p>
          </table:table-cell>
          <table:table-cell table:number-columns-repeated="2" table:style-name="ce3"/>
          <table:table-cell office:value-type="string" table:style-name="ce9">
            <text:p><text:a xlink:href="file:///C:/Users/anais/Downloads/AN/1978/rejet/CONSTEXT000017665821_annot.xml">file:\\\P:\CRJ\RECHERCHE\PROJET_JADE\JADE_COMMUN\Annotation\Annotation_automatique_Maritaud\Technologie_light\Super-catégories-objets_0,8\AN\1978\rejet\CONSTEXT000017665821_annot.xml</text:a></text:p>
          </table:table-cell>
          <table:table-cell office:value-type="string" table:style-name="ce3">
            <text:p>4.Campagne</text:p>
          </table:table-cell>
          <table:table-cell office:value-type="string" table:style-name="ce3">
            <text:p><text:s/>6. Considérant que les affiches de M. Gourbeyre qui ont été recouvertes par les affiches d'autres candidats, notamment de M. Guastavino, ou bien lacérées, avaient été, d'après les déclarations mêmes du requérant et au vu des documents produits à leur appui, apposées sur des panneaux publicitaires ; que, même si elle a été antérieure à l'ouverture de la période électorale, la publicité ainsi faite contrevenait aux dispositions du Code électoral relatives à la propagande ; que, dès lors, les faits invoqués ne sauraient avoir porté atteinte à l'exercice par le requérant de ses droits d'affichage</text:p>
          </table:table-cell>
          <table:table-cell table:number-columns-repeated="16377"/>
        </table:table-row>
        <table:table-row table:style-name="ro1">
          <table:table-cell office:value-type="string" table:style-name="ce3">
            <text:p>Oui</text:p>
          </table:table-cell>
          <table:table-cell office:value-type="string" table:style-name="ce3">
            <text:p>considérants 2, 3, 4, 6, 8, 9, 10, 11 et 12 ne sont pas annotés</text:p>
          </table:table-cell>
          <table:table-cell table:number-columns-repeated="2" table:style-name="ce3"/>
          <table:table-cell office:value-type="string" table:style-name="ce9">
            <text:p><text:a xlink:href="file:///C:/Users/anais/Downloads/AN/1978/rejet/CONSTEXT000017665824_annot.xml">file:\\\P:\CRJ\RECHERCHE\PROJET_JADE\JADE_COMMUN\Annotation\Annotation_automatique_Maritaud\Technologie_light\Super-catégories-objets_0,8\AN\1978\rejet\CONSTEXT000017665824_annot.xml</text:a></text:p>
          </table:table-cell>
          <table:table-cell office:value-type="string" table:style-name="ce3">
            <text:p>4.Campagne</text:p>
          </table:table-cell>
          <table:table-cell office:value-type="string" table:style-name="ce3">
            <text:p><text:s/>1. Considérant que ce grief n'a été formulé que dans le mémoire ampliatif, après l'expiration du délai de recours ; qu'il n'est donc pas recevable ; Sur le grief relatif aux irrégularités de la campagne. électorale de M. Montagne : En ce qui concerne les informations tendancieuses ou mensongères qui auraient été publiées par des journaux soutenant la candidature de M. Montagne</text:p>
          </table:table-cell>
          <table:table-cell table:number-columns-repeated="16377"/>
        </table:table-row>
        <table:table-row table:style-name="ro1">
          <table:table-cell office:value-type="string" table:style-name="ce3">
            <text:p>Oui</text:p>
          </table:table-cell>
          <table:table-cell office:value-type="string" table:style-name="ce3">
            <text:p>considérants 2, 3, 4, 6, 8, 9, 10, 11 et 1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8\rejet\CONSTEXT000017665824_annot.xml</text:p>
          </table:table-cell>
          <table:table-cell office:value-type="string" table:style-name="ce3">
            <text:p>4.Campagne</text:p>
          </table:table-cell>
          <table:table-cell office:value-type="string" table:style-name="ce3">
            <text:p><text:s/>5. Considérant qu'il n'est pas établi que le tract intitulé 'Qui êtes-vous, M. Loncle ? 'ait été diffusé le samedi 18 mars 1975</text:p>
          </table:table-cell>
          <table:table-cell table:number-columns-repeated="16377"/>
        </table:table-row>
        <table:table-row table:style-name="ro1">
          <table:table-cell office:value-type="string" table:style-name="ce3">
            <text:p>Oui</text:p>
          </table:table-cell>
          <table:table-cell office:value-type="string" table:style-name="ce3">
            <text:p>considérants 2, 3, 4, 6, 8, 9, 10, 11 et 1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8\rejet\CONSTEXT000017665824_annot.xml</text:p>
          </table:table-cell>
          <table:table-cell office:value-type="string" table:style-name="ce3">
            <text:p>4.Campagne</text:p>
          </table:table-cell>
          <table:table-cell office:value-type="string" table:style-name="ce3">
            <text:p><text:s/>7. Considérant que, si un tract intitulé 'l'expérience marxiste' et invitant les électeurs à voter contre le programme commun a été distribué à Louviers le samedi 18 mars 1978, ce document n'apportait aucun élément nouveau dans la polémique électorale locale et ne citait même pas les noms des deux candidats en présence au second tour ; que, dès lors, pour regrettable qu'elle fût, la diffusion de ce tract ne peut être regardée comme une manoeuvre de dernière heure ayant eu pour effet de fausser la sincérité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3, 4, 5, 6, 10 et 12 ne sont pas annotés</text:p>
          </table:table-cell>
          <table:table-cell table:number-columns-repeated="2" table:style-name="ce3"/>
          <table:table-cell office:value-type="string" table:style-name="ce9">
            <text:p><text:a xlink:href="file:///C:/Users/anais/Downloads/AN/1978/rejet/CONSTEXT000017665827_annot.xml">file:\\\P:\CRJ\RECHERCHE\PROJET_JADE\JADE_COMMUN\Annotation\Annotation_automatique_Maritaud\Technologie_light\Super-catégories-objets_0,8\AN\1978\rejet\CONSTEXT000017665827_annot.xml</text:a></text:p>
          </table:table-cell>
          <table:table-cell office:value-type="string" table:style-name="ce3">
            <text:p>7.Opérations</text:p>
          </table:table-cell>
          <table:table-cell office:value-type="string" table:style-name="ce3">
            <text:p><text:s/>8. Considérant qu'aucune disposition de loi ou de décret relative au vote par procuration n'exige que le mandant connaisse personnellement le mandataire qu'il désigne ; que, dès lors, si les requérants allèguent que certains électeurs résidant en Côte-d'Ivoire, et dont le nombre n'est d'ailleurs pas précisé, auraient choisi comme mandataires des électeurs de Montpellier dont le nom leur avait été indiqué par des tiers, cette circonstance n'est pas de nature à entacher d'irrégularité ces procurations</text:p>
          </table:table-cell>
          <table:table-cell table:number-columns-repeated="16377"/>
        </table:table-row>
        <table:table-row table:style-name="ro1">
          <table:table-cell office:value-type="string" table:style-name="ce3">
            <text:p>Oui</text:p>
          </table:table-cell>
          <table:table-cell office:value-type="string" table:style-name="ce3">
            <text:p>considérants 3, 4, 5, 6, 10 et 1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8\rejet\CONSTEXT000017665827_annot.xml</text:p>
          </table:table-cell>
          <table:table-cell office:value-type="string" table:style-name="ce3">
            <text:p>7.Opérations</text:p>
          </table:table-cell>
          <table:table-cell office:value-type="string" table:style-name="ce3">
            <text:p><text:s/>9. Considérant que les requérants n'apportent pas la preuve que les procurations données par les électeurs résidant en Côte-d'Ivoire auraient été établies de manière incomplète par les autorités consulaires ; que si, dans un certain nombre de cas, les mentions relatives au mandant et au mandataire n'ont pas été rédigées par le signataire lui-même, cette constatation ne suffit pas à établir que le choix du mandataire n'aurait pas été fait par le mandant au moment où l'autorité consulaire a dressé la procuration</text:p>
          </table:table-cell>
          <table:table-cell table:number-columns-repeated="16377"/>
        </table:table-row>
        <table:table-row table:style-name="ro1">
          <table:table-cell office:value-type="string" table:style-name="ce3">
            <text:p>Oui</text:p>
          </table:table-cell>
          <table:table-cell office:value-type="string" table:style-name="ce3">
            <text:p>considérants 3, 4, 5, 6, 10 et 1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8\rejet\CONSTEXT000017665827_annot.xml</text:p>
          </table:table-cell>
          <table:table-cell office:value-type="string" table:style-name="ce3">
            <text:p>7.Opérations</text:p>
          </table:table-cell>
          <table:table-cell office:value-type="string" table:style-name="ce3">
            <text:p><text:s/>11. Considérant que les erreurs bénignes et purement matérielles, affectant le nom ou la date de naissance du mandant, qui ont été relevées sur 16 procurations n'entachent pas celles-ci d'irrégularité, dès lors que ces erreurs n'étaient pas de nature à susciter un doute ou une confusion quant à l'identité des auteurs de ces procurations</text:p>
          </table:table-cell>
          <table:table-cell table:number-columns-repeated="16377"/>
        </table:table-row>
        <table:table-row table:style-name="ro1">
          <table:table-cell office:value-type="string" table:style-name="ce3">
            <text:p>Oui</text:p>
          </table:table-cell>
          <table:table-cell office:value-type="string" table:style-name="ce3">
            <text:p>considérants 3, 4, 5, 6, 10 et 12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8\rejet\CONSTEXT000017665827_annot.xml</text:p>
          </table:table-cell>
          <table:table-cell office:value-type="string" table:style-name="ce3">
            <text:p>7.Opérations</text:p>
          </table:table-cell>
          <table:table-cell office:value-type="string" table:style-name="ce3">
            <text:p><text:s/>13. Considérant, par contre, que, pour 32 des procurations qui ont été utilisées lors du scrutin du 19 mars 1978, au premier bureau de vote de la première circonscription de l'Hérault, la signature du mandant ne correspond pas à celle qui figure sur la demande d'inscription de l'intéressé sur la liste électorale ; que ces procurations doivent être regardées comme irrégulières et qu'il y a lieu, par suite, de retrancher les 32 votes ainsi émis tant du nombre de suffrages exprimés que du nombre de voix recueilli par le candidat proclamé élu, arrivé en tête dans ce bureau ; mais que ce candidat, après cette déduction, conserve la majorité des suffrages exprimés au second tour du scrutin ;</text:p>
          </table:table-cell>
          <table:table-cell table:number-columns-repeated="16377"/>
        </table:table-row>
        <table:table-row table:style-name="ro1">
          <table:table-cell office:value-type="string" table:style-name="ce3">
            <text:p>Oui</text:p>
          </table:table-cell>
          <table:table-cell office:value-type="string" table:style-name="ce3">
            <text:p>considérants 1, 3, 4, 6, 7, 8, 9, 11, 12, 13, 14, 15 et 16 ne sont pas annotés</text:p>
          </table:table-cell>
          <table:table-cell table:number-columns-repeated="2" table:style-name="ce3"/>
          <table:table-cell office:value-type="string" table:style-name="ce9">
            <text:p><text:a xlink:href="file:///C:/Users/anais/Downloads/AN/1978/rejet/CONSTEXT000017665831_annot.xml">file:\\\P:\CRJ\RECHERCHE\PROJET_JADE\JADE_COMMUN\Annotation\Annotation_automatique_Maritaud\Technologie_light\Super-catégories-objets_0,8\AN\1978\rejet\CONSTEXT000017665831_annot.xml</text:a></text:p>
          </table:table-cell>
          <table:table-cell office:value-type="string" table:style-name="ce3">
            <text:p>4.Campagne</text:p>
          </table:table-cell>
          <table:table-cell office:value-type="string" table:style-name="ce3">
            <text:p><text:s/>5. Considérant que, si le candidat proclamé élu ne conteste pas avoir fait usage, pendant la campagne électorale, de locaux dépendant du Conseil général, il n'est pas établi que cette irrégularité a pu avoir, dans les circonstances de l'espèce, un effet sur le résultat de l'élection</text:p>
          </table:table-cell>
          <table:table-cell table:number-columns-repeated="16377"/>
        </table:table-row>
        <table:table-row table:style-name="ro1">
          <table:table-cell office:value-type="string" table:style-name="ce3">
            <text:p>Oui</text:p>
          </table:table-cell>
          <table:table-cell office:value-type="string" table:style-name="ce3">
            <text:p>considérants 1, 3, 4, 6, 7, 8, 9, 11, 12, 13, 14, 15 et 1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78\rejet\CONSTEXT000017665831_annot.xml</text:p>
          </table:table-cell>
          <table:table-cell office:value-type="string" table:style-name="ce3">
            <text:p>7.Opérations</text:p>
          </table:table-cell>
          <table:table-cell office:value-type="string" table:style-name="ce3">
            <text:p><text:s/>17. Considérant qu'aucune manoeuvre n'a eu pour but ou pour effet d'empêcher des électeurs de se rendre à leur bureau de vote mais, qu'au contraire, par un rappel opportun du droit des électeurs à voter par procuration au sein d'une même circonscription, dans les cas prévus par l'article L. 71 du Code électoral, l'administration a facilité, dans la mesure de ses possibilités, l'exercice du droit de vote ; qu'au surplus, la participation électorale a été plus forte au deuxième tour de scrutin qu'au premier</text:p>
          </table:table-cell>
          <table:table-cell table:number-columns-repeated="16377"/>
        </table:table-row>
        <table:table-row table:style-name="ro1">
          <table:table-cell office:value-type="string" table:style-name="ce3">
            <text:p>Oui</text:p>
          </table:table-cell>
          <table:table-cell office:value-type="string" table:style-name="ce3">
            <text:p>considérants 2, 3, 4, 5, 6, 7, 8, 9 et 10 ne sont pas annotés</text:p>
          </table:table-cell>
          <table:table-cell table:number-columns-repeated="2" table:style-name="ce3"/>
          <table:table-cell office:value-type="string" table:style-name="ce9">
            <text:p><text:a xlink:href="file:///C:/Users/anais/Downloads/AN/1978/rejet/CONSTEXT000017665834_annot.xml">file:\\\P:\CRJ\RECHERCHE\PROJET_JADE\JADE_COMMUN\Annotation\Annotation_automatique_Maritaud\Technologie_light\Super-catégories-objets_0,8\AN\1978\rejet\CONSTEXT000017665834_annot.xml</text:a></text:p>
          </table:table-cell>
          <table:table-cell office:value-type="string" table:style-name="ce3">
            <text:p>4.Campagne</text:p>
          </table:table-cell>
          <table:table-cell office:value-type="string" table:style-name="ce3">
            <text:p><text:s/>11. Considérant que, déduction faite des 788 suffrages obtenus à Pruno par M. Giacomi et des 5 suffrages obtenus par M. Zuccarelli, M. Giacomi continue à devancer M. Zuccarelli dans l'ensemble de la circonscription de 938 voix</text:p>
          </table:table-cell>
          <table:table-cell table:number-columns-repeated="16377"/>
        </table:table-row>
        <table:table-row table:style-name="ro1">
          <table:table-cell office:value-type="string" table:style-name="ce3">
            <text:p>Oui</text:p>
          </table:table-cell>
          <table:table-cell office:value-type="string" table:style-name="ce3">
            <text:p>considérants 1, 2, 3, 5, 6, 7, 8, 9, 10 et 11 ne sont pas annotés</text:p>
          </table:table-cell>
          <table:table-cell table:number-columns-repeated="2" table:style-name="ce3"/>
          <table:table-cell office:value-type="string" table:style-name="ce9">
            <text:p><text:a xlink:href="file:///C:/Users/anais/Downloads/AN/1978/rejet/CONSTEXT000017665835_annot.xml">file:\\\P:\CRJ\RECHERCHE\PROJET_JADE\JADE_COMMUN\Annotation\Annotation_automatique_Maritaud\Technologie_light\Super-catégories-objets_0,8\AN\1978\rejet\CONSTEXT000017665835_annot.xml</text:a></text:p>
          </table:table-cell>
          <table:table-cell office:value-type="string" table:style-name="ce3">
            <text:p>7.Opérations</text:p>
          </table:table-cell>
          <table:table-cell office:value-type="string" table:style-name="ce3">
            <text:p><text:s/>4. Considérant, d'autre part, que, si, contrairement aux dispositions de l'article R. 43 du Code électoral, la bureau de vote n'a été présidé ni par le maire, ni par l'un des adjoints, ni par un conseiller municipal, alors que deux conseillers au moins étaient présents, il ne résulte pas des pièces du dossier que celte irrégularité ait eu pour effet de permettre ou de favoriser des fraudes dans le déroulement du scrutin ; En ce qui concerne le décompte des suffrages</text:p>
          </table:table-cell>
          <table:table-cell table:number-columns-repeated="16377"/>
        </table:table-row>
        <table:table-row table:style-name="ro1">
          <table:table-cell office:value-type="string" table:style-name="ce3">
            <text:p>Non</text:p>
          </table:table-cell>
          <table:table-cell office:value-type="string" table:style-name="ce3">
            <text:p>considérants 7, 8, 9, 14, 16, 17, 18, 20, 21, 22, 25, 26, 27 et 29 ne sont pas annotés</text:p>
          </table:table-cell>
          <table:table-cell table:style-name="ce3"/>
          <table:table-cell office:value-type="string" table:style-name="ce3">
            <text:p>4. Campagne</text:p>
          </table:table-cell>
          <table:table-cell office:value-type="string" table:style-name="ce9">
            <text:p><text:a xlink:href="file:///C:/Users/anais/Downloads/AN/1981/rejet/CONSTEXT000017665902_annot.xml">file:\\\P:\CRJ\RECHERCHE\PROJET_JADE\JADE_COMMUN\Annotation\Annotation_automatique_Maritaud\Technologie_light\Super-catégories-objets_0,8\AN\1981\rejet\CONSTEXT000017665902_annot.xml</text:a></text:p>
          </table:table-cell>
          <table:table-cell office:value-type="string" table:style-name="ce3">
            <text:p>6.Financement</text:p>
          </table:table-cell>
          <table:table-cell office:value-type="string" table:style-name="ce3">
            <text:p><text:s/>19. Considérant que ce moyen, qui a été invoqué pour la première fois par M. Jacques Briat dans un mémoire produit le 12 octobre 1981, c'est-à-dire après l'expiration du délai fixé par l'article L.</text:p>
          </table:table-cell>
          <table:table-cell table:number-columns-repeated="16377"/>
        </table:table-row>
        <table:table-row table:style-name="ro1">
          <table:table-cell office:value-type="string" table:style-name="ce3">
            <text:p>Non</text:p>
          </table:table-cell>
          <table:table-cell office:value-type="string" table:style-name="ce3">
            <text:p>considérants 7, 8, 9, 14, 16, 17, 18, 20, 21, 22, 25, 26, 27 et 29 ne sont pas annotés</text:p>
          </table:table-cell>
          <table:table-cell table:style-name="ce3"/>
          <table:table-cell office:value-type="string" table:style-name="ce3">
            <text:p>5. Campagne</text:p>
          </table:table-cell>
          <table:table-cell office:value-type="string" table:style-name="ce3">
            <text:p>file:\\\P:\CRJ\RECHERCHE\PROJET_JADE\JADE_COMMUN\Annotation\Annotation_automatique_Maritaud\Technologie_light\Super-catégories-objets_0,8\AN\1981\rejet\CONSTEXT000017665902_annot.xml</text:p>
          </table:table-cell>
          <table:table-cell office:value-type="string" table:style-name="ce3">
            <text:p>4.Campagne</text:p>
          </table:table-cell>
          <table:table-cell office:value-type="string" table:style-name="ce3">
            <text:p><text:s/>0. 180 du code électoral, n'est pas recevable ; Sur le moyen tiré de la candidature de M. Hevin</text:p>
          </table:table-cell>
          <table:table-cell table:number-columns-repeated="16377"/>
        </table:table-row>
        <table:table-row table:style-name="ro1">
          <table:table-cell office:value-type="string" table:style-name="ce6">
            <text:p>Oui</text:p>
          </table:table-cell>
          <table:table-cell office:value-type="string" table:style-name="ce3">
            <text:p>considérant 4 n'est pas annoté</text:p>
          </table:table-cell>
          <table:table-cell table:number-columns-repeated="2" table:style-name="ce3"/>
          <table:table-cell office:value-type="string" table:style-name="ce9">
            <text:p><text:a xlink:href="file:///C:/Users/anais/Downloads/AN/1981/rejet/CONSTEXT000017665903_annot.xml">file:\\\P:\CRJ\RECHERCHE\PROJET_JADE\JADE_COMMUN\Annotation\Annotation_automatique_Maritaud\Technologie_light\Super-catégories-objets_0,8\AN\1981\rejet\CONSTEXT000017665903_annot.xml</text:a></text:p>
          </table:table-cell>
          <table:table-cell office:value-type="string" table:style-name="ce3">
            <text:p>4.Campagne</text:p>
          </table:table-cell>
          <table:table-cell office:value-type="string" table:style-name="ce3">
            <text:p><text:s/>2. Considérant, d'une part, que, si le journal La Presse calédonienne a publié le 4 juin 1981 une liste nominative de '612 jeunes' soutenant la candidature de M. Jacques Lafleur, il n'est pas établi ni même allégué que cette insertion ait été payée ; que cette publication n'a donc pas le caractère d'une publicité commerciale au sens de l'article L. 52-1 du Code électoral ; que l'appui ainsi apporté par un journal à l'un des candidats ne constituait pas une irrégularité ; qu'aucune disposition législative ou réglementaire n'obligeait ce journal à publier des informations de même nature concernant la campagne des autres candidats et les soutiens dont ils bénéficiaient ; qu'enfin, eu égard à son contenu, dont l'inexactitude n'est pas alléguée, la publication de cette information favorable à M. Jacques Lafleur ne saurait être regardée comme une manoeuvre destinée à altérer la sincérité du scrutin</text:p>
          </table:table-cell>
          <table:table-cell table:number-columns-repeated="16377"/>
        </table:table-row>
        <table:table-row table:style-name="ro1">
          <table:table-cell office:value-type="string" table:style-name="ce5">
            <text:p>Oui</text:p>
          </table:table-cell>
          <table:table-cell office:value-type="string" table:style-name="ce3">
            <text:p>considérant 4 n'est pas annoté</text:p>
          </table:table-cell>
          <table:table-cell table:number-columns-repeated="2" table:style-name="ce3"/>
          <table:table-cell office:value-type="string" table:style-name="ce3">
            <text:p>file:\\\P:\CRJ\RECHERCHE\PROJET_JADE\JADE_COMMUN\Annotation\Annotation_automatique_Maritaud\Technologie_light\Super-catégories-objets_0,8\AN\1981\rejet\CONSTEXT000017665903_annot.xml</text:p>
          </table:table-cell>
          <table:table-cell office:value-type="string" table:style-name="ce3">
            <text:p>4.Campagne</text:p>
          </table:table-cell>
          <table:table-cell office:value-type="string" table:style-name="ce3">
            <text:p><text:s/>3. Considérant, d'autre part, que, si au cours de la campagne électorale, M. Jacques Lafleur a adressé par voie postale à tous les électeurs inscrits dans la circonscription une brochure intitulée : Mon Bilan, dans laquelle il rendait compte de son activité de député pendant la précédente législature, le contenu de ce document, dont l'exactitude n'est pas mise en cause par les requérants, n'a pas exercé une influence déterminante sur les résultats du scrutin ; qu'en outre, il n'est pas établi que M. Jacques Lafleur ait bénéficié, pour la diffusion de cette brochure, du concours du service territorial de l'informatique ni d'un tarif postal préférentiel ; Sur le grief relatif au déroulement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1, 2, 3, 4, 5 et 9 ne sont pas annotés</text:p>
          </table:table-cell>
          <table:table-cell table:number-columns-repeated="2" table:style-name="ce3"/>
          <table:table-cell office:value-type="string" table:style-name="ce9">
            <text:p><text:a xlink:href="file:///C:/Users/anais/Downloads/AN/1981/rejet/CONSTEXT000017665911_annot.xml">file:\\\P:\CRJ\RECHERCHE\PROJET_JADE\JADE_COMMUN\Annotation\Annotation_automatique_Maritaud\Technologie_light\Super-catégories-objets_0,8\AN\1981\rejet\CONSTEXT000017665911_annot.xml</text:a></text:p>
          </table:table-cell>
          <table:table-cell office:value-type="string" table:style-name="ce3">
            <text:p>7.Opérations</text:p>
          </table:table-cell>
          <table:table-cell office:value-type="string" table:style-name="ce3">
            <text:p><text:s/>6. Considérant que les deux électeurs qui ont voté au vingt-troisième bureau d'Ivry-sur-Seine en présentant des cartes d'électeur des neuvième et vingt-septième bureaux de vote de cette commune avaient été rayés des listes électorales de ces deux bureaux pour être inscrits au vingt-troisième bureau et n'ont donc pas voté deux fois</text:p>
          </table:table-cell>
          <table:table-cell table:number-columns-repeated="16377"/>
        </table:table-row>
        <table:table-row table:style-name="ro1">
          <table:table-cell office:value-type="string" table:style-name="ce3">
            <text:p>Oui</text:p>
          </table:table-cell>
          <table:table-cell office:value-type="string" table:style-name="ce3">
            <text:p>considérants 1, 2, 3, 4, 5 et 9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81\rejet\CONSTEXT000017665911_annot.xml</text:p>
          </table:table-cell>
          <table:table-cell office:value-type="string" table:style-name="ce3">
            <text:p>7.Opérations</text:p>
          </table:table-cell>
          <table:table-cell office:value-type="string" table:style-name="ce3">
            <text:p><text:s/>7. Considérant que c'est à bon droit que le vingt-troisième bureau de vote d'Ivry-sur-Seine et le neuvième bureau de vote de Vitry ont, chacun, déclaré nul un bulletin de vote émis en faveur de M. Raoul, Jean Dumas, au motif que ceux-ci portaient des signes de reconnaissance ; que, par contre, deux bulletins de vote au nom de M. Raoul, Jean Dumas portant des taches qui n'ont pas le caractère de signes de reconnaissance ont été annulés à tort par les quatorzième et trente-neuvième bureaux de vote à Vitry ; que, toutefois, la rectification qu'il y a lieu d'opérer à ce titre en faveur de M. Raoul, Jean Dumas est sans influence sur le résultat du scrutin ; Sur les griefs relatifs au dépouillement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1, 2, 3, 4, 5 et 9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81\rejet\CONSTEXT000017665911_annot.xml</text:p>
          </table:table-cell>
          <table:table-cell office:value-type="string" table:style-name="ce3">
            <text:p>7.Opérations</text:p>
          </table:table-cell>
          <table:table-cell office:value-type="string" table:style-name="ce3">
            <text:p><text:s/>8. Considérant que, si, dans deux bureaux de vote de Vitry-sur-Seine et dans trois bureaux de vote d'Ivry, il a été procédé simultanément au décompte des émargements et au dépouillement du scrutin, contrairement aux dispositions des articles L. 65 et R. 61 du code électoral, il n'est pas établi que l'irrégularité ainsi commise ait eu pour effet de permettre des fraudes ou de provoquer des erreurs de calcul ; que le décompte des émargements dans le quarante-deuxième bureau de vote de Vitry ayant été effectué dans des conditions régulières, le président de ce bureau de vote pouvait arrêter la liste d'émargements sans prescrire un nouveau décompte</text:p>
          </table:table-cell>
          <table:table-cell table:number-columns-repeated="16377"/>
        </table:table-row>
        <table:table-row table:style-name="ro1">
          <table:table-cell office:value-type="string" table:style-name="ce3">
            <text:p>Oui</text:p>
          </table:table-cell>
          <table:table-cell office:value-type="string" table:style-name="ce3">
            <text:p>considérants 1, 2, 3, 4, 5 et 9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81\rejet\CONSTEXT000017665911_annot.xml</text:p>
          </table:table-cell>
          <table:table-cell office:value-type="string" table:style-name="ce3">
            <text:p>7.Opérations</text:p>
          </table:table-cell>
          <table:table-cell office:value-type="string" table:style-name="ce3">
            <text:p><text:s/>10. Considérant qu'il ne résulte pas de l'instruction qu'il ait été procédé dans des conditions irrégulières au décompte des bulletins de vote dans le quarante-deuxième bureau de vote de Vitry ; qu'enfin, les allégations selon lesquelles, dans le cinquième bureau de vote de cette commune, un paquet de cent enveloppes aurait été subtilisé ne sont pas assorties de précisions et d'éléments de preuve permettant d'en apprécier le bien-fondé</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1. Procédure</text:p>
          </table:table-cell>
          <table:table-cell office:value-type="string" table:style-name="ce9">
            <text:p><text:a xlink:href="file:///C:/Users/anais/Downloads/AN/1981/rejet/CONSTEXT000017665912_annot.xml">file:\\\P:\CRJ\RECHERCHE\PROJET_JADE\JADE_COMMUN\Annotation\Annotation_automatique_Maritaud\Technologie_light\Super-catégories-objets_0,8\AN\1981\rejet\CONSTEXT000017665912_annot.xml</text:a></text:p>
          </table:table-cell>
          <table:table-cell office:value-type="string" table:style-name="ce3">
            <text:p>4.Campagne</text:p>
          </table:table-cell>
          <table:table-cell office:value-type="string" table:style-name="ce3">
            <text:p><text:s/>1. Considérant que les faits invoqués, à les supposer établis et compte tenu de l'important écart existant entre les voix recueillies par les deux candidats en présence au deuxième tour, n'auraient pu manifestement exercer aucune influence sur les résultats de l'élection ; que, dès lors, la requête de M. FILLIATRE doit être rejetée ;</text:p>
          </table:table-cell>
          <table:table-cell table:number-columns-repeated="16377"/>
        </table:table-row>
        <table:table-row table:style-name="ro1">
          <table:table-cell office:value-type="string" table:style-name="ce3">
            <text:p>Non</text:p>
          </table:table-cell>
          <table:table-cell office:value-type="string" table:style-name="ce3">
            <text:p>considérant 2 n'est pas annoté</text:p>
          </table:table-cell>
          <table:table-cell table:style-name="ce3"/>
          <table:table-cell office:value-type="string" table:style-name="ce3">
            <text:p>1. Procédure</text:p>
          </table:table-cell>
          <table:table-cell office:value-type="string" table:style-name="ce9">
            <text:p><text:a xlink:href="file:///C:/Users/anais/Downloads/AN/1981/rejet/CONSTEXT000017665914_annot.xml">file:\\\P:\CRJ\RECHERCHE\PROJET_JADE\JADE_COMMUN\Annotation\Annotation_automatique_Maritaud\Technologie_light\Super-catégories-objets_0,8\AN\1981\rejet\CONSTEXT000017665914_annot.xml</text:a></text:p>
          </table:table-cell>
          <table:table-cell office:value-type="string" table:style-name="ce3">
            <text:p>6.Financement</text:p>
          </table:table-cell>
          <table:table-cell office:value-type="string" table:style-name="ce3">
            <text:p><text:s/>4. Considérant que la requête de M. Pierre LE BRICQUIR qui n'a pas été enregistrée dans le délai de dix jours fixé par l'article 33 de l'ordonnance n° 58-1067 du 7 novembre 1958 est tardive et par suite irrecevable ;</text:p>
          </table:table-cell>
          <table:table-cell table:number-columns-repeated="16377"/>
        </table:table-row>
        <table:table-row table:style-name="ro1">
          <table:table-cell office:value-type="string" table:style-name="ce3">
            <text:p>Oui</text:p>
          </table:table-cell>
          <table:table-cell office:value-type="string" table:style-name="ce3">
            <text:p>considérants 2 et 3 ne sont pas annotés</text:p>
          </table:table-cell>
          <table:table-cell table:number-columns-repeated="2" table:style-name="ce3"/>
          <table:table-cell office:value-type="string" table:style-name="ce9">
            <text:p><text:a xlink:href="file:///C:/Users/anais/Downloads/AN/1981/rejet/CONSTEXT000017665921_annot.xml">file:\\\P:\CRJ\RECHERCHE\PROJET_JADE\JADE_COMMUN\Annotation\Annotation_automatique_Maritaud\Technologie_light\Super-catégories-objets_0,8\AN\1981\rejet\CONSTEXT000017665921_annot.xml</text:a></text:p>
          </table:table-cell>
          <table:table-cell office:value-type="string" table:style-name="ce3">
            <text:p>4.Campagne</text:p>
          </table:table-cell>
          <table:table-cell office:value-type="string" table:style-name="ce3">
            <text:p><text:s/>1. Considérant que les requérants allèguent que les documents électoraux remis par les candidats à la Commission départementale de propagande ne seraient pas parvenus aux électeurs ' dans de vastes secteurs ' ; mais qu'il résulte de l'instruction que l'irrégularité invoquée ne concerne qu'un très petit nombre d'électeurs et qu'elle a porté sur les documents de propagande de l'ensemble des candidats ; qu'elle n'a donc pu favoriser aucun d' entre eux ; qu'au surplus, aucune réclamation n'a été adressée à ce sujet à la Commission départementale de propagande</text:p>
          </table:table-cell>
          <table:table-cell table:number-columns-repeated="16377"/>
        </table:table-row>
        <table:table-row table:style-name="ro1">
          <table:table-cell office:value-type="string" table:style-name="ce3">
            <text:p>Oui</text:p>
          </table:table-cell>
          <table:table-cell office:value-type="string" table:style-name="ce3">
            <text:p>considérants 2 et 3 ne sont pas annotés</text:p>
          </table:table-cell>
          <table:table-cell table:number-columns-repeated="2" table:style-name="ce3"/>
          <table:table-cell office:value-type="string" table:style-name="ce9">
            <text:p><text:a xlink:href="file:///C:/Users/anais/Downloads/AN/1981/rejet/CONSTEXT000017665926_annot.xml">file:\\\P:\CRJ\RECHERCHE\PROJET_JADE\JADE_COMMUN\Annotation\Annotation_automatique_Maritaud\Technologie_light\Super-catégories-objets_0,8\AN\1981\rejet\CONSTEXT000017665926_annot.xml</text:a></text:p>
          </table:table-cell>
          <table:table-cell office:value-type="string" table:style-name="ce3">
            <text:p>4.Campagne</text:p>
          </table:table-cell>
          <table:table-cell office:value-type="string" table:style-name="ce3">
            <text:p><text:s/>1. Considérant que la responsabilité du député élu n'est pas établie en ce qui concerne deux des tracts mis en cause, dont l'un n'apportait d'ailleurs aucun élément nouveau dans le débat électoral et dont l'autre n'a été distribué qu'à Champigneulles, commune dans laquelle le requérant a devancé le candidat proclamé élu; qu'eu égard à leur contenu, dont le caractère mensonger ou diffamatoire n'est pas établi, les deux tracts émanant du député élu ou de ses partisans, ainsi que la lettre qu'il a adressée pendant la campagne aux personnes âgées de la circonscription, n'ont pu exercé une influence déterminante sur les résultats de l'élection ; que, si des affiches du requérant ont été recouvertes d'affichettes évoquant notamment les risques que le succès de son parti ferait courir à 'l'école libre', cette irrégularité de propagande, n'a pas été de nature à fausser la consultation électorale, dès lors que son caractère systématique n'est pas établi et que le contenu de ces affichettes n'excédait pas les limites de la polémique électorale; Sur le grief relatif au déroulement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3, 5 et 6 ne sont pas annotés</text:p>
          </table:table-cell>
          <table:table-cell table:number-columns-repeated="2" table:style-name="ce3"/>
          <table:table-cell office:value-type="string" table:style-name="ce9">
            <text:p><text:a xlink:href="file:///C:/Users/anais/Downloads/AN/1981/rejet/CONSTEXT000017665927_annot.xml">file:\\\P:\CRJ\RECHERCHE\PROJET_JADE\JADE_COMMUN\Annotation\Annotation_automatique_Maritaud\Technologie_light\Super-catégories-objets_0,8\AN\1981\rejet\CONSTEXT000017665927_annot.xml</text:a></text:p>
          </table:table-cell>
          <table:table-cell office:value-type="string" table:style-name="ce3">
            <text:p>4.Campagne</text:p>
          </table:table-cell>
          <table:table-cell office:value-type="string" table:style-name="ce3">
            <text:p><text:s/>1. Considérant, en premier lieu, que, si M. Merle fait valoir que ses panneaux d'affichage ont été systématiquement recouverts ou dégradés, il n'établit pas que ces irrégularités auraient eu un caractère de généralité tel qu'elles auraient pu exercer une influence appréciable sur le résultat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3, 5 et 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81\rejet\CONSTEXT000017665927_annot.xml</text:p>
          </table:table-cell>
          <table:table-cell office:value-type="string" table:style-name="ce3">
            <text:p>4.Campagne</text:p>
          </table:table-cell>
          <table:table-cell office:value-type="string" table:style-name="ce3">
            <text:p><text:s/>2. Considérant, en second lieu, que, si le requérant invoque à l'appui de sa requête qu' ' un journal électoral' aurait été distribué sur le marché de Doudeville la veille du scrutin, il ne donne aucune précision sur le contenu de ce document ni sur l'ampleur de sa diffusion ; que, dans ces conditions, l'irrégularité alléguée ne saurait être regardée comme ayant pu modifier le résultat de l'élection</text:p>
          </table:table-cell>
          <table:table-cell table:number-columns-repeated="16377"/>
        </table:table-row>
        <table:table-row table:style-name="ro1">
          <table:table-cell office:value-type="string" table:style-name="ce3">
            <text:p>Oui</text:p>
          </table:table-cell>
          <table:table-cell office:value-type="string" table:style-name="ce3">
            <text:p>considérants 3, 5 et 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81\rejet\CONSTEXT000017665927_annot.xml</text:p>
          </table:table-cell>
          <table:table-cell office:value-type="string" table:style-name="ce3">
            <text:p>7.Opérations</text:p>
          </table:table-cell>
          <table:table-cell office:value-type="string" table:style-name="ce3">
            <text:p><text:s/>4. Considérant que le requérant soutient que, dans plusieurs communes, les listes d'émargement ont été tenues de manière irrégulière, soit que l'émargement des noms des électeurs ait été porté au crayon et non à l'encre, soit qu'au lieu d'apposer son paraphe l'assesseur tenant les listes ait constaté les votes des électeurs au moyen d'une croix ou d'une barre, soit enfin que ces listes n'aient pas été signées par les membres du bureau ou par certains d'entre eux ; qu'il résulte de l'instruction que, dans les bureaux de vote dont les listes comportaient l'une des irrégularités dénoncées par le requérant, le procès-verbal régulièrement signé ne contient aucune observation à ce sujet et ne fait apparaître aucune discordance entre le nombre des émargements constaté par les membres du bureau et celui des bulletins et enveloppes trouvés dans l'urne ; que dans ces conditions, s'il apparaît que des irrégularités ont été commises dans la tenue des documents électoraux, il n'est pas établi qu'elles aient permis des fraudes</text:p>
          </table:table-cell>
          <table:table-cell table:number-columns-repeated="16377"/>
        </table:table-row>
        <table:table-row table:style-name="ro1">
          <table:table-cell office:value-type="string" table:style-name="ce3">
            <text:p>Oui</text:p>
          </table:table-cell>
          <table:table-cell office:value-type="string" table:style-name="ce3">
            <text:p>considérants 3, 5 et 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81\rejet\CONSTEXT000017665927_annot.xml</text:p>
          </table:table-cell>
          <table:table-cell office:value-type="string" table:style-name="ce3">
            <text:p>7.Opérations</text:p>
          </table:table-cell>
          <table:table-cell office:value-type="string" table:style-name="ce3">
            <text:p><text:s/>7. Considérant, enfin, que, s'il n'est pas contesté que les listes d'émargement de huit communes n'ont été transmises à la préfecture que postérieurement à l'envoi des procès-verbaux, il n'est pas établi ni même allégué que ce retard aurait correspondu à une manoeuvre ;</text:p>
          </table:table-cell>
          <table:table-cell table:number-columns-repeated="16377"/>
        </table:table-row>
        <table:table-row table:style-name="ro1">
          <table:table-cell office:value-type="string" table:style-name="ce3">
            <text:p>Oui</text:p>
          </table:table-cell>
          <table:table-cell office:value-type="string" table:style-name="ce3">
            <text:p>considérants 1, 2, 3, 5, 6, 7, 8, 9, 10, 11, 12, 13, 14 et 15 ne sont pas annotés</text:p>
          </table:table-cell>
          <table:table-cell table:number-columns-repeated="2" table:style-name="ce3"/>
          <table:table-cell office:value-type="string" table:style-name="ce9">
            <text:p><text:a xlink:href="file:///C:/Users/anais/Downloads/AN/1981/rejet/CONSTEXT000017665931_annot.xml">file:\\\P:\CRJ\RECHERCHE\PROJET_JADE\JADE_COMMUN\Annotation\Annotation_automatique_Maritaud\Technologie_light\Super-catégories-objets_0,8\AN\1981\rejet\CONSTEXT000017665931_annot.xml</text:a></text:p>
          </table:table-cell>
          <table:table-cell office:value-type="string" table:style-name="ce3">
            <text:p>7.Opérations</text:p>
          </table:table-cell>
          <table:table-cell office:value-type="string" table:style-name="ce3">
            <text:p><text:s/>16. Considérant que le requérant n'apporte aucun commencement de preuve à l'appui de ses allégations selon lesquelles des listes d'émargements n'auraient pas été arrêtées, des votes auraient été émis au nom de personnes décédées et des électeurs ne seraient pas passés par les isoloirs</text:p>
          </table:table-cell>
          <table:table-cell table:number-columns-repeated="16377"/>
        </table:table-row>
        <table:table-row table:style-name="ro1">
          <table:table-cell office:value-type="string" table:style-name="ce3">
            <text:p>Non</text:p>
          </table:table-cell>
          <table:table-cell office:value-type="string" table:style-name="ce3">
            <text:p>considérant 1 pas annoté</text:p>
          </table:table-cell>
          <table:table-cell office:value-type="string" table:style-name="ce3">
            <text:p>N'était pas à annoter ? (raisonnement du juge du fait dans le considérant précédent, et phrase plutôt générique sur le résultat de l'élection)</text:p>
          </table:table-cell>
          <table:table-cell table:style-name="ce3"/>
          <table:table-cell office:value-type="string" table:style-name="ce9">
            <text:p><text:a xlink:href="file:///C:/Users/anais/Downloads/AN/1981/rejet/CONSTEXT000017665934_annot.xml">file:\\\P:\CRJ\RECHERCHE\PROJET_JADE\JADE_COMMUN\Annotation\Annotation_automatique_Maritaud\Technologie_light\Super-catégories-objets_0,8\AN\1981\rejet\CONSTEXT000017665934_annot.xml</text:a></text:p>
          </table:table-cell>
          <table:table-cell office:value-type="string" table:style-name="ce3">
            <text:p>4.Campagne</text:p>
          </table:table-cell>
          <table:table-cell office:value-type="string" table:style-name="ce3">
            <text:p><text:s/>2. Considérant qu'à le supposer établi, le fait invoqué n'aurait pu, manifestement, exercer aucune influence sur le résultat de l'élection ;</text:p>
          </table:table-cell>
          <table:table-cell table:number-columns-repeated="16377"/>
        </table:table-row>
        <table:table-row table:style-name="ro1">
          <table:table-cell office:value-type="string" table:style-name="ce6">
            <text:p>Oui</text:p>
          </table:table-cell>
          <table:table-cell office:value-type="string" table:style-name="ce3">
            <text:p>considérants 1, 2, 3 et 4 ne sont pas annotés</text:p>
          </table:table-cell>
          <table:table-cell table:number-columns-repeated="2" table:style-name="ce3"/>
          <table:table-cell office:value-type="string" table:style-name="ce9">
            <text:p><text:a xlink:href="file:///C:/Users/anais/Downloads/AN/1981/rejet/CONSTEXT000017665936_annot.xml">file:\\\P:\CRJ\RECHERCHE\PROJET_JADE\JADE_COMMUN\Annotation\Annotation_automatique_Maritaud\Technologie_light\Super-catégories-objets_0,8\AN\1981\rejet\CONSTEXT000017665936_annot.xml</text:a></text:p>
          </table:table-cell>
          <table:table-cell office:value-type="string" table:style-name="ce3">
            <text:p>7.Opérations</text:p>
          </table:table-cell>
          <table:table-cell office:value-type="string" table:style-name="ce3">
            <text:p><text:s/>5. Considérant qu'il est allégué que dans les deuxième et dix-septième bureaux de vote les cahiers d'émargement auraient été emportés par des assesseurs en dehors de la salle de vote pendant quelques minutes, mais qu'il n'est pas établi que cette irrégularité qui, d'ailleurs, d'après les attestations produites, n'a eu lieu qu'a l'occasion du premier tour de scrutin, ait constitué une manoeuvre de nature à altérer la sincérité du scrutin ;,</text:p>
          </table:table-cell>
          <table:table-cell table:number-columns-repeated="16377"/>
        </table:table-row>
        <table:table-row table:style-name="ro1">
          <table:table-cell office:value-type="string" table:style-name="ce3">
            <text:p>Oui</text:p>
          </table:table-cell>
          <table:table-cell office:value-type="string" table:style-name="ce3">
            <text:p>considérants 1, 3 et 4 ne sont pas annotés</text:p>
          </table:table-cell>
          <table:table-cell table:number-columns-repeated="2" table:style-name="ce3"/>
          <table:table-cell office:value-type="string" table:style-name="ce9">
            <text:p><text:a xlink:href="file:///C:/Users/anais/Downloads/AN/1981/rejet/CONSTEXT000017665937_annot.xml">file:\\\P:\CRJ\RECHERCHE\PROJET_JADE\JADE_COMMUN\Annotation\Annotation_automatique_Maritaud\Technologie_light\Super-catégories-objets_0,8\AN\1981\rejet\CONSTEXT000017665937_annot.xml</text:a></text:p>
          </table:table-cell>
          <table:table-cell office:value-type="string" table:style-name="ce3">
            <text:p>7.Opérations</text:p>
          </table:table-cell>
          <table:table-cell office:value-type="string" table:style-name="ce3">
            <text:p><text:s/>2. Considérant que M.Charles-Émile Loo fait état de la distribution de tracts et de bulletins de vote, le jour du scrutin, à l'entrée des bureaux de vote ; qu'aucun procès verbal de recensement des votes ne fait mention d'incidents de ce genre, et qu'aucun commencement de preuve n'est apporté au soutien de cette allégation</text:p>
          </table:table-cell>
          <table:table-cell table:number-columns-repeated="16377"/>
        </table:table-row>
        <table:table-row table:style-name="ro1">
          <table:table-cell office:value-type="string" table:style-name="ce3">
            <text:p>Oui</text:p>
          </table:table-cell>
          <table:table-cell office:value-type="string" table:style-name="ce3">
            <text:p>considérants 2, 3 et 4 ne sont pas annotés</text:p>
          </table:table-cell>
          <table:table-cell table:number-columns-repeated="2" table:style-name="ce3"/>
          <table:table-cell office:value-type="string" table:style-name="ce9">
            <text:p><text:a xlink:href="file:///C:/Users/anais/Downloads/AN/1981/rejet/CONSTEXT000017665940_annot.xml">file:\\\P:\CRJ\RECHERCHE\PROJET_JADE\JADE_COMMUN\Annotation\Annotation_automatique_Maritaud\Technologie_light\Super-catégories-objets_0,8\AN\1981\rejet\CONSTEXT000017665940_annot.xml</text:a></text:p>
          </table:table-cell>
          <table:table-cell office:value-type="string" table:style-name="ce3">
            <text:p>4.Campagne</text:p>
          </table:table-cell>
          <table:table-cell office:value-type="string" table:style-name="ce3">
            <text:p><text:s/>1. Considérant que, si M. Guy Vadepied a laissé apposer, au soutien de sa candidature, des affiches comportant une combinaison des trois couleurs bleu, blanc et rouge, cette irrégularité n'a pas eu pour effet, en l'espèce, de conférer un caractère officiel à sa candidature</text:p>
          </table:table-cell>
          <table:table-cell table:number-columns-repeated="16377"/>
        </table:table-row>
        <table:table-row table:style-name="ro1">
          <table:table-cell office:value-type="string" table:style-name="ce3">
            <text:p>Oui</text:p>
          </table:table-cell>
          <table:table-cell office:value-type="string" table:style-name="ce3">
            <text:p>considérants 2 et 3 ne sont pas annotés</text:p>
          </table:table-cell>
          <table:table-cell table:number-columns-repeated="2" table:style-name="ce3"/>
          <table:table-cell office:value-type="string" table:style-name="ce9">
            <text:p><text:a xlink:href="file:///C:/Users/anais/Downloads/AN/1981/rejet/CONSTEXT000017665943_annot.xml">file:\\\P:\CRJ\RECHERCHE\PROJET_JADE\JADE_COMMUN\Annotation\Annotation_automatique_Maritaud\Technologie_light\Super-catégories-objets_0,8\AN\1981\rejet\CONSTEXT000017665943_annot.xml</text:a></text:p>
          </table:table-cell>
          <table:table-cell office:value-type="string" table:style-name="ce3">
            <text:p>4.Campagne</text:p>
          </table:table-cell>
          <table:table-cell office:value-type="string" table:style-name="ce3">
            <text:p><text:s/>1. Considérant, en premier lieu, que la distribution irrégulière de journaux électoraux ou de tracts, par des militants de l'organisation communiste internationaliste, le matin du second tour, à Eaubonne et Montmorency, n'a pas été de nature à fausser les résultats du scrutin dès lors, notamment, que lesdits tracts ou journaux dont la distribution est restée très localisée ne mettaient pas en cause la personne du requérant et se bornaient à reprendre des arguments électoraux déjà utilisés ; que rien n'établit que l'indication donnée entre les deux tours par le journal : 'l'Unité du Val-d'Oise' et selon laquelle Mme Marie-France Lecuir avait été 'placée largement en tête au premier tour' aurait dissuadé certains électeurs de voter en faveur de M. André Petit</text:p>
          </table:table-cell>
          <table:table-cell table:number-columns-repeated="16377"/>
        </table:table-row>
        <table:table-row table:style-name="ro1">
          <table:table-cell office:value-type="string" table:style-name="ce3">
            <text:p>Oui</text:p>
          </table:table-cell>
          <table:table-cell office:value-type="string" table:style-name="ce3">
            <text:p>considérants 2, 3 et 4 ne sont pas annotés</text:p>
          </table:table-cell>
          <table:table-cell table:number-columns-repeated="2" table:style-name="ce3"/>
          <table:table-cell office:value-type="string" table:style-name="ce9">
            <text:p><text:a xlink:href="file:///C:/Users/anais/Downloads/AN/1981/rejet/CONSTEXT000017665944_annot.xml">file:\\\P:\CRJ\RECHERCHE\PROJET_JADE\JADE_COMMUN\Annotation\Annotation_automatique_Maritaud\Technologie_light\Super-catégories-objets_0,8\AN\1981\rejet\CONSTEXT000017665944_annot.xml</text:a></text:p>
          </table:table-cell>
          <table:table-cell office:value-type="string" table:style-name="ce3">
            <text:p>7.Opérations</text:p>
          </table:table-cell>
          <table:table-cell office:value-type="string" table:style-name="ce3">
            <text:p><text:s/>1. Considérant que les requérants allèguent que dans les premier et douzième bureaux de Mandelieu-La-Napoule certains électeurs auraient été admis à voter sans présenter un titre d'identité ; que, s'il est établi, notamment par le procès-verbal du premier bureau, que deux électeurs ont voté sans présenter un titre d'identité, il n'est pas allégué qu'ils n'étaient pas inscrits sur la liste électorale ; que, par ailleurs, il n'existait pas de douzième bureau à Mandelieu-La-Napoule, l'arrêté préfectoral du 19 août 1980 n'ayant divisé cette commune qu'en huit bureaux de vote</text:p>
          </table:table-cell>
          <table:table-cell table:number-columns-repeated="16377"/>
        </table:table-row>
        <table:table-row table:style-name="ro1">
          <table:table-cell office:value-type="string" table:style-name="ce3">
            <text:p>Oui</text:p>
          </table:table-cell>
          <table:table-cell office:value-type="string" table:style-name="ce3">
            <text:p>considérant 2 n'est pas annoté</text:p>
          </table:table-cell>
          <table:table-cell table:number-columns-repeated="2" table:style-name="ce3"/>
          <table:table-cell office:value-type="string" table:style-name="ce9">
            <text:p><text:a xlink:href="file:///C:/Users/anais/Downloads/AN/1981/rejet/CONSTEXT000017665947_annot.xml">file:\\\P:\CRJ\RECHERCHE\PROJET_JADE\JADE_COMMUN\Annotation\Annotation_automatique_Maritaud\Technologie_light\Super-catégories-objets_0,8\AN\1981\rejet\CONSTEXT000017665947_annot.xml</text:a></text:p>
          </table:table-cell>
          <table:table-cell office:value-type="string" table:style-name="ce3">
            <text:p>4.Campagne</text:p>
          </table:table-cell>
          <table:table-cell office:value-type="string" table:style-name="ce3">
            <text:p><text:s/>1. Considérant que, s'il n'est pas contesté que le candidat élu a fait apposer, notamment après la clôture de la campagne électorale, des affiches en dehors des emplacements réglementaires, il n'est pas établi que cette irrégularité aurait été d'une ampleur suffisante pour exercer une influence appréciable sur les résultats du scrutin</text:p>
          </table:table-cell>
          <table:table-cell table:number-columns-repeated="16377"/>
        </table:table-row>
        <table:table-row table:style-name="ro1">
          <table:table-cell office:value-type="string" table:style-name="ce4">
            <text:p>Oui</text:p>
          </table:table-cell>
          <table:table-cell office:value-type="string" table:style-name="ce3">
            <text:p>considérants 2, 3, 4, 5, 6, 7, 8, 9, 10, 11, 10 et 13 ne sont pas annotés</text:p>
          </table:table-cell>
          <table:table-cell table:number-columns-repeated="2" table:style-name="ce3"/>
          <table:table-cell office:value-type="string" table:style-name="ce9">
            <text:p><text:a xlink:href="file:///C:/Users/anais/Downloads/AN/1981/rejet/CONSTEXT000017665949_annot.xml">file:\\\P:\CRJ\RECHERCHE\PROJET_JADE\JADE_COMMUN\Annotation\Annotation_automatique_Maritaud\Technologie_light\Super-catégories-objets_0,8\AN\1981\rejet\CONSTEXT000017665949_annot.xml</text:a></text:p>
          </table:table-cell>
          <table:table-cell office:value-type="string" table:style-name="ce3">
            <text:p>7.Opérations</text:p>
          </table:table-cell>
          <table:table-cell office:value-type="string" table:style-name="ce3">
            <text:p><text:s/>1. Considérant que le nombre relativement élevé des votes par procuration dans certaines communes ne saurait faire présumer une fraude ; que, de même, le fait que nombre des mandataires auraient été des employés communaux ou des parents ou alliés de conseillers municipaux ne saurait fonder une annulation des votes par procuration dont il s'agit</text:p>
          </table:table-cell>
          <table:table-cell table:number-columns-repeated="16377"/>
        </table:table-row>
        <table:table-row table:style-name="ro1">
          <table:table-cell office:value-type="string" table:style-name="ce3">
            <text:p>Non</text:p>
          </table:table-cell>
          <table:table-cell office:value-type="string" table:style-name="ce3">
            <text:p>considérant 3 n'est pas annoté</text:p>
          </table:table-cell>
          <table:table-cell table:style-name="ce3"/>
          <table:table-cell office:value-type="string" table:style-name="ce3">
            <text:p>3. Candidature</text:p>
          </table:table-cell>
          <table:table-cell office:value-type="string" table:style-name="ce9">
            <text:p><text:a xlink:href="file:///C:/Users/anais/Downloads/AN/1986/rejet/CONSTEXT000017666930_annot.xml">file:\\\P:\CRJ\RECHERCHE\PROJET_JADE\JADE_COMMUN\Annotation\Annotation_automatique_Maritaud\Technologie_light\Super-catégories-objets_0,8\AN\1986\rejet\CONSTEXT000017666930_annot.xml</text:a></text:p>
          </table:table-cell>
          <table:table-cell office:value-type="string" table:style-name="ce3">
            <text:p>4.Campagne</text:p>
          </table:table-cell>
          <table:table-cell office:value-type="string" table:style-name="ce3">
            <text:p><text:s/>2. Considérant que les requérants déclarent ne pas avoir versé le cautionnement prévu à l'article L. 158 du code électoral ; que la candidature, n'ayant pas satisfait aux prescriptions exigées par la loi, ne pouvait être enregistrée ; que, dès lors, les requérants ne sont pas fondés à soutenir que la circonstance qu'ils n'aient pu être candidats a été de nature à vicier les élections législatives du département ; Sur le grief tiré de la non-conformité de l'article L. 158 du code électoral à la Constitution</text:p>
          </table:table-cell>
          <table:table-cell table:number-columns-repeated="16377"/>
        </table:table-row>
        <table:table-row table:style-name="ro1">
          <table:table-cell office:value-type="string" table:style-name="ce3">
            <text:p>Oui</text:p>
          </table:table-cell>
          <table:table-cell office:value-type="string" table:style-name="ce3">
            <text:p>considérant 1 et 3 ne sont pas annotés</text:p>
          </table:table-cell>
          <table:table-cell table:number-columns-repeated="2" table:style-name="ce3"/>
          <table:table-cell office:value-type="string" table:style-name="ce9">
            <text:p><text:a xlink:href="file:///C:/Users/anais/Downloads/AN/1986/rejet/CONSTEXT000017666934_annot.xml">file:\\\P:\CRJ\RECHERCHE\PROJET_JADE\JADE_COMMUN\Annotation\Annotation_automatique_Maritaud\Technologie_light\Super-catégories-objets_0,8\AN\1986\rejet\CONSTEXT000017666934_annot.xml</text:a></text:p>
          </table:table-cell>
          <table:table-cell office:value-type="string" table:style-name="ce3">
            <text:p>7.Opérations</text:p>
          </table:table-cell>
          <table:table-cell office:value-type="string" table:style-name="ce3">
            <text:p><text:s/>2. Considérant que, selon l'article L. 66 du code électoral, le défaut d'annexion au procès-verbal des bulletins et enveloppes déclarés nuls n'entraîne l'annulation des opérations électorales que s'il est établi qu'il a eu pour but et pour conséquence de porter atteinte à la sincérité du scrutin ; qu'il ne résulte pas de l'instruction que la circonstance que les enveloppes contenant 51 bulletins déclarés nuls dans deux bureaux de vote de la commune d'Avignon n'aient pas été jointes aux procès-verbaux de ces bureaux ait eu un tel but ou une telle conséquence ; Sur te grief tiré de la rédaction des bulletins de vote de l'une des listes en présence</text:p>
          </table:table-cell>
          <table:table-cell table:number-columns-repeated="16377"/>
        </table:table-row>
        <table:table-row table:style-name="ro1">
          <table:table-cell office:value-type="string" table:style-name="ce3">
            <text:p>Non</text:p>
          </table:table-cell>
          <table:table-cell office:value-type="string" table:style-name="ce3">
            <text:p>considérants 1, 3 et 4 ne sont pas annotés</text:p>
          </table:table-cell>
          <table:table-cell table:style-name="ce3"/>
          <table:table-cell office:value-type="string" table:style-name="ce3">
            <text:p>5. Campagne</text:p>
          </table:table-cell>
          <table:table-cell office:value-type="string" table:style-name="ce9">
            <text:p><text:a xlink:href="file:///C:/Users/anais/Downloads/AN/1986/rejet/CONSTEXT000017666995_annot.xml">file:\\\P:\CRJ\RECHERCHE\PROJET_JADE\JADE_COMMUN\Annotation\Annotation_automatique_Maritaud\Technologie_light\Super-catégories-objets_0,8\AN\1986\rejet\CONSTEXT000017666995_annot.xml</text:a></text:p>
          </table:table-cell>
          <table:table-cell office:value-type="string" table:style-name="ce3">
            <text:p>4.Campagne</text:p>
          </table:table-cell>
          <table:table-cell office:value-type="string" table:style-name="ce3">
            <text:p><text:s/>2. Considérant, d'autre part, que la circonstance que, la veille du scrutin, des attaques diffusées par la station Radio Caraïbe Internationale, dont la durée et la teneur exacte n'ont d'ailleurs pas été précisées, auraient été lancées contre un des membres de la liste Union et développement pour la Guadeloupe conduite par M. Esdras n'a pu, compte tenu du nombre de suffrages recueillis par les listes en présence, avoir une influence suffisante pour modifier le sens de l'élection ; Sur les griefs relatifs au déroulement du scrutin</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2. Préalable au scrutin</text:p>
          </table:table-cell>
          <table:table-cell office:value-type="string" table:style-name="ce9">
            <text:p><text:a xlink:href="file:///C:/Users/anais/Downloads/AN/1986/rejet/CONSTEXT000017667349_annot.xml">file:\\\P:\CRJ\RECHERCHE\PROJET_JADE\JADE_COMMUN\Annotation\Annotation_automatique_Maritaud\Technologie_light\Super-catégories-objets_0,8\AN\1986\rejet\CONSTEXT000017667349_annot.xml</text:a></text:p>
          </table:table-cell>
          <table:table-cell office:value-type="string" table:style-name="ce3">
            <text:p>4.Campagne</text:p>
          </table:table-cell>
          <table:table-cell office:value-type="string" table:style-name="ce3">
            <text:p><text:s/>1. Considérant que Monsieur ROUJANSKY soutient que la répartition des sièges entre les listes du département a été faite en application d'une circulaire qui préconiserait un mode de calcul contraire à la loi</text:p>
          </table:table-cell>
          <table:table-cell table:number-columns-repeated="16377"/>
        </table:table-row>
        <table:table-row table:style-name="ro1">
          <table:table-cell office:value-type="string" table:style-name="ce3">
            <text:p>Oui</text:p>
          </table:table-cell>
          <table:table-cell office:value-type="string" table:style-name="ce3">
            <text:p>considérants 3 et 4 ne sont pas annotés</text:p>
          </table:table-cell>
          <table:table-cell table:number-columns-repeated="2" table:style-name="ce3"/>
          <table:table-cell office:value-type="string" table:style-name="ce9">
            <text:p><text:a xlink:href="file:///C:/Users/anais/Downloads/AN/1986/rejet/CONSTEXT000017667352_annot.xml">file:\\\P:\CRJ\RECHERCHE\PROJET_JADE\JADE_COMMUN\Annotation\Annotation_automatique_Maritaud\Technologie_light\Super-catégories-objets_0,8\AN\1986\rejet\CONSTEXT000017667352_annot.xml</text:a></text:p>
          </table:table-cell>
          <table:table-cell office:value-type="string" table:style-name="ce3">
            <text:p>4.Campagne</text:p>
          </table:table-cell>
          <table:table-cell office:value-type="string" table:style-name="ce3">
            <text:p><text:s/>2. Considérant que si certains des bulletins de vote critiqués, joints à la requête, ne remplissent pas, en ce qui concerne les caractères utilisés, les prescriptions de l'article R. 103 du code électoral, ils font nettement apparaître la qualité de suppléants attribuée aux deux derniers candidats figurant sur la liste ; que, dès lors, l'irrégularité dénoncée n'a pu entraîner de confusion dans l'esprit des électeurs</text:p>
          </table:table-cell>
          <table:table-cell table:number-columns-repeated="16377"/>
        </table:table-row>
        <table:table-row table:style-name="ro1">
          <table:table-cell office:value-type="string" table:style-name="ce3">
            <text:p>Oui</text:p>
          </table:table-cell>
          <table:table-cell office:value-type="string" table:style-name="ce3">
            <text:p>considérants 2 et 3 ne sont pas annotés</text:p>
          </table:table-cell>
          <table:table-cell table:number-columns-repeated="2" table:style-name="ce3"/>
          <table:table-cell office:value-type="string" table:style-name="ce9">
            <text:p><text:a xlink:href="file:///C:/Users/anais/Downloads/AN/1986/rejet/CONSTEXT000017667355_annot.xml">file:\\\P:\CRJ\RECHERCHE\PROJET_JADE\JADE_COMMUN\Annotation\Annotation_automatique_Maritaud\Technologie_light\Super-catégories-objets_0,8\AN\1986\rejet\CONSTEXT000017667355_annot.xml</text:a></text:p>
          </table:table-cell>
          <table:table-cell office:value-type="string" table:style-name="ce3">
            <text:p>7.Opérations</text:p>
          </table:table-cell>
          <table:table-cell office:value-type="string" table:style-name="ce3">
            <text:p><text:s/>1. Considérant que les requérants soutiennent qu'il aurait été porté atteinte à la sincérité du scrutin au motif que, dans les bureaux de vote de la ville de Besançon, les procès-verbaux des opérations électorales ne mentionnent pas, contrairement aux dispositions de l'article R. 25 du code électoral, l'état nominatif des électeurs ayant ou n'ayant pas retiré la carte électorale mise à leur disposition le jour du scrutin et que, par voie de conséquence, la commission de recensement des votes n'aurait pas été à même d'exercer son contrôle</text:p>
          </table:table-cell>
          <table:table-cell table:number-columns-repeated="16377"/>
        </table:table-row>
        <table:table-row table:style-name="ro1">
          <table:table-cell office:value-type="string" table:style-name="ce3">
            <text:p>Oui</text:p>
          </table:table-cell>
          <table:table-cell office:value-type="string" table:style-name="ce3">
            <text:p>considérants 2, 3, 5, 6 et 7 ne sont pas annotés</text:p>
          </table:table-cell>
          <table:table-cell table:number-columns-repeated="2" table:style-name="ce3"/>
          <table:table-cell office:value-type="string" table:style-name="ce9">
            <text:p><text:a xlink:href="file:///C:/Users/anais/Downloads/AN/1986/rejet/CONSTEXT000017667357_annot.xml">file:\\\P:\CRJ\RECHERCHE\PROJET_JADE\JADE_COMMUN\Annotation\Annotation_automatique_Maritaud\Technologie_light\Super-catégories-objets_0,8\AN\1986\rejet\CONSTEXT000017667357_annot.xml</text:a></text:p>
          </table:table-cell>
          <table:table-cell office:value-type="string" table:style-name="ce3">
            <text:p>7.Opérations</text:p>
          </table:table-cell>
          <table:table-cell office:value-type="string" table:style-name="ce3">
            <text:p><text:s/>4. Considérant en troisième lieu que si, dans plusieurs bureaux de vote, le procès-verbal n'a pas été complété par l'indication du nombre d'électeurs ayant voté par procuration, il n'est pas allégué que ce nombre ne correspondait pas à celui qui résulte des listes d'émargement</text:p>
          </table:table-cell>
          <table:table-cell table:number-columns-repeated="16377"/>
        </table:table-row>
        <table:table-row table:style-name="ro1">
          <table:table-cell office:value-type="string" table:style-name="ce3">
            <text:p>Oui</text:p>
          </table:table-cell>
          <table:table-cell office:value-type="string" table:style-name="ce3">
            <text:p>considérants 2, 3, 5, 6 et 7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86\rejet\CONSTEXT000017667357_annot.xml</text:p>
          </table:table-cell>
          <table:table-cell office:value-type="string" table:style-name="ce3">
            <text:p>4.Campagne</text:p>
          </table:table-cell>
          <table:table-cell office:value-type="string" table:style-name="ce3">
            <text:p><text:s/>9. Considérant enfin que le requérant allègue que des enveloppes contenant les documents de propagande électorale n'auraient pu être distribuées ; que les destinataires, bien que n'habitant plus aux adresses indiquées sur les listes électorales, auraient cependant voté ; que le requérant n'apporte au soutien de ce grief aucune précision permettant d'en apprécier la portée ; qu'au demeurant la circonstance alléguée ne suffit pas à révéler l'existence d'inscriptions frauduleuses</text:p>
          </table:table-cell>
          <table:table-cell table:number-columns-repeated="16377"/>
        </table:table-row>
        <table:table-row table:style-name="ro1">
          <table:table-cell office:value-type="string" table:style-name="ce3">
            <text:p>Oui</text:p>
          </table:table-cell>
          <table:table-cell office:value-type="string" table:style-name="ce3">
            <text:p>considérants 2, 3, 4, 5 et 7 ne sont pas annotés</text:p>
          </table:table-cell>
          <table:table-cell table:number-columns-repeated="2" table:style-name="ce3"/>
          <table:table-cell office:value-type="string" table:style-name="ce9">
            <text:p><text:a xlink:href="file:///C:/Users/anais/Downloads/AN/1986/rejet/CONSTEXT000017667358_annot.xml">file:\\\P:\CRJ\RECHERCHE\PROJET_JADE\JADE_COMMUN\Annotation\Annotation_automatique_Maritaud\Technologie_light\Super-catégories-objets_0,8\AN\1986\rejet\CONSTEXT000017667358_annot.xml</text:a></text:p>
          </table:table-cell>
          <table:table-cell office:value-type="string" table:style-name="ce3">
            <text:p>7.Opérations</text:p>
          </table:table-cell>
          <table:table-cell office:value-type="string" table:style-name="ce3">
            <text:p><text:s/>6. Considérant que si, dans le sixième bureau de vote de Longwy, les listes électorales ont été émargées par l'apposition d'une croix et non par la signature ou le paraphe prescrit par l'article R. 61 du code électoral, cette irrégularité est sans importance dès lors qu'aucune ambiguïté n'en résulte quant au nombre réel des votants ; qu'il ne résulte pas du dossier que les émargements n'aient pas été apposés par des membres du bureau ; qu'au surplus, aucun des procès-verbaux ne mentionne d'observations à ce sujet ; Sur le grief tiré de l'absence de concordance entre certaines initiales de la liste d'émargement et la désignation des assesseurs au procès-verbal des opérations électorales du premier bureau de Longwy</text:p>
          </table:table-cell>
          <table:table-cell table:number-columns-repeated="16377"/>
        </table:table-row>
        <table:table-row table:style-name="ro1">
          <table:table-cell office:value-type="string" table:style-name="ce3">
            <text:p>Oui</text:p>
          </table:table-cell>
          <table:table-cell office:value-type="string" table:style-name="ce3">
            <text:p>considérants 1, 2, 3, 4 et 5 ne sont pas annotés</text:p>
          </table:table-cell>
          <table:table-cell table:number-columns-repeated="2" table:style-name="ce3"/>
          <table:table-cell office:value-type="string" table:style-name="ce9">
            <text:p><text:a xlink:href="file:///C:/Users/anais/Downloads/AN/1988/rejet/CONSTEXT000017666938_annot.xml">file:\\\P:\CRJ\RECHERCHE\PROJET_JADE\JADE_COMMUN\Annotation\Annotation_automatique_Maritaud\Technologie_light\Super-catégories-objets_0,8\AN\1988\rejet\CONSTEXT000017666938_annot.xml</text:a></text:p>
          </table:table-cell>
          <table:table-cell office:value-type="string" table:style-name="ce3">
            <text:p>4.Campagne</text:p>
          </table:table-cell>
          <table:table-cell office:value-type="string" table:style-name="ce3">
            <text:p><text:s/>6. Considérant que les tracts et affiches litigieux ne contenaient aucune allégation nouvelle susceptible de relancer le débat électoral ; qu'il n'est pas établi que leur diffusion ait revêtu une réelle ampleur ; qu'il apparaît, dans ces conditions, que les irrégularités alléguées n'ont pu exercer une influence de nature à fausser les résultats de la consultatio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9">
            <text:p><text:a xlink:href="file:///C:/Users/anais/Downloads/AN/1988/rejet/CONSTEXT000017666939_annot.xml">file:\\\P:\CRJ\RECHERCHE\PROJET_JADE\JADE_COMMUN\Annotation\Annotation_automatique_Maritaud\Technologie_light\Super-catégories-objets_0,8\AN\1988\rejet\CONSTEXT000017666939_annot.xml</text:a></text:p>
          </table:table-cell>
          <table:table-cell office:value-type="string" table:style-name="ce3">
            <text:p>4.Campagne</text:p>
          </table:table-cell>
          <table:table-cell office:value-type="string" table:style-name="ce3">
            <text:p><text:s/>1. Considérant que, contrairement à ce que soutient le requérant, les propos tenus au cours d'une émission de variétés diffusée la veille du scrutin par une radio locale n'ont pas exercé une influence déterminante sur les résultats de l'élection ; que si le requérant soutient que ces résultats ont été altérés par la distribution tardive d'Im tract, il résulte de l'instruction que le contenu de celui-ci n'excédait pas les limites de la polémique électorale et que sa diffusion avait commencé plusieurs jours avant le scrutin ; que ce second grief ne saurait donc être retenu ; que, par suite, la requête de M. Couturier doit être rejetée ;</text:p>
          </table:table-cell>
          <table:table-cell table:number-columns-repeated="16377"/>
        </table:table-row>
        <table:table-row table:style-name="ro1">
          <table:table-cell office:value-type="string" table:style-name="ce3">
            <text:p>Oui</text:p>
          </table:table-cell>
          <table:table-cell office:value-type="string" table:style-name="ce3">
            <text:p>considérants 1 et 3 ne sont pas annotés</text:p>
          </table:table-cell>
          <table:table-cell table:number-columns-repeated="2" table:style-name="ce3"/>
          <table:table-cell office:value-type="string" table:style-name="ce9">
            <text:p><text:a xlink:href="file:///C:/Users/anais/Downloads/AN/1988/rejet/CONSTEXT000017666940_annot.xml">file:\\\P:\CRJ\RECHERCHE\PROJET_JADE\JADE_COMMUN\Annotation\Annotation_automatique_Maritaud\Technologie_light\Super-catégories-objets_0,8\AN\1988\rejet\CONSTEXT000017666940_annot.xml</text:a></text:p>
          </table:table-cell>
          <table:table-cell office:value-type="string" table:style-name="ce3">
            <text:p>4.Campagne</text:p>
          </table:table-cell>
          <table:table-cell office:value-type="string" table:style-name="ce3">
            <text:p><text:s/>2. Considérant que ces tracts n'ont été diffusés que dans certaines communes de la circonscription; qu'ils reprenaient des arguments utilisés tout au long de la campagne électorale, notamment dans la presse locale, et n'apportaient aucun élément nouveau auquel Monsieur BLADT n'aurait pu répondre; qu'eu égard à leur contenu, qui n'excédait pas les limites de la polémique électorale, ils ne peuvent être regardés comme ayant pour effet de modifier le résultat du scrutin ; - SUR LE GRIEF TIRE DE L'ENVOI AUX ELECTEURS DE LETTRES A EN TETE OFFICIEL</text:p>
          </table:table-cell>
          <table:table-cell table:number-columns-repeated="16377"/>
        </table:table-row>
        <table:table-row table:style-name="ro1">
          <table:table-cell office:value-type="string" table:style-name="ce3">
            <text:p>Oui</text:p>
          </table:table-cell>
          <table:table-cell office:value-type="string" table:style-name="ce3">
            <text:p>considérants 3, 5, 6, 7 et 8 ne sont pas annotés</text:p>
          </table:table-cell>
          <table:table-cell table:number-columns-repeated="2" table:style-name="ce3"/>
          <table:table-cell office:value-type="string" table:style-name="ce9">
            <text:p><text:a xlink:href="file:///C:/Users/anais/Downloads/AN/1988/rejet/CONSTEXT000017666941_annot.xml">file:\\\P:\CRJ\RECHERCHE\PROJET_JADE\JADE_COMMUN\Annotation\Annotation_automatique_Maritaud\Technologie_light\Super-catégories-objets_0,8\AN\1988\rejet\CONSTEXT000017666941_annot.xml</text:a></text:p>
          </table:table-cell>
          <table:table-cell office:value-type="string" table:style-name="ce3">
            <text:p>5.Campagne</text:p>
          </table:table-cell>
          <table:table-cell office:value-type="string" table:style-name="ce3">
            <text:p><text:s/>4. Considérant en premier lieu que les abus d'affichage auxquels se serait livré M. Lordinot ou la circonstance que les affiches de M. Renard auraient été recouvertes d'inscriptions l'assimilant à un membre d'un parti d'extrême droite n'ont pas revêtu, eu égard aux moyens de propagande utilisés de son côté par le requérant au cours de la campagne électorale, le caractère de manoeuvres</text:p>
          </table:table-cell>
          <table:table-cell table:number-columns-repeated="16377"/>
        </table:table-row>
        <table:table-row table:style-name="ro1">
          <table:table-cell office:value-type="string" table:style-name="ce3">
            <text:p>Oui</text:p>
          </table:table-cell>
          <table:table-cell office:value-type="string" table:style-name="ce3">
            <text:p>considérants 3, 5, 6, 7 et 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88\rejet\CONSTEXT000017666941_annot.xml</text:p>
          </table:table-cell>
          <table:table-cell office:value-type="string" table:style-name="ce3">
            <text:p>7.Opérations</text:p>
          </table:table-cell>
          <table:table-cell office:value-type="string" table:style-name="ce3">
            <text:p><text:s/>9. Considérant qu'il ne résulte pas de l'instruction que le défaut d'annexion au procès-verbal des résultats du scrutin dans la commune de Macouba des bulletins de vote et enveloppes déclarés nuls, en méconnaissance des dispositions de l'article L. 66 du code électoral, ait eu pour but ou pour conséquence de porter atteinte à la sincérité du scrutin</text:p>
          </table:table-cell>
          <table:table-cell table:number-columns-repeated="16377"/>
        </table:table-row>
        <table:table-row table:style-name="ro1">
          <table:table-cell office:value-type="string" table:style-name="ce3">
            <text:p>Non</text:p>
          </table:table-cell>
          <table:table-cell office:value-type="string" table:style-name="ce3">
            <text:p>considérant 2 n'est pas annoté</text:p>
          </table:table-cell>
          <table:table-cell table:style-name="ce3"/>
          <table:table-cell office:value-type="string" table:style-name="ce3">
            <text:p>3. Candidature</text:p>
          </table:table-cell>
          <table:table-cell office:value-type="string" table:style-name="ce9">
            <text:p><text:a xlink:href="file:///C:/Users/anais/Downloads/AN/1988/rejet/CONSTEXT000017666942_annot.xml">file:\\\P:\CRJ\RECHERCHE\PROJET_JADE\JADE_COMMUN\Annotation\Annotation_automatique_Maritaud\Technologie_light\Super-catégories-objets_0,8\AN\1988\rejet\CONSTEXT000017666942_annot.xml</text:a></text:p>
          </table:table-cell>
          <table:table-cell office:value-type="string" table:style-name="ce3">
            <text:p>4.Campagne</text:p>
          </table:table-cell>
          <table:table-cell office:value-type="string" table:style-name="ce3">
            <text:p><text:s/>4. Considérant que ce dernier texte édicte une inéligibilité ; que toute inéligibilité, qui a pour effet d'apporter une atteinte à la liberté des candidatures, doit être interprétée restrictivement</text:p>
          </table:table-cell>
          <table:table-cell table:number-columns-repeated="16377"/>
        </table:table-row>
        <table:table-row table:style-name="ro1">
          <table:table-cell office:value-type="string" table:style-name="ce3">
            <text:p>Oui</text:p>
          </table:table-cell>
          <table:table-cell office:value-type="string" table:style-name="ce3">
            <text:p>considérants 2, 3, 4, 5, 6, 8, 9, et 10 ne sont pas annotés</text:p>
          </table:table-cell>
          <table:table-cell table:number-columns-repeated="2" table:style-name="ce3"/>
          <table:table-cell office:value-type="string" table:style-name="ce9">
            <text:p><text:a xlink:href="file:///C:/Users/anais/Downloads/AN/1988/rejet/CONSTEXT000017666944_annot.xml">file:\\\P:\CRJ\RECHERCHE\PROJET_JADE\JADE_COMMUN\Annotation\Annotation_automatique_Maritaud\Technologie_light\Super-catégories-objets_0,8\AN\1988\rejet\CONSTEXT000017666944_annot.xml</text:a></text:p>
          </table:table-cell>
          <table:table-cell office:value-type="string" table:style-name="ce3">
            <text:p>7.Opérations</text:p>
          </table:table-cell>
          <table:table-cell office:value-type="string" table:style-name="ce3">
            <text:p><text:s/>1. Considérant que le requérant soutient que dans les bureaux 3, 4, 5, 6, 7, 10 et 15 de la commune de Bastia les listes d'émargement ont été tenues de manière irrégulière, soit que ces listes n'aient pas été signées par les membres du bureau ou par certains d'entre eux, soit que des différences de signature existent pour une même personne ; qu'il résulte de l'instruction que, dans les bureaux de vote dont les listes comportaient l'une des irrégularités dénoncées par le requérant, le procès-verbal régulièrement signé ne contient aucune observation à ce sujet et ne fait apparaître aucune discordance entre le nombre des émargements constatés par les membres du bureau et celui des bulletins et enveloppes trouvés dans l'urne ; que dans ces conditions, s'il apparaît que des irrégularités ont été commises dans la tenue des documents électoraux, il n'est pas établi qu'elles aient entraîné des fraudes ; - Sur le grief relatif au contrôle de l'identité des électeurs</text:p>
          </table:table-cell>
          <table:table-cell table:number-columns-repeated="16377"/>
        </table:table-row>
        <table:table-row table:style-name="ro1">
          <table:table-cell office:value-type="string" table:style-name="ce3">
            <text:p>Oui</text:p>
          </table:table-cell>
          <table:table-cell office:value-type="string" table:style-name="ce3">
            <text:p>considérants 2, 3, 4, 5, 6, 8, 9, et 10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88\rejet\CONSTEXT000017666944_annot.xml</text:p>
          </table:table-cell>
          <table:table-cell office:value-type="string" table:style-name="ce3">
            <text:p>7.Opérations</text:p>
          </table:table-cell>
          <table:table-cell office:value-type="string" table:style-name="ce3">
            <text:p><text:s/>7. Considérant que le requérant fait valoir que le bureau centralisateur s'est réuni pour procéder au dépouillement avant la clôture du scrutin ; qu'il soutient également que les délégués des candidats n'auraient pas été conviés à participer aux opérations de décompte des voix et que le procès-verbal du bureau centralisateur ne comporte pas la signature de l'ensemble des présidents des différents bureaux de vote</text:p>
          </table:table-cell>
          <table:table-cell table:number-columns-repeated="16377"/>
        </table:table-row>
        <table:table-row table:style-name="ro1">
          <table:table-cell office:value-type="string" table:style-name="ce3">
            <text:p>Oui</text:p>
          </table:table-cell>
          <table:table-cell office:value-type="string" table:style-name="ce3">
            <text:p>considérants 2 et 3 ne sont pas annotés</text:p>
          </table:table-cell>
          <table:table-cell table:number-columns-repeated="2" table:style-name="ce3"/>
          <table:table-cell office:value-type="string" table:style-name="ce9">
            <text:p><text:a xlink:href="file:///C:/Users/anais/Downloads/AN/1988/rejet/CONSTEXT000017667702_annot.xml">file:\\\P:\CRJ\RECHERCHE\PROJET_JADE\JADE_COMMUN\Annotation\Annotation_automatique_Maritaud\Technologie_light\Super-catégories-objets_0,8\AN\1988\rejet\CONSTEXT000017667702_annot.xml</text:a></text:p>
          </table:table-cell>
          <table:table-cell office:value-type="string" table:style-name="ce3">
            <text:p>4.Campagne</text:p>
          </table:table-cell>
          <table:table-cell office:value-type="string" table:style-name="ce3">
            <text:p><text:s/>4. Considérant enfin que si, contrairement aux dispositions de l'article R. 27 du code électoral, les affiches électorales de M. Lafleur comprenaient une combinaison des trois couleurs bleu, blanc et rouge, cette irrégularité n'a pas été en l'espèce de nature à conférer un caractère officiel à sa candidature et à exercer une influence sur les résultats du scrutin</text:p>
          </table:table-cell>
          <table:table-cell table:number-columns-repeated="16377"/>
        </table:table-row>
        <table:table-row table:style-name="ro1">
          <table:table-cell office:value-type="string" table:style-name="ce5">
            <text:p>Oui</text:p>
          </table:table-cell>
          <table:table-cell office:value-type="string" table:style-name="ce3">
            <text:p>considérants 1 et 3 ne sont pas annotés</text:p>
          </table:table-cell>
          <table:table-cell table:number-columns-repeated="2" table:style-name="ce3"/>
          <table:table-cell office:value-type="string" table:style-name="ce9">
            <text:p><text:a xlink:href="file:///C:/Users/anais/Downloads/AN/1988/rejet/CONSTEXT000017667703_annot.xml">file:\\\P:\CRJ\RECHERCHE\PROJET_JADE\JADE_COMMUN\Annotation\Annotation_automatique_Maritaud\Technologie_light\Super-catégories-objets_0,8\AN\1988\rejet\CONSTEXT000017667703_annot.xml</text:a></text:p>
          </table:table-cell>
          <table:table-cell office:value-type="string" table:style-name="ce3">
            <text:p>4.Campagne</text:p>
          </table:table-cell>
          <table:table-cell office:value-type="string" table:style-name="ce3">
            <text:p><text:s/>2. Considérant en deuxième lieu que M. Monnier fait valoir que la commission de propagande l'aurait insuffisamment informé sur les conditions de présentation des bulletins et n'aurait pas formulé d'observation sur leur contenu alors qu'ils n'étaient pas conformes aux prescriptions de l'article R. 103 du code électoral ; que ces circonstances, à les supposer établies, n'ont pu avoir, en l'espèce, pour effet de faire échec à la candidature de M. Monnier et n'ont pas été susceptibles d'altérer la sincérité du scrutin</text:p>
          </table:table-cell>
          <table:table-cell table:number-columns-repeated="16377"/>
        </table:table-row>
        <table:table-row table:style-name="ro1">
          <table:table-cell office:value-type="string" table:style-name="ce3">
            <text:p>Non</text:p>
          </table:table-cell>
          <table:table-cell office:value-type="string" table:style-name="ce3">
            <text:p>considérants 2 et 3 ne sont pas annotés</text:p>
          </table:table-cell>
          <table:table-cell table:style-name="ce3"/>
          <table:table-cell office:value-type="string" table:style-name="ce3">
            <text:p>7. Opérations</text:p>
          </table:table-cell>
          <table:table-cell office:value-type="string" table:style-name="ce9">
            <text:p><text:a xlink:href="file:///C:/Users/anais/Downloads/AN/1988/rejet/CONSTEXT000017667706_annot.xml">file:\\\P:\CRJ\RECHERCHE\PROJET_JADE\JADE_COMMUN\Annotation\Annotation_automatique_Maritaud\Technologie_light\Super-catégories-objets_0,8\AN\1988\rejet\CONSTEXT000017667706_annot.xml</text:a></text:p>
          </table:table-cell>
          <table:table-cell office:value-type="string" table:style-name="ce3">
            <text:p>4.Campagne</text:p>
          </table:table-cell>
          <table:table-cell office:value-type="string" table:style-name="ce3">
            <text:p><text:s/>1. Considérant que si, sur les bulletins mis à la disposition des électeurs, le nom du remplaçant de Monsieur CAMBADELIS a été, en méconnaissance des dispositions de l'article R. 103 du code électoral, suivi et non précédé de la mention 'suppléant ' figurant entre parenthèses, cette présentation n'était d'aucune manière susceptible d'entraîner de confusion dans l'esprit des électeurs ; - SUR LE GRIEF TIRE DE LA VIOLATION DE L'ARTICLE L. 271 DU CODE ELECTORAL</text:p>
          </table:table-cell>
          <table:table-cell table:number-columns-repeated="16377"/>
        </table:table-row>
        <table:table-row table:style-name="ro1">
          <table:table-cell office:value-type="string" table:style-name="ce3">
            <text:p>Oui</text:p>
          </table:table-cell>
          <table:table-cell office:value-type="string" table:style-name="ce3">
            <text:p>considérants 1, 2, 3 et 4 ne sont pas annotés</text:p>
          </table:table-cell>
          <table:table-cell table:number-columns-repeated="2" table:style-name="ce3"/>
          <table:table-cell office:value-type="string" table:style-name="ce9">
            <text:p><text:a xlink:href="file:///C:/Users/anais/Downloads/AN/1988/rejet/CONSTEXT000017667711_annot.xml">file:\\\P:\CRJ\RECHERCHE\PROJET_JADE\JADE_COMMUN\Annotation\Annotation_automatique_Maritaud\Technologie_light\Super-catégories-objets_0,8\AN\1988\rejet\CONSTEXT000017667711_annot.xml</text:a></text:p>
          </table:table-cell>
          <table:table-cell office:value-type="string" table:style-name="ce3">
            <text:p>7.Opérations</text:p>
          </table:table-cell>
          <table:table-cell office:value-type="string" table:style-name="ce3">
            <text:p><text:s/>5. Considérant que la circonstance que sur la liste des électeurs du bureau vote n°104, le vote d'un certain nombre d'électeurs ait été attesté par l'apposition d'une croix, et non, comme le prescrit l'article R. 61 du code électoral, par le paraphe ou la signature d'un membre du bureau, n'est pas à elle seule, en l'absence d'allégations relatives à l'existence d'une fraude, de nature à entacher le scrutin d'irrégularité</text:p>
          </table:table-cell>
          <table:table-cell table:number-columns-repeated="16377"/>
        </table:table-row>
        <table:table-row table:style-name="ro1">
          <table:table-cell office:value-type="string" table:style-name="ce3">
            <text:p>Oui</text:p>
          </table:table-cell>
          <table:table-cell office:value-type="string" table:style-name="ce3">
            <text:p>considérants 1, 2, 3, 4, 6, 7 et 11 ne sont pas annotés</text:p>
          </table:table-cell>
          <table:table-cell table:number-columns-repeated="2" table:style-name="ce3"/>
          <table:table-cell office:value-type="string" table:style-name="ce9">
            <text:p><text:a xlink:href="file:///C:/Users/anais/Downloads/AN/1988/rejet/CONSTEXT000017667713_annot.xml">file:\\\P:\CRJ\RECHERCHE\PROJET_JADE\JADE_COMMUN\Annotation\Annotation_automatique_Maritaud\Technologie_light\Super-catégories-objets_0,8\AN\1988\rejet\CONSTEXT000017667713_annot.xml</text:a></text:p>
          </table:table-cell>
          <table:table-cell office:value-type="string" table:style-name="ce3">
            <text:p>4.Campagne</text:p>
          </table:table-cell>
          <table:table-cell office:value-type="string" table:style-name="ce3">
            <text:p><text:s/>5. Considérant que le fait que sur le territoire de la commune de Courson-Monteloup, Mme Morichaud ait eu à sa disposition le panneau d'affichage n° 2, et non le panneau n° 4 comme au premier tour de scrutin, ne peut être considéré comme une atteinte à l'égalité entre les candidats ; - Sur les griefs relatifs aux opérations de vole et au dépouillement: En ce qui concerne le grief tiré d'émargements irréguliers</text:p>
          </table:table-cell>
          <table:table-cell table:number-columns-repeated="16377"/>
        </table:table-row>
        <table:table-row table:style-name="ro1">
          <table:table-cell office:value-type="string" table:style-name="ce3">
            <text:p>Oui</text:p>
          </table:table-cell>
          <table:table-cell office:value-type="string" table:style-name="ce3">
            <text:p>considérants 1, 2, 3, 4, 6, 7 et 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88\rejet\CONSTEXT000017667713_annot.xml</text:p>
          </table:table-cell>
          <table:table-cell office:value-type="string" table:style-name="ce3">
            <text:p>7.Opérations</text:p>
          </table:table-cell>
          <table:table-cell office:value-type="string" table:style-name="ce3">
            <text:p><text:s/>8. Considérant qu'aucune disposition législative ou réglementaire n'interdit d'utiliser pour le second tour des bulletins imprimés au nom d'un candidat pour le premier ; que c'est par suite à bon droit que la commission de recensement général des votes a décidé de réintégrer ces bulletins dans les suffrages exprimés en faveur de Mme Morichaud ; que, cependant, cette réintégration n'a porté que sur dix bulletins alors qu'il résulte de l'instruction que c'est en fait quatorze bulletins qui avaient été déclarés nuls par les bureaux de vote ; qu'il convient donc d'ajouter quatre voix au nombre des suffrages recueillis par Mme Morichaud, ce qui correspond à un bulletin annulé à tort dans chacune des communes d'Epinay-sur-Orge, Marcoussis, Montlhéry et Les Molières ; En ce qui concerne le défaut d'annexion au procès-verbal de trois bureaux de bulletins déclarés nuls</text:p>
          </table:table-cell>
          <table:table-cell table:number-columns-repeated="16377"/>
        </table:table-row>
        <table:table-row table:style-name="ro1">
          <table:table-cell office:value-type="string" table:style-name="ce6">
            <text:p>Oui</text:p>
          </table:table-cell>
          <table:table-cell office:value-type="string" table:style-name="ce3">
            <text:p>considérants 1, 2, 3, 4, 6, 7 et 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88\rejet\CONSTEXT000017667713_annot.xml</text:p>
          </table:table-cell>
          <table:table-cell office:value-type="string" table:style-name="ce3">
            <text:p>7.Opérations</text:p>
          </table:table-cell>
          <table:table-cell office:value-type="string" table:style-name="ce3">
            <text:p><text:s/>9. Considérant que la requérante allègue que dans le troisième bureau de la commune d'Epinay-sur-Orge, 18 votes ont été déclarés nuls lors des opérations de dépouillement sans qu'aucun bulletin annulé ne soit joint au procès-verbal et sans que celui-ci indique le motif de l'annulation ; qu'il est soutenu également qu'à Vaugrigneuse, trois votes ont été comptés comme nuls sans que les enveloppes correspondant à ces votes ne soient jointes au procès-verbal ; qu'à Villejust, cinq suffrages exprimés ont été comptés nuls sans que ni les bulletins, ni les enveloppes ne soient annexés au procès-verbal; que, selon la requérante, rien ne permet de présumer que les votes déclarés nuls et dont la vérification s'avère impossible n'auraient pas dû être réintégrés en sa faveur, comme cela a été le cas pour les bulletins annulés à tort au motif qu'ils avaient été établis pour le premier tour</text:p>
          </table:table-cell>
          <table:table-cell table:number-columns-repeated="16377"/>
        </table:table-row>
        <table:table-row table:style-name="ro1">
          <table:table-cell office:value-type="string" table:style-name="ce3">
            <text:p>Oui</text:p>
          </table:table-cell>
          <table:table-cell office:value-type="string" table:style-name="ce3">
            <text:p>considérants 1, 2, 3, 4, 6, 7 et 11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88\rejet\CONSTEXT000017667713_annot.xml</text:p>
          </table:table-cell>
          <table:table-cell office:value-type="string" table:style-name="ce3">
            <text:p>7.Opérations</text:p>
          </table:table-cell>
          <table:table-cell office:value-type="string" table:style-name="ce3">
            <text:p><text:s/>10. Considérant qu'en ce qui concerne le troisième bureau de la commune d'Epinay-sur-Orge, si le procès-verbal ne mentionne pas la raison pour laquelle 18 votes ont été écartés, il reste que 18 enveloppes vides, contresignées par les membres du bureau, sont jointes audit procès-verbal ; qu'il y a lieu d'en inférer que les 18 votes retranchés correspondent effectivement à des enveloppes dans lesquelles les électeurs n'avaient pas introduit de bulletin</text:p>
          </table:table-cell>
          <table:table-cell table:number-columns-repeated="16377"/>
        </table:table-row>
        <table:table-row table:style-name="ro1">
          <table:table-cell office:value-type="string" table:style-name="ce3">
            <text:p>Oui</text:p>
          </table:table-cell>
          <table:table-cell office:value-type="string" table:style-name="ce3">
            <text:p>considérants 1 et 3 ne sont pas annotés</text:p>
          </table:table-cell>
          <table:table-cell table:number-columns-repeated="2" table:style-name="ce3"/>
          <table:table-cell office:value-type="string" table:style-name="ce9">
            <text:p><text:a xlink:href="file:///C:/Users/anais/Downloads/AN/1988/rejet/CONSTEXT000017667755_annot.xml">file:\\\P:\CRJ\RECHERCHE\PROJET_JADE\JADE_COMMUN\Annotation\Annotation_automatique_Maritaud\Technologie_light\Super-catégories-objets_0,8\AN\1988\rejet\CONSTEXT000017667755_annot.xml</text:a></text:p>
          </table:table-cell>
          <table:table-cell office:value-type="string" table:style-name="ce3">
            <text:p>4.Campagne</text:p>
          </table:table-cell>
          <table:table-cell office:value-type="string" table:style-name="ce3">
            <text:p><text:s/>2. Considérant que cet hebdomadaire, ce faisant, n'a fait qu'user de la liberté reconnue à la presse ; Sur le grief tiré de l'apposition irrégulière d'affiches hostiles au candidat</text:p>
          </table:table-cell>
          <table:table-cell table:number-columns-repeated="16377"/>
        </table:table-row>
        <table:table-row table:style-name="ro1">
          <table:table-cell office:value-type="string" table:style-name="ce3">
            <text:p>Oui</text:p>
          </table:table-cell>
          <table:table-cell office:value-type="string" table:style-name="ce3">
            <text:p>considérants 1 et 2 ne sont pas annotés</text:p>
          </table:table-cell>
          <table:table-cell table:number-columns-repeated="2" table:style-name="ce3"/>
          <table:table-cell office:value-type="string" table:style-name="ce9">
            <text:p><text:a xlink:href="file:///C:/Users/anais/Downloads/AN/1988/rejet/CONSTEXT000017667762_annot.xml">file:\\\P:\CRJ\RECHERCHE\PROJET_JADE\JADE_COMMUN\Annotation\Annotation_automatique_Maritaud\Technologie_light\Super-catégories-objets_0,8\AN\1988\rejet\CONSTEXT000017667762_annot.xml</text:a></text:p>
          </table:table-cell>
          <table:table-cell office:value-type="string" table:style-name="ce3">
            <text:p>4.Campagne</text:p>
          </table:table-cell>
          <table:table-cell office:value-type="string" table:style-name="ce3">
            <text:p><text:s/>3. Considérant que M. Durepaire fait état de la distribution d'un tract contenant des assertions diffamatoires à son égard ; qu'aucune précision n'est apportée tant sur l'ampleur que sur les modalités de la diffusion de ce tract ;que, dans ces conditions et compte tenu de l'écart des voix séparant M. Lambert, candidat proclamé élu, du requérant, la diffusion du tract n'a pas, dans les circonstances de l'affaire, modifié le résultat de la consultation ;</text:p>
          </table:table-cell>
          <table:table-cell table:number-columns-repeated="16377"/>
        </table:table-row>
        <table:table-row table:style-name="ro1">
          <table:table-cell office:value-type="string" table:style-name="ce3">
            <text:p>Oui</text:p>
          </table:table-cell>
          <table:table-cell office:value-type="string" table:style-name="ce3">
            <text:p>considérant 2 n'est pas annoté</text:p>
          </table:table-cell>
          <table:table-cell table:number-columns-repeated="2" table:style-name="ce3"/>
          <table:table-cell office:value-type="string" table:style-name="ce9">
            <text:p><text:a xlink:href="file:///C:/Users/anais/Downloads/AN/1988/rejet/CONSTEXT000017667763_annot.xml">file:\\\P:\CRJ\RECHERCHE\PROJET_JADE\JADE_COMMUN\Annotation\Annotation_automatique_Maritaud\Technologie_light\Super-catégories-objets_0,8\AN\1988\rejet\CONSTEXT000017667763_annot.xml</text:a></text:p>
          </table:table-cell>
          <table:table-cell office:value-type="string" table:style-name="ce3">
            <text:p>7.Opérations</text:p>
          </table:table-cell>
          <table:table-cell office:value-type="string" table:style-name="ce3">
            <text:p><text:s/>1. Considérant que la requérante invoque, en premier lieu, qu'aucun bureau de vote de la circonscription ne détenait la copie certifiée conforme des volets de procuration en annexe à la liste d'émargement, rendant ainsi inopérant le contrôle de ses délégués, en second lieu, que son représentant s'est heurté au second tour de scrutin à de grandes difficultés pour se faire communiquer le contenu des volets de procuration par le maire du 13e arrondissement, enfin, qu'aucune indication du nombre de suffrages exprimés au moyen d'un vote par procuration ne figurait sur le procès-verbal du bureau centralisateur</text:p>
          </table:table-cell>
          <table:table-cell table:number-columns-repeated="16377"/>
        </table:table-row>
        <table:table-row table:style-name="ro1">
          <table:table-cell office:value-type="string" table:style-name="ce3">
            <text:p>Oui</text:p>
          </table:table-cell>
          <table:table-cell office:value-type="string" table:style-name="ce3">
            <text:p>considérants 2 et 3 ne sont pas annotés</text:p>
          </table:table-cell>
          <table:table-cell table:number-columns-repeated="2" table:style-name="ce3"/>
          <table:table-cell office:value-type="string" table:style-name="ce9">
            <text:p><text:a xlink:href="file:///C:/Users/anais/Downloads/AN/1988/rejet/CONSTEXT000017667769_annot.xml">file:\\\P:\CRJ\RECHERCHE\PROJET_JADE\JADE_COMMUN\Annotation\Annotation_automatique_Maritaud\Technologie_light\Super-catégories-objets_0,8\AN\1988\rejet\CONSTEXT000017667769_annot.xml</text:a></text:p>
          </table:table-cell>
          <table:table-cell office:value-type="string" table:style-name="ce3">
            <text:p>4.Campagne</text:p>
          </table:table-cell>
          <table:table-cell office:value-type="string" table:style-name="ce3">
            <text:p><text:s/>1. Considérant que, selon le requérant, l'entretien de M. Philippe Marchand avec un journaliste, paru dans une publication locale le 28 mai 1988, a constitué une violation des dispositions de l'article L. 52-1 du code électoral qui prohibent pendant la durée de la campagne l'utilisation, à des fins de propagande électorale, de tout procédé de publicité commerciale par voie de presse ; qu'à la supposer établie, l'irrégularité invoquée n'a pu, eu égard au contenu non polémique de l'entretien incriminé, exercer une influence déterminante sur le sens du scrutin ; Sur le grief tiré de la diffusion tardive d'un tract</text:p>
          </table:table-cell>
          <table:table-cell table:number-columns-repeated="16377"/>
        </table:table-row>
        <table:table-row table:style-name="ro1">
          <table:table-cell office:value-type="string" table:style-name="ce3">
            <text:p>Oui</text:p>
          </table:table-cell>
          <table:table-cell office:value-type="string" table:style-name="ce3">
            <text:p>considérants 2, 3 et 4 ne sont pas annotés</text:p>
          </table:table-cell>
          <table:table-cell table:number-columns-repeated="2" table:style-name="ce3"/>
          <table:table-cell office:value-type="string" table:style-name="ce9">
            <text:p><text:a xlink:href="file:///C:/Users/anais/Downloads/AN/1988/rejet/CONSTEXT000017667811_annot.xml">file:\\\P:\CRJ\RECHERCHE\PROJET_JADE\JADE_COMMUN\Annotation\Annotation_automatique_Maritaud\Technologie_light\Super-catégories-objets_0,8\AN\1988\rejet\CONSTEXT000017667811_annot.xml</text:a></text:p>
          </table:table-cell>
          <table:table-cell office:value-type="string" table:style-name="ce3">
            <text:p>4.Campagne</text:p>
          </table:table-cell>
          <table:table-cell office:value-type="string" table:style-name="ce3">
            <text:p><text:s/>1. Considérant que dans la nuit du 10 au 11 juin 1988 un tract reproduisant, à partir d'un montage, un article paru dans un hebdomadaire national au mois de janvier 1988 et comportant des imputations diffamatoires de nature à jeter le discrédit sur M. Barbier a été affiché et diffusé</text:p>
          </table:table-cell>
          <table:table-cell table:number-columns-repeated="16377"/>
        </table:table-row>
        <table:table-row table:style-name="ro1">
          <table:table-cell office:value-type="string" table:style-name="ce3">
            <text:p>Oui</text:p>
          </table:table-cell>
          <table:table-cell office:value-type="string" table:style-name="ce3">
            <text:p>considérant 1 n'est pas annoté</text:p>
          </table:table-cell>
          <table:table-cell table:number-columns-repeated="2" table:style-name="ce3"/>
          <table:table-cell office:value-type="string" table:style-name="ce9">
            <text:p><text:a xlink:href="file:///C:/Users/anais/Downloads/AN/1988/rejet/CONSTEXT000017667820_annot.xml">file:\\\P:\CRJ\RECHERCHE\PROJET_JADE\JADE_COMMUN\Annotation\Annotation_automatique_Maritaud\Technologie_light\Super-catégories-objets_0,8\AN\1988\rejet\CONSTEXT000017667820_annot.xml</text:a></text:p>
          </table:table-cell>
          <table:table-cell office:value-type="string" table:style-name="ce3">
            <text:p>7.Opérations</text:p>
          </table:table-cell>
          <table:table-cell office:value-type="string" table:style-name="ce3">
            <text:p><text:s/>2. Considérant, d'autre part, que la présentation des bulletins de vote au nom de Monsieur GATEL ne révèle aucune manoeuvre de nature à altérer la sincérité du scrutin</text:p>
          </table:table-cell>
          <table:table-cell table:number-columns-repeated="16377"/>
        </table:table-row>
        <table:table-row table:style-name="ro1">
          <table:table-cell office:value-type="string" table:style-name="ce3">
            <text:p>Non</text:p>
          </table:table-cell>
          <table:table-cell office:value-type="string" table:style-name="ce3">
            <text:p>considérants 1 et 2 ne sont pas annotés</text:p>
          </table:table-cell>
          <table:table-cell table:style-name="ce3"/>
          <table:table-cell office:value-type="string" table:style-name="ce3">
            <text:p>7. Opérations</text:p>
          </table:table-cell>
          <table:table-cell office:value-type="string" table:style-name="ce9">
            <text:p><text:a xlink:href="file:///C:/Users/anais/Downloads/AN/1988/rejet/CONSTEXT000017667824_annot.xml">file:\\\P:\CRJ\RECHERCHE\PROJET_JADE\JADE_COMMUN\Annotation\Annotation_automatique_Maritaud\Technologie_light\Super-catégories-objets_0,8\AN\1988\rejet\CONSTEXT000017667824_annot.xml</text:a></text:p>
          </table:table-cell>
          <table:table-cell office:value-type="string" table:style-name="ce3">
            <text:p>4.Campagne</text:p>
          </table:table-cell>
          <table:table-cell office:value-type="string" table:style-name="ce3">
            <text:p><text:s/>4. Considérant, toutefois, que le fait que le préfet du Var ait cru devoir appeler l'attention de M. Route, le 3 juin 1988, sur l'irrégularité des bulletins qu'il avait déposés n'a pas, en l'espèce, affecté la liberté et la sincérité du scrutin</text:p>
          </table:table-cell>
          <table:table-cell table:number-columns-repeated="16377"/>
        </table:table-row>
        <table:table-row table:style-name="ro1">
          <table:table-cell office:value-type="string" table:style-name="ce3">
            <text:p>Oui</text:p>
          </table:table-cell>
          <table:table-cell office:value-type="string" table:style-name="ce3">
            <text:p>considérants 1 et 3 ne sont pas annotés</text:p>
          </table:table-cell>
          <table:table-cell table:number-columns-repeated="2" table:style-name="ce3"/>
          <table:table-cell office:value-type="string" table:style-name="ce9">
            <text:p><text:a xlink:href="file:///C:/Users/anais/Downloads/AN/1988/rejet/CONSTEXT000047529898_annot.xml">file:\\\P:\CRJ\RECHERCHE\PROJET_JADE\JADE_COMMUN\Annotation\Annotation_automatique_Maritaud\Technologie_light\Super-catégories-objets_0,8\AN\1988\rejet\CONSTEXT000047529898_annot.xml</text:a></text:p>
          </table:table-cell>
          <table:table-cell office:value-type="string" table:style-name="ce3">
            <text:p>4.Campagne</text:p>
          </table:table-cell>
          <table:table-cell office:value-type="string" table:style-name="ce3">
            <text:p>; 2. Considérant en deuxième lieu que M. Monnier fait valoir que la commission de propagande l'aurait insuffisamment informé sur les conditions de présentation des bulletins et n'aurait pas formulé d'observation sur leur contenu alors qu'ils n'étaient pas conformes aux prescriptions de l'article R. 103 du code électoral ; que ces circonstances, à les supposer établies, n'ont pu avoir, en l'espèce, pour effet de faire échec à la candidature de M. Monnier et n'ont pas été susceptibles d'altérer la sincérité du scrutin</text:p>
          </table:table-cell>
          <table:table-cell table:number-columns-repeated="16377"/>
        </table:table-row>
        <table:table-row table:style-name="ro1">
          <table:table-cell office:value-type="string" table:style-name="ce6">
            <text:p>Oui</text:p>
          </table:table-cell>
          <table:table-cell office:value-type="string" table:style-name="ce3">
            <text:p>considérants 1, 2, 3, 4, 6, 8, 13 et 14 ne sont pas annotés</text:p>
          </table:table-cell>
          <table:table-cell table:number-columns-repeated="2" table:style-name="ce3"/>
          <table:table-cell office:value-type="string" table:style-name="ce9">
            <text:p><text:a xlink:href="file:///C:/Users/anais/Downloads/AN/1989/rejet/CONSTEXT000017667504_annot.xml">file:\\\P:\CRJ\RECHERCHE\PROJET_JADE\JADE_COMMUN\Annotation\Annotation_automatique_Maritaud\Technologie_light\Super-catégories-objets_0,8\AN\1989\rejet\CONSTEXT000017667504_annot.xml</text:a></text:p>
          </table:table-cell>
          <table:table-cell office:value-type="string" table:style-name="ce3">
            <text:p>4.Campagne</text:p>
          </table:table-cell>
          <table:table-cell office:value-type="string" table:style-name="ce3">
            <text:p><text:s/>5. Considérant que, si M. Teissier fait valoir qu'une chaîne nationale de télévision a consacré le 26 janvier 1989 une émission à M. Tapie, il résulte de l'instruction que cette chaîne a diffusé le même jour un entretien avec le requérant à une heure de forte audience</text:p>
          </table:table-cell>
          <table:table-cell table:number-columns-repeated="16377"/>
        </table:table-row>
        <table:table-row table:style-name="ro1">
          <table:table-cell office:value-type="string" table:style-name="ce3">
            <text:p>Oui</text:p>
          </table:table-cell>
          <table:table-cell office:value-type="string" table:style-name="ce3">
            <text:p>considérants 1, 2, 3, 4, 6, 8, 13 et 1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89\rejet\CONSTEXT000017667504_annot.xml</text:p>
          </table:table-cell>
          <table:table-cell office:value-type="string" table:style-name="ce3">
            <text:p>4.Campagne</text:p>
          </table:table-cell>
          <table:table-cell office:value-type="string" table:style-name="ce3">
            <text:p><text:s/>7. Considérant que, selon le requérant, la publication par un quotidien local, d'une part, de deux appels d'un conseiller municipal membre du centre des démocrates sociaux invitant à voter pour M. Tapie et, d'autre part, d'une page intitulée 'Bon anniversaire M. Tapie ', a constitué une violation des dispositions de l'article L. 52-1 du code électoral qui prohibent pendant la durée de la campagne l'utilisation, à des fins de propagande électorale, de tout procédé de publicité commerciale par voie de presse; qu'à les supposer établies, les irrégularités invoquées n'ont pu, eu égard au contenu des insertions incriminées, exercer une influence déterminante sur le scrutin ; - Sur le moyen tiré de la violation de la loi organique n° 88-226 du 11 mars 1988</text:p>
          </table:table-cell>
          <table:table-cell table:number-columns-repeated="16377"/>
        </table:table-row>
        <table:table-row table:style-name="ro1">
          <table:table-cell office:value-type="string" table:style-name="ce3">
            <text:p>Oui</text:p>
          </table:table-cell>
          <table:table-cell office:value-type="string" table:style-name="ce3">
            <text:p>considérants 1, 2, 3, 4, 6, 8, 13 et 14 ne sont pas annotés</text:p>
          </table:table-cell>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1989\rejet\CONSTEXT000017667504_annot.xml</text:p>
          </table:table-cell>
          <table:table-cell office:value-type="string" table:style-name="ce3">
            <text:p>6.Financement</text:p>
          </table:table-cell>
          <table:table-cell office:value-type="string" table:style-name="ce3">
            <text:p><text:s/>9. Considérant que l'article L-0.163-1 ajouté au code électoral par l'article 7 de la loi organique n° 88-226 du 11 mars 1988 fait obligation à chaque candidat à l'élection des députés d'établir un compte de campagne retraçant, 'selon leur origine, l'ensemble des recettes perçues et, selon leur nature, l'ensemble des dépenses effectuées en vue de son élection par lui-même ou pour son compte dans les trois mois précédant le scrutin ; qu'en vertu de l'article L.0.163-2 ajouté également au code électoral par la loi organique précitée, les dépenses de campagne d'un candidat, autres que les dépenses de propagande directement prises en charge par l'Etat, ne peuvent dépasser un plafond de 500 000 F, dont l'actualisation est prévue chaque année en fonction de l'évolution des prix à la consommation des ménages. que l'article L.O. 179-1, pareillement ajouté au code électoral prescrit à chaque candidat présent au premier tour de scrutin de déposer à la préfecture, dans les trente jours qui suivent le tour de scrutin où l'élection a été acquise, le compte de sa campagne, présenté par un membre de l'ordre des experts-comptables et des comptables agréés et accompagné, comme il est dit au premier alinéa de l'article L.0- 179-1, 'des justificatifs de ses recettes ainsi que des factures, devis et autres documents de nature à établir le montant des dépenses payées ou engagées par lui ou par son mandataire ' ; qu'il est prévu au deuxième alinéa de l'article L-0, 179-1 que les comptes de campagne des candidats proclamés élus et les pièces justificatives sont transmis au bureau de l'Assemblée nationale ; qu'aux termes du troisième alinéa du même article 'les comptes de campagne sont communiqués, sur leur demande, au Conseil constitutionnel ou aux autorités judiciaires '; qu'enfin, selon l'article L. 167 du code électoral dans sa rédaction issue de l'article 6 de la loi n° 88-227 du 11 mars 1988, le dépassement du plafond des dépenses autorisées entraîne la perte pour l'intéressé du droit au remboursement par l'Etat, sur une base forfaitaire, des dépenses de campagne qu'il a exposées</text:p>
          </table:table-cell>
          <table:table-cell table:number-columns-repeated="16377"/>
        </table:table-row>
        <table:table-row table:style-name="ro1">
          <table:table-cell office:value-type="string" table:style-name="ce3">
            <text:p>Oui</text:p>
          </table:table-cell>
          <table:table-cell office:value-type="string" table:style-name="ce3">
            <text:p>considérants 1, 2, 3, 4, 6, 8, 13 et 14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89\rejet\CONSTEXT000017667504_annot.xml</text:p>
          </table:table-cell>
          <table:table-cell office:value-type="string" table:style-name="ce3">
            <text:p>6.Financement</text:p>
          </table:table-cell>
          <table:table-cell office:value-type="string" table:style-name="ce3">
            <text:p><text:s/>12. Considérant que M. Tapie a produit devant le Conseil constitutionnel le compte de sa campagne électorale ; que ce compte, ainsi que l'exige l'article L.O. 179-1 du code électoral, a été prescrit par un membre de l'ordre des experts comptables et des comptables agréés et accompagné des justificatifs des recettes ainsi que des factures, devis et autres documents établissant un montant de dépenses inférieur au plafond fixé par la loi organique</text:p>
          </table:table-cell>
          <table:table-cell table:number-columns-repeated="16377"/>
        </table:table-row>
        <table:table-row table:style-name="ro1">
          <table:table-cell office:value-type="string" table:style-name="ce3">
            <text:p>Oui</text:p>
          </table:table-cell>
          <table:table-cell office:value-type="string" table:style-name="ce3">
            <text:p>considérants 1, 5, 6, 7 et 8 ne sont pas annotés</text:p>
          </table:table-cell>
          <table:table-cell office:value-type="string" table:style-name="ce3">
            <text:p>Présente la majeure</text:p>
          </table:table-cell>
          <table:table-cell table:style-name="ce3"/>
          <table:table-cell office:value-type="string" table:style-name="ce9">
            <text:p><text:a xlink:href="file:///C:/Users/anais/Downloads/AN/1990/rejet/CONSTEXT000017667668_annot.xml">file:\\\P:\CRJ\RECHERCHE\PROJET_JADE\JADE_COMMUN\Annotation\Annotation_automatique_Maritaud\Technologie_light\Super-catégories-objets_0,8\AN\1990\rejet\CONSTEXT000017667668_annot.xml</text:a></text:p>
          </table:table-cell>
          <table:table-cell office:value-type="string" table:style-name="ce3">
            <text:p>4.Campagne</text:p>
          </table:table-cell>
          <table:table-cell office:value-type="string" table:style-name="ce3">
            <text:p><text:s/>2. Considérant qu'en vertu de l'article 1er de la loi du 30 septembre 1986 modifiée l'exercice de la liberté de communication audiovisuelle peut être limité dans la mesure requise par le respect 'du caractère pluraliste de l'expression des courants de pensée et d'opinion'; que l'article 16 de la même loi habilite le Conseil supérieur de l'audiovisuel, d'une part, à fixer les règles concernant les conditions de production, de programmation et de diffusion des émissions relatives aux campagnes électorales qui incombent aux sociétés nationales de programme et, d'autre part, à adresser, pour la durée des campagnes électorales, des recommandations aux exploitants des services de communication audiovisuelle autorisés; que l'article 62 de la loi assujettit, en outre, la société Télévision française 1 au respect du pluralisme de l'information et des programmes; qu'enfin, aux termes du second alinéa de l'article L. 49 du code électoral: 'A partir de la veille du scrutin à zéro heure, il est interdit de diffuser ou de faire diffuser par tout moyen de communication audiovisuelle tout message ayant le caractère de propagande électorale'</text:p>
          </table:table-cell>
          <table:table-cell table:number-columns-repeated="16377"/>
        </table:table-row>
        <table:table-row table:style-name="ro1">
          <table:table-cell office:value-type="string" table:style-name="ce3">
            <text:p>Oui</text:p>
          </table:table-cell>
          <table:table-cell office:value-type="string" table:style-name="ce3">
            <text:p>considérants 1, 5, 6, 7 et 8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90\rejet\CONSTEXT000017667668_annot.xml</text:p>
          </table:table-cell>
          <table:table-cell office:value-type="string" table:style-name="ce3">
            <text:p>4.Campagne</text:p>
          </table:table-cell>
          <table:table-cell office:value-type="string" table:style-name="ce3">
            <text:p><text:s/>4. Considérant, en premier lieu, que Mme Roussel dénonce la mise en cause par un des journalistes participant à l'émission intitulée 'Club 6' programmée par la chaîne de télévision M6 le 2 décembre 1989 à partir de 23 h 30 du parti sous l'étiquette duquel elle se présentait; qu'il résulte de l'instruction que l'émission critiquée a revêtu le caractère d'un débat contradictoire entre journalistes représentatifs de courants d'opinion différents; que le propos incriminé a été tenu le 3 décembre à 0 h 37; que la diffusion de l'émission en cause dans le département des Bouches-du-Rhône a été, au surplus, extrêmement limitée; que, dans ces conditions, cette émission n'a pu exercer d'influence sur le résultat des opérations électorales</text:p>
          </table:table-cell>
          <table:table-cell table:number-columns-repeated="16377"/>
        </table:table-row>
        <table:table-row table:style-name="ro1">
          <table:table-cell office:value-type="string" table:style-name="ce3">
            <text:p>Oui</text:p>
          </table:table-cell>
          <table:table-cell office:value-type="string" table:style-name="ce3">
            <text:p>considérants 7, 8, 9, 10, 11, 12, 13, 14, 15, 21 et 30 ne sont pas annotés</text:p>
          </table:table-cell>
          <table:table-cell table:number-columns-repeated="2" table:style-name="ce3"/>
          <table:table-cell office:value-type="string" table:style-name="ce9">
            <text:p><text:a xlink:href="file:///C:/Users/anais/Downloads/AN/1991/rejet/CONSTEXT000017667828_annot.xml">file:\\\P:\CRJ\RECHERCHE\PROJET_JADE\JADE_COMMUN\Annotation\Annotation_automatique_Maritaud\Technologie_light\Super-catégories-objets_0,8\AN\1991\rejet\CONSTEXT000017667828_annot.xml</text:a></text:p>
          </table:table-cell>
          <table:table-cell office:value-type="string" table:style-name="ce3">
            <text:p>6.Financement</text:p>
          </table:table-cell>
          <table:table-cell office:value-type="string" table:style-name="ce3">
            <text:p><text:s/>2. Considérant que le requérant invoque un moyen unique tiré de ce que les dépenses de campagne de M.Galy-Dejean, candidat proclamé élu à l'issue du second tour, ont dépassé le plafond des dépenses électorales fixé par l'article L. 52-11 du code électoral que ce plafond est de 500 000 F par candidat pour l'élection des députés dans les circonscriptions dont la population est égale ou supérieure à 80 000 habitants ;que M. Danton demande au Conseil constitutionnel de constater le dépassement du plafond des dépenses autorisées, de prononcer l'inéligibilité de M. Galy-Dejean en tant que député pour une durée d'un an à compter de l'élection et d'annuler celle-ci</text:p>
          </table:table-cell>
          <table:table-cell table:number-columns-repeated="16377"/>
        </table:table-row>
        <table:table-row table:style-name="ro1">
          <table:table-cell office:value-type="string" table:style-name="ce3">
            <text:p>Oui</text:p>
          </table:table-cell>
          <table:table-cell office:value-type="string" table:style-name="ce3">
            <text:p>considérants 7, 8, 9, 10, 11, 12, 13, 14, 15, 21 et 30 ne sont pas annotés</text:p>
          </table:table-cell>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1991\rejet\CONSTEXT000017667828_annot.xml</text:p>
          </table:table-cell>
          <table:table-cell office:value-type="string" table:style-name="ce3">
            <text:p>6.Financement</text:p>
          </table:table-cell>
          <table:table-cell office:value-type="string" table:style-name="ce3">
            <text:p><text:s/>3. Considérant qu'en vertu du premier alinéa de l'article L 52-12 du code électoral 'chaque candidat ou candidat tête de liste soumis au plafonnement prévu à l'article L. 52-11 est tenu d'établir un compte de campagne retraçant, selon leur origine l'ensemble des recettes perçues et, selon leur nature, l'ensemble des dépenses engagées ou effectuées en vue de l'élection, par lui-même ou pour son compte, au cours de la période mentionnée à l'article L. 52-4 ' ;qu'il est spécifié que :'Sont réputées faites pour son compte les dépenses exposées directement au profit du candidat et avec l'accord, même tacite, de celui-ci, par les personnes physiques ou morales, les groupements et partis qui lui apportent leur soutien ' ;que le premier alinéa de l'article L. 52-12 exige enfin que 'le candidat estime et inclut, en recettes et en dépenses, les avantages directs ou indirects, les prestations de services et dons en nature dont il. a bénéficié '</text:p>
          </table:table-cell>
          <table:table-cell table:number-columns-repeated="16377"/>
        </table:table-row>
        <table:table-row table:style-name="ro1">
          <table:table-cell office:value-type="string" table:style-name="ce3">
            <text:p>Oui</text:p>
          </table:table-cell>
          <table:table-cell office:value-type="string" table:style-name="ce3">
            <text:p>considérants 7, 8, 9, 10, 11, 12, 13, 14, 15, 21 et 30 ne sont pas annotés</text:p>
          </table:table-cell>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1991\rejet\CONSTEXT000017667828_annot.xml</text:p>
          </table:table-cell>
          <table:table-cell office:value-type="string" table:style-name="ce3">
            <text:p>6.Financement</text:p>
          </table:table-cell>
          <table:table-cell office:value-type="string" table:style-name="ce3">
            <text:p><text:s/>4. Considérant que le deuxième alinéa de l'article L. 52-12 du code électoral fait obligation au candidat à une élection législative de déposer à la préfecture son compte de campagne et les annexes de ce compte dans les deux mois qui suivent le tour de scrutin 'où l'élection a été acquise' ;que ce compte doit être présenté par un membre de l'ordre des experts-comptables et des comptables agréés et accompagné des justificatifs des recettes ainsi que de tout document de nature à établir le montant des dépenses payées par le candidat ou pour son compte, qu'aux termes du premier alinéa de l'article L. 52-15 du code précité , 'La Commission nationale des comptes de campagne et des financements politiques approuve et, après procédure contradictoire, rejette ou réforme les comptes de campagne ' ;que le deuxième alinéa de l'article L.O.-128 du code électoral dispose dans une première phrase que:'Est inéligible pendant un an à compter de l'élection celui qui n'a pas déposé son compte de campagne dans les conditions et le délai prescrits par l'article L. 52-12 et celui dont le compte de campagne a été rejeté à bon droit', et énonce dans une seconde phrase que :'Peut également être déclaré inéligible, pour la même durée, celui qui a dépassé le plafond des dépenses électorales tel qu'il résulte de l'article L. 52-11 ' ;qu'enfin, il est spécifié à l'article L.O. 186-1 du code électoral que lorsqu'un candidat se trouve dam l'un des cas mentionnés au deuxième alinéa de l'article L.O.128, le Conseil constitutionnel prononce son inéligibilité conformément à cet article et, s'il s'agit du candidat proclamé élu, annule son élection</text:p>
          </table:table-cell>
          <table:table-cell table:number-columns-repeated="16377"/>
        </table:table-row>
        <table:table-row table:style-name="ro1">
          <table:table-cell office:value-type="string" table:style-name="ce3">
            <text:p>Oui</text:p>
          </table:table-cell>
          <table:table-cell office:value-type="string" table:style-name="ce3">
            <text:p>considérants 7, 8, 9, 10, 11, 12, 13, 14, 15, 21 et 30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91\rejet\CONSTEXT000017667828_annot.xml</text:p>
          </table:table-cell>
          <table:table-cell office:value-type="string" table:style-name="ce3">
            <text:p>6.Financement</text:p>
          </table:table-cell>
          <table:table-cell office:value-type="string" table:style-name="ce3">
            <text:p><text:s/>5. Considérant que le compte de campagne de M. Galy-Dejean a été déposé, conformément aux prescriptions du deuxième alinéa de l'article L 52-12 du code électoral, dans le délai de deux mois suivant le tour de scrutin à l'issue duquel il a été proclamé élu ;que par une décision en date du 30 mai 1991, la Commission nationale des comptes de campagne et des financements politiques a, après réformation, approuvé le compte de l'intéressé en l'établissant en recettes, à la somme de 551772,59 F et, en dépenses, à la somme de 494 412,83 F</text:p>
          </table:table-cell>
          <table:table-cell table:number-columns-repeated="16377"/>
        </table:table-row>
        <table:table-row table:style-name="ro1">
          <table:table-cell office:value-type="string" table:style-name="ce3">
            <text:p>Oui</text:p>
          </table:table-cell>
          <table:table-cell office:value-type="string" table:style-name="ce3">
            <text:p>considérants 7, 8, 9, 10, 11, 12, 13, 14, 15, 21 et 30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91\rejet\CONSTEXT000017667828_annot.xml</text:p>
          </table:table-cell>
          <table:table-cell office:value-type="string" table:style-name="ce3">
            <text:p>6.Financement</text:p>
          </table:table-cell>
          <table:table-cell office:value-type="string" table:style-name="ce3">
            <text:p><text:s/>16. Considérant que certaines dépenses imputées par le requérant à la campagne électorale de M. Galy-Dejean concernent en fait des campagnes organisées par le Rassemblement pour la République sur l'ensemble du territoire national ;que d'autres dépenses concernent le coût d'une lettre adressée par le maire de Paris, à tous les Parisiens à propos de projets ayant pour effet de modifier la dotation globale de fonctionnement dont bénéficiait jusqu'alors la ville de Paris ;qu'il découle du premier alinéa de l'article L.52-12 sur les dépenses faites par les personnes, groupements et partis qui soutiennent un candidat ne peuvent être rattachées à son compte que si elles ont été exposées directement à son profit, ce qui n'était pas le cas en l'espèce</text:p>
          </table:table-cell>
          <table:table-cell table:number-columns-repeated="16377"/>
        </table:table-row>
        <table:table-row table:style-name="ro1">
          <table:table-cell office:value-type="string" table:style-name="ce3">
            <text:p>Oui</text:p>
          </table:table-cell>
          <table:table-cell office:value-type="string" table:style-name="ce3">
            <text:p>considérants 7, 8, 9, 10, 11, 12, 13, 14, 15, 21 et 30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91\rejet\CONSTEXT000017667828_annot.xml</text:p>
          </table:table-cell>
          <table:table-cell office:value-type="string" table:style-name="ce3">
            <text:p>6.Financement</text:p>
          </table:table-cell>
          <table:table-cell office:value-type="string" table:style-name="ce3">
            <text:p><text:s/>18. Considérant qu'il résulte de tout ce qui précède que le montant des dépenses de campagne exposées par M. Galy-Dejean ou pour son compte s'établit à la somme de 701 962,83 F</text:p>
          </table:table-cell>
          <table:table-cell table:number-columns-repeated="16377"/>
        </table:table-row>
        <table:table-row table:style-name="ro1">
          <table:table-cell office:value-type="string" table:style-name="ce3">
            <text:p>Oui</text:p>
          </table:table-cell>
          <table:table-cell office:value-type="string" table:style-name="ce3">
            <text:p>considérants 7, 8, 9, 10, 11, 12, 13, 14, 15, 21 et 30 ne sont pas annotés</text:p>
          </table:table-cell>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1991\rejet\CONSTEXT000017667828_annot.xml</text:p>
          </table:table-cell>
          <table:table-cell office:value-type="string" table:style-name="ce3">
            <text:p>6.Financement</text:p>
          </table:table-cell>
          <table:table-cell office:value-type="string" table:style-name="ce3">
            <text:p><text:s/>27. Considérant qu'il est spécifié au troisième alinéa de l'article L 52-5 du code électoral qu'une association de financement électorale ne peut recueillir de fonds que pendant la période prévue à l'article L. 52-4 ' ;que les mêmes prescriptions s'imposent à un mandataire financier en vertu du troisième alinéa de l'article L. 52-6</text:p>
          </table:table-cell>
          <table:table-cell table:number-columns-repeated="16377"/>
        </table:table-row>
        <table:table-row table:style-name="ro1">
          <table:table-cell office:value-type="string" table:style-name="ce3">
            <text:p>Oui</text:p>
          </table:table-cell>
          <table:table-cell office:value-type="string" table:style-name="ce3">
            <text:p>considérants 7, 8, 9, 10, 11, 12, 13, 14, 15, 21 et 30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91\rejet\CONSTEXT000017667828_annot.xml</text:p>
          </table:table-cell>
          <table:table-cell office:value-type="string" table:style-name="ce3">
            <text:p>6.Financement</text:p>
          </table:table-cell>
          <table:table-cell office:value-type="string" table:style-name="ce3">
            <text:p><text:s/>29. Considérant que le compte de campagne de Mme Barzach a été déposé dans le délai de deux mois suivant le tour de scrutin à l'issue duquel M. Galy-Dejean a été proclamé élu, ainsi que l'exige le deuxième alinéa de l'article L. 52-12 du code électoral ;que le compte 6 fait apparaître que dix dons, représentant au total 145 000 F, soit plus de 30 p. 100 des recettes, ont été perçus entre le 8 février et le 25 mars 1991</text:p>
          </table:table-cell>
          <table:table-cell table:number-columns-repeated="16377"/>
        </table:table-row>
        <table:table-row table:style-name="ro1">
          <table:table-cell office:value-type="string" table:style-name="ce3">
            <text:p>Oui</text:p>
          </table:table-cell>
          <table:table-cell office:value-type="string" table:style-name="ce3">
            <text:p>considérants 7, 8, 9, 10, 11, 12, 13, 14, 15, 21 et 30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91\rejet\CONSTEXT000017667828_annot.xml</text:p>
          </table:table-cell>
          <table:table-cell office:value-type="string" table:style-name="ce3">
            <text:p>6.Financement</text:p>
          </table:table-cell>
          <table:table-cell office:value-type="string" table:style-name="ce3">
            <text:p><text:s/>31. Considérant que le compte de campagne de Mme Caradec a été déposé dans le délai légal ;que ce compte fait apparaître qu'un don de 50 000 F a été effectué le 26 mars 1991 et annonce le versement d'un autre don de même montant ;que ces dons représentent plus de 25 p. 100 des recettes du compte de campagne</text:p>
          </table:table-cell>
          <table:table-cell table:number-columns-repeated="16377"/>
        </table:table-row>
        <table:table-row table:style-name="ro1">
          <table:table-cell office:value-type="string" table:style-name="ce5">
            <text:p>Oui</text:p>
          </table:table-cell>
          <table:table-cell office:value-type="string" table:style-name="ce3">
            <text:p>considérants 2, 3, 5 et 6 ne sont pas annotés</text:p>
          </table:table-cell>
          <table:table-cell table:number-columns-repeated="2" table:style-name="ce3"/>
          <table:table-cell office:value-type="string" table:style-name="ce9">
            <text:p><text:a xlink:href="file:///C:/Users/anais/Downloads/AN/1992/rejet/CONSTEXT000017667382_annot.xml">file:\\\P:\CRJ\RECHERCHE\PROJET_JADE\JADE_COMMUN\Annotation\Annotation_automatique_Maritaud\Technologie_light\Super-catégories-objets_0,8\AN\1992\rejet\CONSTEXT000017667382_annot.xml</text:a></text:p>
          </table:table-cell>
          <table:table-cell office:value-type="string" table:style-name="ce3">
            <text:p>7.Opérations</text:p>
          </table:table-cell>
          <table:table-cell office:value-type="string" table:style-name="ce3">
            <text:p><text:s/>1. Considérant que si certaines cartes d'électeurs n'ont pas été distribuées à leurs destinataires avant le jour du vote il ne résulte pas de l'instruction que cette circonstance ait, en l'espèce, fait obstacle à l'exercice de leur droit de vote par les électeurs concernés ; Sur les griefs tirés d'abus de propagande électorale</text:p>
          </table:table-cell>
          <table:table-cell table:number-columns-repeated="16377"/>
        </table:table-row>
        <table:table-row table:style-name="ro1">
          <table:table-cell office:value-type="string" table:style-name="ce4">
            <text:p>Oui</text:p>
          </table:table-cell>
          <table:table-cell office:value-type="string" table:style-name="ce3">
            <text:p>considérants 2, 3, 5 et 6 ne sont pas annotés</text:p>
          </table:table-cell>
          <table:table-cell table:number-columns-repeated="2" table:style-name="ce3"/>
          <table:table-cell office:value-type="string" table:style-name="ce3">
            <text:p>file:\\\P:\CRJ\RECHERCHE\PROJET_JADE\JADE_COMMUN\Annotation\Annotation_automatique_Maritaud\Technologie_light\Super-catégories-objets_0,8\AN\1992\rejet\CONSTEXT000017667382_annot.xml</text:p>
          </table:table-cell>
          <table:table-cell office:value-type="string" table:style-name="ce3">
            <text:p>7.Opérations</text:p>
          </table:table-cell>
          <table:table-cell office:value-type="string" table:style-name="ce3">
            <text:p><text:s/>4. Considérant que si des électeurs ont été, par erreur, affectés à des bureaux de vote différents de ceux dans lesquels ils étaient auparavant inscrits et ne correspondant pas à leur domicile, il résulte de l'instruction que les intéressés ont été avertis de ce changement par lettre, préalablement au scrutin ; qu'en raison notamment du fait que des moyens de transport appropriés ont été mis à la disposition des électeurs concernés il ne ressort pas de l'instruction que ceux-ci se soient trouvés dans l'impossibilité matérielle de se rendre à leur bureau de vote ; que, dans ces conditions, l'erreur commise dans l'affectation des électeurs entre les différents bureaux de vote n'a pas été de nature à altérer la sincérité du scrutin ; Sur les griefs relatifs d la composition de certains bureaux de vote et au dépouillement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6974_annot.xml</text:p>
          </table:table-cell>
          <table:table-cell office:value-type="string" table:style-name="ce3">
            <text:p>7.Opérations</text:p>
          </table:table-cell>
          <table:table-cell office:value-type="string" table:style-name="ce3">
            <text:p><text:s/>5. Considérant que le requérant affirme que dans certains bureaux de vote le procès-verbal de clôture des listes d'émargement ne comporte pas le même nombre d'inscrits que la liste elle-même; que ces discordances qui ne portent, dans chaque bureau, que sur un nombre très réduit d'électeurs ne sont pas de nature à modifier le résultat de l'élection; Sur les irrégularités de forme relatives aux listes d'émargement et aux procès-verbaux d'opération de vot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6974_annot.xml</text:p>
          </table:table-cell>
          <table:table-cell office:value-type="string" table:style-name="ce3">
            <text:p>7.Opérations</text:p>
          </table:table-cell>
          <table:table-cell office:value-type="string" table:style-name="ce3">
            <text:p><text:s/>6. Considérant que le requérant invoque l'absence de signatures de plusieurs membres de bureaux de vote sur le cahier d'émargement et les procès-verbaux d'opération de vote ainsi que des irrégularités dans la composition des mêmes bureaux; qu'il n'est cependant pas établi que ces faits aient été à l'origine d'une fraude dans les opérations électorales; qu'ils ne peuvent donc être regardés comme ayant eu pour effet de vicier la régularité du scrutin; Sur les irrégularités relevées sur les procuration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6975_annot.xml</text:p>
          </table:table-cell>
          <table:table-cell office:value-type="string" table:style-name="ce3">
            <text:p>7.Opérations</text:p>
          </table:table-cell>
          <table:table-cell office:value-type="string" table:style-name="ce3">
            <text:p><text:s/>1. Considérant, en premier lieu, qu'il résulte de l'instruction, et notamment d'une observation portée au procès-verbal des opérations électorales de la commune de Genlis, que le début du second tour de scrutin a été perturbé dans cette commune, entre 8 heures et 8 heures 25, par la présence de trois individus qui n'ont quitté le bureau de vote qu'après l'intervention de la gendarmerie; qu'eu égard toutefois au caractère imprécis ou contradictoire des attestations versées au dossier, il ne résulte pas de l'instruction que cet incident a privé des électeurs de la possibilité de vote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6975_annot.xml</text:p>
          </table:table-cell>
          <table:table-cell office:value-type="string" table:style-name="ce3">
            <text:p>7.Opérations</text:p>
          </table:table-cell>
          <table:table-cell office:value-type="string" table:style-name="ce3">
            <text:p><text:s/>9. Considérant que le contreseing, par les membres du bureau, des enveloppes réglementaires trouvées vides dans l'urne n'est requis par aucune disposition législative ou réglementaire, non plus que leur production en annexe aux procès-verbaux; qu'ainsi le grief tiré de ce que de telles formalités n'ont pas été effectuées dans certains bureaux est inopérant; que s'il est exact que, dans sept bureaux, des bulletins blancs et des bulletins annulés n'ont pas été contresignés, contrairement aux prescriptions de l'article L. 66 du code électoral, il résulte de leur examen qu'ils ont été à bon droit exclus du décompte des suffrages exprimés dans ces différents bureaux, aucune observation ou réclamation n'ayant d'ailleurs été consignée à leur propos aux procès-verbaux correspondants</text:p>
          </table:table-cell>
          <table:table-cell table:number-columns-repeated="16377"/>
        </table:table-row>
        <table:table-row table:style-name="ro1">
          <table:table-cell office:value-type="string" table:style-name="ce3">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1993\rejet\CONSTEXT000017666976_annot.xml</text:p>
          </table:table-cell>
          <table:table-cell office:value-type="string" table:style-name="ce3">
            <text:p>6.Financement</text:p>
          </table:table-cell>
          <table:table-cell office:value-type="string" table:style-name="ce3">
            <text:p><text:s/>1. Considérant qu'aux termes du premier alinéa de l'article L. 52-12 du code électoral ' chaque candidat ou candidat tête de liste soumis au plafonnement prévu à l'article L. 52-11 est tenu d'établir un compte de campagne retraçant, selon leur origine, l'ensemble des recettes perçues et, selon leur nature, l'ensemble des dépenses engagées ou effectuées en vue de l'élection, par lui-même ou pour son compte, au cours de la période mentionnée à l'article L. 52-4 ' qu'il est spécifié que: ' Sont réputées faites pour son compte les dépenses exposées directement au profit du candidat et avec l'accord, même tacite, de celui-ci, par les personnes physiques ou morales, les groupements et partis qui lui apportent leur soutien ' que le premier alinéa de l'article L. 52-12 exige enfin que ' le candidat estime et inclut, en recettes et en dépenses, les avantages directs ou indirects, les prestations de services et dons en nature dont il a bénéfici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6976_annot.xml</text:p>
          </table:table-cell>
          <table:table-cell office:value-type="string" table:style-name="ce3">
            <text:p>6.Financement</text:p>
          </table:table-cell>
          <table:table-cell office:value-type="string" table:style-name="ce3">
            <text:p><text:s/>4. Considérant que le compte de campagne de M. Juppé a été déposé, conformément aux prescriptions du deuxième alinéa de l'article L. 52-12 du code électoral, dans le délai de deux mois suivant le tour de scrutin à l'issue duquel il a été proclamé élu; que, par une décision en date du 16 juillet 1993, la Commission nationale des comptes de campagne et des financements politiques a, après réformation, approuvé le compte de l'intéressé en l'établissant, en recettes à la somme de 669 235 F, et en dépenses à la somme de 421 051 F; que cette réformation résulte de la réintégration dans ce compte d'une somme de 26 548 F correspondant au coût de l'affichage mentionné ci-dessus; que M. Caresche soutient que l'évaluation ainsi retenue par la commission est insuffisante, tandis que M. Juppé estime qu'aucune réintégration ne doit être opérée à ce titr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6976_annot.xml</text:p>
          </table:table-cell>
          <table:table-cell office:value-type="string" table:style-name="ce3">
            <text:p>6.Financement</text:p>
          </table:table-cell>
          <table:table-cell office:value-type="string" table:style-name="ce3">
            <text:p><text:s/>10. Considérant qu'il résulte de l'instruction, et notamment de l'examen des pièces réunies par la commission et qui ont été versées au dossier du Conseil constitutionnel en application de l'article 42 de l'ordonnance du 7 novembre 1958 susvisée, que le coût de réalisation de ces affiches s'est élevé à la somme non contestée de 17 386,76 F; que si la location des panneaux a été facturée le 16 février 1993 par la Régie publicitaire du mobilier urbain, société concessionnaire de ces emplacements, à la société Grasset, éditeur de l'ouvrage en cause, pour une somme de 9 161,85 F toutes taxes comprises correspondant à un prix unitaire de 510 F hors taxe par panneau, il ressort du dossier que ce tarif correspond en principe à une campagne d'affichage à caractère national, ce qui n'est pas le cas de celle dont a bénéficié l'ouvrage de M. Juppé que, par suite, la somme ainsi fixée ne tient pas compte de l'avantage indirect en nature dont a bénéficié le candidat et dont la valeur doit être prise en compte; que, s'agissant d'affichages réalisés sur des panneaux situés en ce lieu, il apparaît qu'il en est disposé par la société propriétaire, tantôt à titre gratuit au profit de certaines personnalités, tantôt à des conditions variant selon les cas; que, toutefois, et même s'il ressort ainsi du dossier que l'éditeur du livre de M. Juppé a bénéficié en l'espèce de conditions très avantageuses pour la location de ces panneaux, les éléments de l'affaire ne peuvent conduire le Conseil constitutionnel à remettre en cause l'appréciation portée par la Commission nationale des comptes de campagne et des financements politiques quant à l'absence de dépassement du plafond fixé par l'article L. 52-11 du code électoral; que la requête de M. Caresche doit, par suite, être rejeté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6977_annot.xml</text:p>
          </table:table-cell>
          <table:table-cell office:value-type="string" table:style-name="ce3">
            <text:p>4.Campagne</text:p>
          </table:table-cell>
          <table:table-cell office:value-type="string" table:style-name="ce3">
            <text:p><text:s/>20. Considérant que le requérant fait valoir que M. Tapie aurait bénéficié de divers communiqués et reportages diffusés par des chaînes de télévision nationale ou régionale dans la semaine séparant les deux tours de scrutin ce qui aurait rompu l'égalité entre les candidats devant les moyens de communication audiovisuels</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5. Campagne</text:p>
          </table:table-cell>
          <table:table-cell office:value-type="string" table:style-name="ce3">
            <text:p>file:\\\P:\CRJ\RECHERCHE\PROJET_JADE\JADE_COMMUN\Annotation\Annotation_automatique_Maritaud\Technologie_light\Super-catégories-objets_0,8\AN\1993\rejet\CONSTEXT000017666977_annot.xml</text:p>
          </table:table-cell>
          <table:table-cell office:value-type="string" table:style-name="ce3">
            <text:p>4.Campagne</text:p>
          </table:table-cell>
          <table:table-cell office:value-type="string" table:style-name="ce3">
            <text:p><text:s/>27. Considérant que si le requérant soutient que la distribution d'un tract, au contenu diffamatoire pour sa personne, a été effectuée par le candidat du Front national la veille du second tour de scrutin, il n'apporte pas la preuve du caractère massif de celle-ci; que le contenu est par ailleurs tout aussi calomnieux pour le requérant que pour le candidat élu; que dès lors cette irrégularité au regard des dispositions du troisième alinéa de l'article L. 165 du code électoral ne saurait être regardée comme ayant eu une influence sur l'issue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6977_annot.xml</text:p>
          </table:table-cell>
          <table:table-cell office:value-type="string" table:style-name="ce3">
            <text:p>4.Campagne</text:p>
          </table:table-cell>
          <table:table-cell office:value-type="string" table:style-name="ce3">
            <text:p><text:s/>29. Considérant qu'il résulte de l'instruction que le contenu de ce tract qui reprend les propos tenus à l'encontre de M. Fabre-Aubrespy par M. Jean-Marie Le Pen, invité de l'édition de 20 heures du journal télévisé du 23 mars 1993 diffusé par la chaîne de télévision T.F. 1, et qualifiant le requérant de ' commis facturier de M. Botton à Lyon depuis 1989 ' présente un caractère diffamatoire à l'encontre de M. Fabre-Aubrespy</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6977_annot.xml</text:p>
          </table:table-cell>
          <table:table-cell office:value-type="string" table:style-name="ce3">
            <text:p>4.Campagne</text:p>
          </table:table-cell>
          <table:table-cell office:value-type="string" table:style-name="ce3">
            <text:p><text:s/>30. Considérant toutefois que si M. Fabre-Aubrespy n'a pu exercer de droit de réponse à la télévision, il lui était cependant loisible entre le 24 mars 1993 et le jour de l'élection de répliquer dans la circonscription par d'autres moyens à ces allégations diffamatoires; qu'il ne résulte pas de l'instruction que la diffusion du tract puisse être imputée au candidat élu ou à une formation politique le soutenant; que dans ces conditions, eu égard à l'écart de voix séparant le candidat élu du requérant, la diffusion de ce tract ne peut être regardée comme ayant été de nature à altérer le résultat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6977_annot.xml</text:p>
          </table:table-cell>
          <table:table-cell office:value-type="string" table:style-name="ce3">
            <text:p>7.Opérations</text:p>
          </table:table-cell>
          <table:table-cell office:value-type="string" table:style-name="ce3">
            <text:p><text:s/>22. Considérant que si le requérant fait valoir en premier lieu que des procurations de vote auraient été établies irrégulièrement, il n'apporte aucun commencement de preuve à l'appui de ses allégations; que dès lors le moyen doit être reje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6979_annot.xml</text:p>
          </table:table-cell>
          <table:table-cell office:value-type="string" table:style-name="ce3">
            <text:p>4.Campagne</text:p>
          </table:table-cell>
          <table:table-cell office:value-type="string" table:style-name="ce3">
            <text:p><text:s/>9. Considérant en cinquième lieu que le tract défavorable à la candidature de M. Wetzel, diffusé par trois anciens adjoints au maire de Sartrouville, dont le contenu ne dépassait pas les limites de la polémique électorale et dont il n'est pas allégué que la diffusion ait été massive, n'a pas constitué une manoeuvre de nature à altérer les résultats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6979_annot.xml</text:p>
          </table:table-cell>
          <table:table-cell office:value-type="string" table:style-name="ce3">
            <text:p>6.Financement</text:p>
          </table:table-cell>
          <table:table-cell office:value-type="string" table:style-name="ce3">
            <text:p><text:s/>15. Considérant que le requérant fait valoir que les dépenses de campagne de M. Myard, candidat proclamé élu à l'issue du second tour, ont dépassé le plafond des dépenses électorales fixé par l'article L. 52-11 du code électoral; que ce plafond est de 500 000 F par candidat pour l'élection des députés dans les circonscriptions dont la population est égale ou supérieure à 80 000 habitants; que M. Diemert demande au Conseil constitutionnel de constater le dépassement du plafond des dépenses autorisées, de prononcer l'inéligibilité de M. Myard ainsi que de son suppléant en tant que député pour une durée d'un an à compter de l'élection et d'annuler celle-ci</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6979_annot.xml</text:p>
          </table:table-cell>
          <table:table-cell office:value-type="string" table:style-name="ce3">
            <text:p>6.Financement</text:p>
          </table:table-cell>
          <table:table-cell office:value-type="string" table:style-name="ce3">
            <text:p><text:s/>16. Considérant que le compte de campagne de M. Myard a été déposé, conformément aux prescriptions du deuxième alinéa de l'article L. 52-12 du code électoral, dans le délai de deux mois suivant le tour du scrutin à l'issue duquel il a été proclamé élu; que, par une décision en date du 28 juillet 1993, la Commission nationale des comptes de campagne et des financements politiques a, après réformation, approuvé le compte de l'intéressé en l'établissant, en recettes, à la somme de 391 952 F et, en dépenses, à la somme de 328 569 F</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6979_annot.xml</text:p>
          </table:table-cell>
          <table:table-cell office:value-type="string" table:style-name="ce3">
            <text:p>6.Financement</text:p>
          </table:table-cell>
          <table:table-cell office:value-type="string" table:style-name="ce3">
            <text:p><text:s/>23. Considérant que le journal municipal de Maisons-Laffitte, journal de la commune dont M. Myard est maire, constitue une publication régulière qui relève de la politique d'information de ladite collectivité locale; que toutefois si le numéro en cause est dans sa conception générale analogue aux précédents numéros, il se propose, comme il est relevé dans son éditorial, de faire le point sur les projets importants de Maisons-Laffitte et se présente ainsi partiellement comme un bilan de mandat qui revêt le caractère d'une propagande électorale; qu'il y a lieu dans ces conditions d'intégrer dans le compte de campagne de M. Myard le coût correspondant à l'équivalent de huit pages de ce journal soit une somme de 39 830 F</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6979_annot.xml</text:p>
          </table:table-cell>
          <table:table-cell office:value-type="string" table:style-name="ce3">
            <text:p>6.Financement</text:p>
          </table:table-cell>
          <table:table-cell office:value-type="string" table:style-name="ce3">
            <text:p><text:s/>24. Considérant qu'il y a lieu d'intégrer également dans le compte de campagne de M. Myard les frais engagés sous forme de tract pour le lancement de l'opération d'information et de communication ' Allô Monsieur le maire ', opération revêtant un caractère de propagande électorale, soit une somme de 11 180 F; En ce qui concerne les autres documents dont l'omission est contesté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6979_annot.xml</text:p>
          </table:table-cell>
          <table:table-cell office:value-type="string" table:style-name="ce3">
            <text:p>6.Financement</text:p>
          </table:table-cell>
          <table:table-cell office:value-type="string" table:style-name="ce3">
            <text:p><text:s/>28. Considérant que le requérant soutient que le montant des dépenses déclarées par M. Myard au titre de l'édition de ses documents électoraux est sous-évalué qu'il ne résulte pas de l'instruction qu'eu égard au caractère partiel de la prise en compte des publications ci-dessus analysées ce montant révèle une sous-évaluation</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93\rejet\CONSTEXT000017667016_annot.xml</text:p>
          </table:table-cell>
          <table:table-cell office:value-type="string" table:style-name="ce3">
            <text:p>4.Campagne</text:p>
          </table:table-cell>
          <table:table-cell office:value-type="string" table:style-name="ce3">
            <text:p><text:s/>5. Considérant que si la requérante soutient que la candidature de Mme Lefrere n'aurait pas été enregistrée dans le respect des règles prévues aux articles L. 154 à L. 158 du code électoral, cette allégation n'est pas corroborée par les pièces du dossie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018_annot.xml</text:p>
          </table:table-cell>
          <table:table-cell office:value-type="string" table:style-name="ce3">
            <text:p>6.Financement</text:p>
          </table:table-cell>
          <table:table-cell office:value-type="string" table:style-name="ce3">
            <text:p><text:s/>3. Considérant que le requérant fait valoir que les dépenses de campagne de M. Virapoullé, candidat proclamé élu à l'issue du second tour, auraient dépassé le plafond des dépenses électorales fixé en application de l'article L. 52-11 du code électoral; que ce plafond est de 500 000 F par candidat pour l'élection des députés dans les circonscriptions dont la population est égale ou supérieure à 80 000 habitants; que M. Sudre demande au Conseil constitutionnel, de constater le dépassement du plafond des dépenses autorisées, de prononcer l'inéligibilité de M. Virapoullé ainsi que de son suppléant en tant que député pour une durée d'un an à compter de l'élection et d'annuler celle-ci</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018_annot.xml</text:p>
          </table:table-cell>
          <table:table-cell office:value-type="string" table:style-name="ce3">
            <text:p>6.Financement</text:p>
          </table:table-cell>
          <table:table-cell office:value-type="string" table:style-name="ce3">
            <text:p><text:s/>7. Considérant qu'il ne résulte pas de l'instruction que les dépenses mises en cause par le requérant engagées pour la campagne de M. Virapoullé aient été sous-estimé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019_annot.xml</text:p>
          </table:table-cell>
          <table:table-cell office:value-type="string" table:style-name="ce3">
            <text:p>6.Financement</text:p>
          </table:table-cell>
          <table:table-cell office:value-type="string" table:style-name="ce3">
            <text:p><text:s/>5. Considérant que le requérant fait valoir que les dépenses de campagne de M. Pihouée, candidat proclamé élu à l'issue du second tour, ont dépassé le plafond des dépenses électorales en application de l'article L. 52-11 du code électoral; que ce plafond est de 500 000 F par candidat pour l'élection des députés dans les circonscriptions dont la population est égale ou supérieure à 80 000 habitants; que M. Hoarau demande au Conseil constitutionnel de constater le dépassement du plafond des dépenses autorisé, de prononcer l'inéligibilité de M. Pihouée ainsi que de son suppléant en tant que député pour une durée d'un an à compter de l'élection et d'annuler celle-ci</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019_annot.xml</text:p>
          </table:table-cell>
          <table:table-cell office:value-type="string" table:style-name="ce3">
            <text:p>6.Financement</text:p>
          </table:table-cell>
          <table:table-cell office:value-type="string" table:style-name="ce3">
            <text:p><text:s/>9. Considérant que M. Hoarau n'établit pas que la somme de 50 000 F destinée à rémunérer les agents du service de sécurité ait été insuffisamment évaluée; qu'il en est de même du coût des prestations fournies par M. Muriel chargé de la communication, estimé à 55 961,06 F, et de celles de M. Allo chargé de la sécurité de la campagne de M. Pihouée, estimé à 20 000 F; En ce qui concerne les émissions de radio</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019_annot.xml</text:p>
          </table:table-cell>
          <table:table-cell office:value-type="string" table:style-name="ce3">
            <text:p>6.Financement</text:p>
          </table:table-cell>
          <table:table-cell office:value-type="string" table:style-name="ce3">
            <text:p><text:s/>13. Considérant que les frais liés au déplacement et à l'hébergement de représentants de formations politiques se rendant dans une circonscription ne constituent pas, pour le candidat qu'ils viennent soutenir, une dépense électorale qui doit figurer dans son compte de campagne; En ce qui concerne le transport des électeurs par autobus</text:p>
          </table:table-cell>
          <table:table-cell table:number-columns-repeated="16377"/>
        </table:table-row>
        <table:table-row table:style-name="ro1">
          <table:table-cell office:value-type="string" table:style-name="ce3">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1993\rejet\CONSTEXT000017667020_annot.xml</text:p>
          </table:table-cell>
          <table:table-cell office:value-type="string" table:style-name="ce3">
            <text:p>6.Financement</text:p>
          </table:table-cell>
          <table:table-cell office:value-type="string" table:style-name="ce3">
            <text:p><text:s/>2. Considérant qu'aux termes du premier alinéa de l'article L. 52-12 du code électoral: ' Chaque candidat ou candidat tête de liste soumis au plafonnement prévu à l'article L. 52-11 est tenu d'établir un compte de campagne retraçant, selon leur origine, l'ensemble des recettes perçues et, selon leur nature, l'ensemble des dépenses engagées ou effectuées en vue de l'élection, par lui-même ou pour son compte, au cours de la période mentionnée à l'article L. 52-4 ' qu'il est spécifié que: ' Sont réputées faites pour son compte les dépenses exposées directement au profit du candidat et avec l'accord, même tacite, de celui-ci, par les personnes physiques ou morales, les groupements et partis qui lui apportent leur soutien ' que le premier alinéa de l'article L. 52-12 exige enfin que ' le candidat estime et inclut, en recettes et en dépenses, les avantages directs ou indirects, les prestations de services et dons en nature dont il a bénéfici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020_annot.xml</text:p>
          </table:table-cell>
          <table:table-cell office:value-type="string" table:style-name="ce3">
            <text:p>6.Financement</text:p>
          </table:table-cell>
          <table:table-cell office:value-type="string" table:style-name="ce3">
            <text:p><text:s/>5. Considérant que le compte de campagne de M. Cousin a été déposé, conformément aux prescriptions du deuxième alinéa de l'article L. 52-12 du code électoral, dans le délai de deux mois suivant le tour de scrutin à l'issue duquel l'intéressé a été proclamé élu; que, par une décision en date du 29 juillet 1993, la Commission nationale des comptes de campagne et des financements politiques a, après réformation, fixé le compte de l'intéressé en l'établissant, en recettes, à la somme de 475 750 F, et en dépenses à la somme de 585 954 F; que cette réformation résulte de la réintégration dans ce compte d'une somme de 58 010 F correspondant au coût d'une campagne effectuée par son suppléant, d'une somme de 94 880 F correspondant au coût d'un sondage d'opinion et d'une somme de 15 451 F correspondant aux dépenses d'une campagne de promotion d'un livre du candidat; que cette commission a en conséquence saisi le Conseil constitutionne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020_annot.xml</text:p>
          </table:table-cell>
          <table:table-cell office:value-type="string" table:style-name="ce3">
            <text:p>6.Financement</text:p>
          </table:table-cell>
          <table:table-cell office:value-type="string" table:style-name="ce3">
            <text:p><text:s/>10. Considérant que le requérant affirme que M. Cousin n'a pas fait figurer dans son compte de campagne le coût réel de plusieurs matériels de propagande, de la tenue de plusieurs réunions électorales, de diverses charges de fonctionnement de sa campagne; qu'il ne ressort pas de l'instruction que M. Cousin ait minoré ces postes de dépens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026_annot.xml</text:p>
          </table:table-cell>
          <table:table-cell office:value-type="string" table:style-name="ce3">
            <text:p>4.Campagne</text:p>
          </table:table-cell>
          <table:table-cell office:value-type="string" table:style-name="ce3">
            <text:p><text:s/>4. Considérant que M. Lafleur n'a pas tenu au cours de l'émission radiodiffusée susmentionnée, à l'encontre du requérant, des propos excédant les limites de la polémique électorale</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1993\rejet\CONSTEXT000017667076_annot.xml</text:p>
          </table:table-cell>
          <table:table-cell office:value-type="string" table:style-name="ce3">
            <text:p>6.Financement</text:p>
          </table:table-cell>
          <table:table-cell office:value-type="string" table:style-name="ce3">
            <text:p><text:s/>1. Considérant qu'aux termes de l'article L.O. 186-1 du code électoral: ' Ainsi qu'il est dit à l'article 41-1 de l'ordonnance no 58-1067 du 7 novembre 1958, le conseil, si l'instruction fait apparaître qu'un candidat se trouve dans l'un des cas mentionnés au deuxième alinéa de l'article L.O. 128, prononce son inéligibilité conformément à cet article et, s'il s'agit du candidat proclamé élu, annule son élection ' et qu'aux termes de l'article L.O. 128: ' Est inéligible pendant un an celui qui n'a pas déposé l'une des déclarations prévues à l'article L.O. 135-1. Est également inéligible pendant un an à compter de l'élection celui qui n'a pas déposé son compte de campagne dans les conditions et le délai prescrits par l'article L. 52-12 et celui dont le compte de campagne a été rejeté à bon droit. Peut également être déclaré inéligible, pour la même durée, celui qui a dépassé le plafond des dépenses électorales tel qu'il résulte de l'article L. 52-11</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076_annot.xml</text:p>
          </table:table-cell>
          <table:table-cell office:value-type="string" table:style-name="ce3">
            <text:p>6.Financement</text:p>
          </table:table-cell>
          <table:table-cell office:value-type="string" table:style-name="ce3">
            <text:p><text:s/>3. Considérant que le compte de campagne de M. Gayssot a été arrêté en dépenses par la Commission nationale des comptes de campagne et des financements politiques à un montant de 337 513 F; En ce qui concerne la prise en compte des journaux municipaux de Drancy et Bobigny</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1993\rejet\CONSTEXT000017667558_annot.xml</text:p>
          </table:table-cell>
          <table:table-cell office:value-type="string" table:style-name="ce3">
            <text:p>4.Campagne</text:p>
          </table:table-cell>
          <table:table-cell office:value-type="string" table:style-name="ce3">
            <text:p><text:s/>4. Considérant que le troisième alinéa de l'article L. 165 du code électoral interdit l'impression et la diffusion pendant la campagne électorale, sous quelque forme que ce soit, de tout tract ou circulaire autre que ceux établis conformément aux dispositions réglementaires prévues par le premier alinéa du même article</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93\rejet\CONSTEXT000017667564_annot.xml</text:p>
          </table:table-cell>
          <table:table-cell office:value-type="string" table:style-name="ce3">
            <text:p>4.Campagne</text:p>
          </table:table-cell>
          <table:table-cell office:value-type="string" table:style-name="ce3">
            <text:p><text:s/>4. Considérant que si le requérant soutient que la candidature de Mme Mathon n'aurait pas été enregistrée dans le respect des règles prévues aux articles L. 154 à L. 158 du code électoral, cette allégation n'est pas corroborée par les pièces du dossie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565_annot.xml</text:p>
          </table:table-cell>
          <table:table-cell office:value-type="string" table:style-name="ce3">
            <text:p>7.Opérations</text:p>
          </table:table-cell>
          <table:table-cell office:value-type="string" table:style-name="ce3">
            <text:p><text:s/>2. Considérant que si les procès-verbaux de trois bureaux de vote comportent des ratures et des surcharges et si celui d'un autre bureau comporte certaines mentions écrites au crayon, il ne résulte pas de l'instruction que ces faits révèlent des manoeuvres frauduleuses; qu'il en va de même de la circonstance que dans deux communes un exemplaire du procès-verbal de certains bureaux de vote n'a pas été conservé à la mairie, contrairement aux prescriptions de l'article R. 70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565_annot.xml</text:p>
          </table:table-cell>
          <table:table-cell office:value-type="string" table:style-name="ce3">
            <text:p>7.Opérations</text:p>
          </table:table-cell>
          <table:table-cell office:value-type="string" table:style-name="ce3">
            <text:p><text:s/>4. Considérant que dans un nombre important de bureaux de vote la liste d'émargement n'a pas été signée par les membres du bureau, en méconnaissance des prescriptions de l'article R. 62 du code électoral; que, toutefois, les procès-verbaux des opérations électorales desdits bureaux ont été régulièrement signés par les membres des bureaux et mentionnent un nombre de votants correspondant à celui des émargements; que dès lors l'absence de signature des listes d'émargement ne révèle pas l'existence d'une manoeuvre de nature à justifier l'annulation des suffrages émis dans les bureaux en caus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571_annot.xml</text:p>
          </table:table-cell>
          <table:table-cell office:value-type="string" table:style-name="ce3">
            <text:p>6.Financement</text:p>
          </table:table-cell>
          <table:table-cell office:value-type="string" table:style-name="ce3">
            <text:p><text:s/>3. Considérant que Mme Gombert fait valoir devant le Conseil constitutionnel que des dépenses effectuées par M. Gantier ont été omises ou sous-évaluées dans son compte de campagne; qu'il en serait ainsi de dépenses afférentes à des articles de soutien à ce candidat parus dans plusieurs publications; qu'il devrait en être de même de divers frais d'expédition, de permanence électorale et de téléphone; que le montant des dépenses déclarées pour la réalisation d'une brochure présentant le bilan du mandat de député de M. Gantier devrait être accru de 228 749,59 F; qu'ainsi majorées les dépenses qui auraient dû figurer au compte de campagne dépasseraient le plafond fixé pour la circonscriptio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571_annot.xml</text:p>
          </table:table-cell>
          <table:table-cell office:value-type="string" table:style-name="ce3">
            <text:p>6.Financement</text:p>
          </table:table-cell>
          <table:table-cell office:value-type="string" table:style-name="ce3">
            <text:p><text:s/>5. Considérant que, dans les numéros 166 de décembre 1992 à 169 de mars 1993 du périodique intitulé Le Courrier de Paris 16e et publié par M. Gantier, figurent plusieurs encadrés dont le contenu se rattache étroitement à la campagne menée par le candidat dans la circonscription; qu'il en est ainsi des appels à la participation aux frais de ladite campagne ou encore de l'insertion de la profession de foi du candidat élu et de son suppléant ainsi que de la publication du programme électoral du groupement politique ayant accordé son soutien au candidat; qu'il ressort de l'instruction que le coût moyen de la page de ce journal est de 12 808,80 F; que ces insertions représentent ensemble six pages pleines dont le coût s'élève à 76 852,80 F; que ces dépenses doivent être incluses dans celles que visent les dispositions du premier alinéa de l'article L. 52-12 du code électoral et figurer dans le compte de campagne de M. Gantier; qu'après réintégration de la somme de 76 852,80 F, le compte de campagne de M. Gantier s'établit en dépenses à 472 623,80 F après déduction de la somme de 16 672 F, remboursable par l'Etat au titre de la campagne officielle conformément aux dispositions de l'article R. 39 du code électoral; que les autres dépenses évoquées dans la requête ont été correctement évaluées; qu'ainsi les dépenses restent inférieures au plafond fixé en application de l'article L. 52-11 du code électoral</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93\rejet\CONSTEXT000017667573_annot.xml</text:p>
          </table:table-cell>
          <table:table-cell office:value-type="string" table:style-name="ce3">
            <text:p>4.Campagne</text:p>
          </table:table-cell>
          <table:table-cell office:value-type="string" table:style-name="ce3">
            <text:p><text:s/>2. Considérant que si le requérant soutient que la candidature de Mme Duvannes n'aurait pas été enregistrée dans le respect des règles prévues aux articles L. 154 à L. 158 du code électoral, cette allégation n'est pas corroborée par les pièces du dossie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615_annot.xml</text:p>
          </table:table-cell>
          <table:table-cell office:value-type="string" table:style-name="ce3">
            <text:p>4.Campagne</text:p>
          </table:table-cell>
          <table:table-cell office:value-type="string" table:style-name="ce3">
            <text:p><text:s/>8. Considérant que MM. Poirier et Gresil font valoir qu'une distribution massive de tracts comportant de fausses signatures a eu lieu avant le premier tour; que ces tracts auraient contenu des éléments nouveaux de polémique électorale et qu'ils auraient été distribués à un moment qui ne permettait pas d'y répondre; que M. Savy fait valoir de son côté que plusieurs tracts soutenant la candidature de M. Schwartzenberg ont été largement distribués juste avant le second tou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615_annot.xml</text:p>
          </table:table-cell>
          <table:table-cell office:value-type="string" table:style-name="ce3">
            <text:p>4.Campagne</text:p>
          </table:table-cell>
          <table:table-cell office:value-type="string" table:style-name="ce3">
            <text:p><text:s/>12. Considérant que MM. Poirier, Gresil et Savy font valoir qu'un document intitulé ' La lettre du député ' a été largement diffusé par M. Schwartzenberg entre le 24 et le 27 mars 1993; que ce document de propagande aurait contenu des éléments nouveaux de polémique électorale auxquels il n'était plus possible de répondre; qu'ainsi le résultat du second tour a pu être fauss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615_annot.xml</text:p>
          </table:table-cell>
          <table:table-cell office:value-type="string" table:style-name="ce3">
            <text:p>4.Campagne</text:p>
          </table:table-cell>
          <table:table-cell office:value-type="string" table:style-name="ce3">
            <text:p><text:s/>13. Considérant toutefois que, si le document incriminé a bien été diffusé de façon massive, il ne comportait aucune information nouvelle; que les indications données avaient déjà été évoquées au cours de la campagne électorale soit dans la presse quotidienne nationale, soit au cours de diverses réunions électorales; qu'au surplus M. Savy, s'il l'avait jugé utile, disposait du temps nécessaire pour y répondre; En ce qui concerne la mention du soutien apporté par les écologist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619_annot.xml</text:p>
          </table:table-cell>
          <table:table-cell office:value-type="string" table:style-name="ce3">
            <text:p>4.Campagne</text:p>
          </table:table-cell>
          <table:table-cell office:value-type="string" table:style-name="ce3">
            <text:p><text:s/>5. Considérant que si M. Fourgous a fait apposer des affiches électorales en dehors des emplacements réservés à cet effet, une telle irrégularité, qui a été aussi commise par ses principaux concurrents, n'a pu, dans les circonstances de l'espèce, avoir pour effet d'altérer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621_annot.xml</text:p>
          </table:table-cell>
          <table:table-cell office:value-type="string" table:style-name="ce3">
            <text:p>4.Campagne</text:p>
          </table:table-cell>
          <table:table-cell office:value-type="string" table:style-name="ce3">
            <text:p><text:s/>1. Considérant en premier lieu que la circonstance invoquée par M. Bourgeois selon laquelle les résultats publiés par la presse locale différeraient des résultats proclamés n'est pas de nature à affecter la régula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625_annot.xml</text:p>
          </table:table-cell>
          <table:table-cell office:value-type="string" table:style-name="ce3">
            <text:p>4.Campagne</text:p>
          </table:table-cell>
          <table:table-cell office:value-type="string" table:style-name="ce3">
            <text:p><text:s/>3. Considérant que la participation du candidat élu, député sortant, à une réception municipale de nouvel an, ainsi que ses déclarations reproduites dans un magazine et un agenda municipaux n'ont pas, dans les circonstances de l'espèce, constitué une promotion publicitaire au sens de l'article L. 52-1 du code électoral; Sur les griefs relatifs au déroulement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625_annot.xml</text:p>
          </table:table-cell>
          <table:table-cell office:value-type="string" table:style-name="ce3">
            <text:p>7.Opérations</text:p>
          </table:table-cell>
          <table:table-cell office:value-type="string" table:style-name="ce3">
            <text:p><text:s/>5. Considérant que les maires de Pantin, des Lilas et du Pré-Saint-Gervais, ainsi que le premier adjoint de cette commune, n'ont pas été désignés comme présidents de l'un des bureaux de vote alors qu'il n'était pas justifié d'un quelconque empêchement les concernant; que, dans ces circonstances, les dispositions de l'article R. 43 du code électoral ont été méconnues; que, cependant, il n'est ni établi ni même allégué que ces irrégularités aient eu pour effet de porter atteinte à la liberté ou à la sincérité du scrutin; Sur le grief tiré de la violation du quatrième alinéa de l'article L. 52-8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625_annot.xml</text:p>
          </table:table-cell>
          <table:table-cell office:value-type="string" table:style-name="ce3">
            <text:p>6.Financement</text:p>
          </table:table-cell>
          <table:table-cell office:value-type="string" table:style-name="ce3">
            <text:p><text:s/>8. Considérant que les dépenses de réunion du nouvel an et de publications engagées comme à l'accoutumée par des collectivités locales ne l'ont pas été, dans les circonstances de l'espèce, directement au profit du candidat au sens de l'article L. 52-12 du code électoral</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1993\rejet\CONSTEXT000017667627_annot.xml</text:p>
          </table:table-cell>
          <table:table-cell office:value-type="string" table:style-name="ce3">
            <text:p>4.Campagne</text:p>
          </table:table-cell>
          <table:table-cell office:value-type="string" table:style-name="ce3">
            <text:p><text:s/>3. Considérant que ce dernier texte édicte une inéligibilité que toute inéligibilité, qui a pour effet d'apporter une atteinte à la liberté des candidatures, doit être interprétée strictement</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1993\rejet\CONSTEXT000017667631_annot.xml</text:p>
          </table:table-cell>
          <table:table-cell office:value-type="string" table:style-name="ce3">
            <text:p>4.Campagne</text:p>
          </table:table-cell>
          <table:table-cell office:value-type="string" table:style-name="ce3">
            <text:p><text:s/>1. Considérant en premier lieu qu'aux termes de l'article L. 66 du code électoral: 'les bulletins blancs, ceux ne comportant pas une désignation suffisante ou dans lesquels les votants se sont fait connaître, les bulletins trouvés dans l'urne sans enveloppe ou dans des enveloppes non réglementaires, les bulletins écrits sur papier de couleur, les bulletins ou enveloppes portant des signes intérieurs ou extérieurs de reconnaissance, les bulletins ou enveloppes portant des mentions injurieuses pour les candidats ou pour des tiers n'entrent pas en compte dans le résultat du dépouillement'...; qu'ainsi M. Myrvold n'est pas fondé à soutenir qu'à la différence des bulletins nuls les bulletins blancs auraient dû être comptabilisés dans les suffrages exprimés</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93\rejet\CONSTEXT000017667632_annot.xml</text:p>
          </table:table-cell>
          <table:table-cell office:value-type="string" table:style-name="ce3">
            <text:p>4.Campagne</text:p>
          </table:table-cell>
          <table:table-cell office:value-type="string" table:style-name="ce3">
            <text:p><text:s/>1. Considérant que Mme Mienville soutient que M. Daniel Spagnou, suppléant de M. Delmar, serait inéligible du seul fait qu'il aurait été exempté du service national pour inaptitud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674_annot.xml</text:p>
          </table:table-cell>
          <table:table-cell office:value-type="string" table:style-name="ce3">
            <text:p>4.Campagne</text:p>
          </table:table-cell>
          <table:table-cell office:value-type="string" table:style-name="ce3">
            <text:p><text:s/>2. Considérant en premier lieu que si le requérant fait valoir un abus de propagande par l'affichage, il n'apporte pas la preuve du caractère massif de celui-ci</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674_annot.xml</text:p>
          </table:table-cell>
          <table:table-cell office:value-type="string" table:style-name="ce3">
            <text:p>4.Campagne</text:p>
          </table:table-cell>
          <table:table-cell office:value-type="string" table:style-name="ce3">
            <text:p><text:s/>3. Considérant en deuxième lieu que si des tracts ont été distribués la veille du scrutin, ceux-ci qui n'ont pas introduit d'éléments nouveaux dans la campagne électorale, ne peuvent avoir ainsi modifié le résultat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675_annot.xml</text:p>
          </table:table-cell>
          <table:table-cell office:value-type="string" table:style-name="ce3">
            <text:p>4.Campagne</text:p>
          </table:table-cell>
          <table:table-cell office:value-type="string" table:style-name="ce3">
            <text:p><text:s/>4. Considérant cependant que, pour regrettable qu'elle soit, la présentation des bulletins litigieux distinguait avec une clarté suffisante les noms du candidat et de son remplaçant, de celui de M. Borloo imprimé en plus petits caractères ; que pareille présentation n'était pas de nature à susciter une confusion préjudiciable à M. Lemair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677_annot.xml</text:p>
          </table:table-cell>
          <table:table-cell office:value-type="string" table:style-name="ce3">
            <text:p>6.Financement</text:p>
          </table:table-cell>
          <table:table-cell office:value-type="string" table:style-name="ce3">
            <text:p><text:s/>3. Considérant que M. Heurtault fait valoir que les dépenses de campagne de M. Nungesser ont dépassé le plafond des dépenses électorales fixé en l'espèce à 500 000 F par candidat en application de l'article L. 52-11 du code électoral; que le requérant soutient à l'appui de ce moyen que certaines dépenses occasionnées par la campagne du candidat élu auraient été sous-évaluées et que d'autres auraient été omises</text:p>
          </table:table-cell>
          <table:table-cell table:number-columns-repeated="16377"/>
        </table:table-row>
        <table:table-row table:style-name="ro1">
          <table:table-cell office:value-type="string" table:style-name="ce3">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1993\rejet\CONSTEXT000017667677_annot.xml</text:p>
          </table:table-cell>
          <table:table-cell office:value-type="string" table:style-name="ce3">
            <text:p>6.Financement</text:p>
          </table:table-cell>
          <table:table-cell office:value-type="string" table:style-name="ce3">
            <text:p><text:s/>7. Considérant qu'aux termes du premier alinéa de l'article L. 52-12 du code électoral ' chaque candidat ou candidat tête de liste soumis au plafonnement prévu à l'article L. 52-11 est tenu d'établir un compte de campagne retraçant, selon leur origine, l'ensemble des recettes perçues et, selon leur nature, l'ensemble des dépenses engagées ou effectuées en vue de l'élection, par lui-même ou pour son compte, au cours de la période mentionnée à l'article L. 52-4 ' qu'il est spécifié que: ' Sont réputées faites pour son compte les dépenses exposées directement au profit du candidat et avec l'accord, même tacite, de celui-ci, par les personnes physiques ou morales, les groupements et partis qui lui apportent leur soutien ' que le premier alinéa de l'article L. 52-12 exige enfin que ' le candidat estime et inclut, en recettes et en dépenses, les avantages directs ou indirects, les prestations de services et dons en nature dont il a bénéficié ' En ce qui concerne la réformation du compte de campagne par la Commission nationale des comptes de campagne et des financements politiqu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677_annot.xml</text:p>
          </table:table-cell>
          <table:table-cell office:value-type="string" table:style-name="ce3">
            <text:p>6.Financement</text:p>
          </table:table-cell>
          <table:table-cell office:value-type="string" table:style-name="ce3">
            <text:p><text:s/>12. Considérant en revanche que le loyer consenti par une société pour la permanence électorale de M. Nungesser, enregistré dans son compte de campagne pour 1 000 F par mois entre novembre 1992 et mars 1993, est inférieur aux prix du marché locatif dans le centre-ville de Nogent-sur-Marne; qu'un avantage en nature qui peut être estimé à 12 000 F en a été retiré et doit être réintégré dans le compte du candidat; En ce qui concerne l'absence de prise en compte de certaines dépens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677_annot.xml</text:p>
          </table:table-cell>
          <table:table-cell office:value-type="string" table:style-name="ce3">
            <text:p>6.Financement</text:p>
          </table:table-cell>
          <table:table-cell office:value-type="string" table:style-name="ce3">
            <text:p><text:s/>13. Considérant que le requérant fait valoir que les frais de confection et de diffusion des numéros du bulletin municipal Nogent Magazine, parus entre les mois de mars 1992 et mars 1993 inclus, devraient être imputés sur le compte de M. Nungesser au prorata du nombre de pages consacrées à sa campagne électorale; qu'il résulte de l'instruction que sur les douze bulletins publiés pendant la période, l'équivalent de dix pages dans les numéros 162, 163 et 166 se rattachent directement à la promotion du candidat ou à celle de son programme électoral; qu'il en est de même de l'équivalent de quatre pages parues dans le numéro 52 du magazine Le Progrès du Val-de-Marne; qu'eu égard au montant total du coût de fabrication et de diffusion desdites publications et du nombre de pages à prendre en compte, la dépense ainsi exposée, qui relève de celles visées au premier alinéa de l'article L. 52-12 du code électoral, est estimée à 42 000 F et doit être réintégrée dans le compte du candidat élu</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677_annot.xml</text:p>
          </table:table-cell>
          <table:table-cell office:value-type="string" table:style-name="ce3">
            <text:p>6.Financement</text:p>
          </table:table-cell>
          <table:table-cell office:value-type="string" table:style-name="ce3">
            <text:p><text:s/>18. Considérant qu'il résulte de tout ce qui précède qu'il convient de réintégrer dans les dépenses de M. Nungesser la somme de 55 800 F; qu'ainsi son compte en dépenses s'établit à 341 780 F, montant inférieur au plafond fixé par l'article L.52-11 du code électoral; qu'il n'y a pas lieu dès lors pour le Conseil constitutionnel de prononcer l'inégibilité de M. Nungesse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678_annot.xml</text:p>
          </table:table-cell>
          <table:table-cell office:value-type="string" table:style-name="ce3">
            <text:p>5.Campagne</text:p>
          </table:table-cell>
          <table:table-cell office:value-type="string" table:style-name="ce3">
            <text:p><text:s/>2. Considérant qu'au soutien de sa requête M. Gayet fait valoir que deux candidats au premier tour, M. Fabrice David sous l'étiquette ' Union écologiste et démocratie ' et M. Joël Gaudot sous l'étiquette ' Nouveaux Ecologistes du rassemblement nature et animaux ', auraient trompé les électeurs en se prévalant abusivement d'une prétendue adhésion aux idées d'union écologiste</text:p>
          </table:table-cell>
          <table:table-cell table:number-columns-repeated="16377"/>
        </table:table-row>
        <table:table-row table:style-name="ro1">
          <table:table-cell office:value-type="string" table:style-name="ce3">
            <text:p>Oui</text:p>
          </table:table-cell>
          <table:table-cell office:value-type="string" table:style-name="ce3">
            <text:p>Problème de découpage d'information</text:p>
          </table:table-cell>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1993\rejet\CONSTEXT000017667678_annot.xml</text:p>
          </table:table-cell>
          <table:table-cell office:value-type="string" table:style-name="ce3">
            <text:p>4.Campagne</text:p>
          </table:table-cell>
          <table:table-cell office:value-type="string" table:style-name="ce3">
            <text:p><text:s/>7. Considérant qu'il suit de là que le premier grief doit être écarté En ce qui concerne le grief tiré de la diffusion d'un trac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683_annot.xml</text:p>
          </table:table-cell>
          <table:table-cell office:value-type="string" table:style-name="ce3">
            <text:p>4.Campagne</text:p>
          </table:table-cell>
          <table:table-cell office:value-type="string" table:style-name="ce3">
            <text:p><text:s/>8. Considérant que M. Lagouge, candidat dans la 1re circonscription de Paris, fait valoir que des tracts de M. Dominati ont été diffusés au cours de la campagne électorale en violation de l'article L. 165 du code électoral, mais qu'il n'est pas établi ni même allégué par le requérant que cette diffusion ait revêtu un caractère massif de nature à altérer la sincérité du scrutin; Sur les griefs tirés de manoeuvres frauduleuses</text:p>
          </table:table-cell>
          <table:table-cell table:number-columns-repeated="16377"/>
        </table:table-row>
        <table:table-row table:style-name="ro1">
          <table:table-cell office:value-type="string" table:style-name="ce3">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1993\rejet\CONSTEXT000017667688_annot.xml</text:p>
          </table:table-cell>
          <table:table-cell office:value-type="string" table:style-name="ce3">
            <text:p>4.Campagne</text:p>
          </table:table-cell>
          <table:table-cell office:value-type="string" table:style-name="ce3">
            <text:p><text:s/>1. Considérant que le troisième alinéa de l'article L. 165 du code électoral interdit l'impression et la diffusion pendant la campagne électorale, sous quelque forme que ce soit, de tout tract ou circulaire autre que ceux établis conformément aux dispositions réglementaires prévues par le premier alinéa du même artic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688_annot.xml</text:p>
          </table:table-cell>
          <table:table-cell office:value-type="string" table:style-name="ce3">
            <text:p>4.Campagne</text:p>
          </table:table-cell>
          <table:table-cell office:value-type="string" table:style-name="ce3">
            <text:p><text:s/>2. Considérant qu'il résulte de l'instruction que Monsieur HAGE a fait distribuer aux électeurs de la circonscription, avant chacun des deux tours de scrutin, une publication intitulée 'Mieux vivre en Douaisis' appelant à voter pour ce candidat ; que ces imprimés, qui ne comportent aucune des mentions prévues au titre du régime de la presse, avaient, ainsi que le soutient Monsieur VANANDREWELT, le caractère de documents électoraux établis, eu égard notamment à leur format, en méconnaissance des dispositions régissant la propagande électorale ; que toutefois le requérant n'établit, ni même n'allègue, que ces documents auraient apporté des éléments nouveaux au débat électoral auxquels il aurait été impossible aux autres candidats en présence de répondre ; que si ces imprimés étaient abusivement revêtus du logotype de la Régie Renault, laquelle emploie de nombreux salariés dans la circonscription, il n'est pas établi que leur diffusion, pour regrettable qu'elle soit, ait été de nature à exercer une influence sur le résultat des élections ; -SUR LE GRIEF RELATIF AUX BUREAUX DE VOT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688_annot.xml</text:p>
          </table:table-cell>
          <table:table-cell office:value-type="string" table:style-name="ce3">
            <text:p>7.Opérations</text:p>
          </table:table-cell>
          <table:table-cell office:value-type="string" table:style-name="ce3">
            <text:p><text:s/>10. Considérant, enfin, que si Monsieur VANANDREWELT soutient également que des enveloppes contenant les bulletins par centaines n'auraient été ni cachetées, ni revêtues des signatures requises et que certains présidents de bureau de vote auraient empêché les délégués d'accéder aux procès-verbaux, il ne l'établit pa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726_annot.xml</text:p>
          </table:table-cell>
          <table:table-cell office:value-type="string" table:style-name="ce3">
            <text:p>4.Campagne</text:p>
          </table:table-cell>
          <table:table-cell office:value-type="string" table:style-name="ce3">
            <text:p><text:s/>2. Considérant que la diffusion par M. Carignon d'une plaquette intitulée ' Pour une France responsable ' constitue comme le souligne le requérant, une irrégularité au regard de l'article R. 29 du code électoral; que, toutefois, dans les circonstances de l'espèce et eu égard à l'écart des voix, cette irrégularité ne peut être regardée comme ayant exercé une influence sur les résultats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726_annot.xml</text:p>
          </table:table-cell>
          <table:table-cell office:value-type="string" table:style-name="ce3">
            <text:p>6.Financement</text:p>
          </table:table-cell>
          <table:table-cell office:value-type="string" table:style-name="ce3">
            <text:p><text:s/>3. Considérant que le requérant estime en outre que le financement de cette plaquette a certainement conduit à dépasser le plafond des dépenses de campagne autorisé que la Commission nationale des comptes de campagnes et des financements politiques a approuvé le compte de l'intéressé que le requérant n'apporte aucun élément qui justifierait une révision de l'évaluation par la Commission nationale des comptes de campagne de la défense ainsi fait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729_annot.xml</text:p>
          </table:table-cell>
          <table:table-cell office:value-type="string" table:style-name="ce3">
            <text:p>4.Campagne</text:p>
          </table:table-cell>
          <table:table-cell office:value-type="string" table:style-name="ce3">
            <text:p><text:s/>2. Considérant que M. Lefer allègue qu'une intervention de M. Boyon le 3 mars 1993 sur FR3 aurait influé sur les résultats du scrutin; que cette intervention, par son objet et compte tenu de sa date, ne saurait avoir altéré les résultats du scrutin</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93\rejet\CONSTEXT000017667732_annot.xml</text:p>
          </table:table-cell>
          <table:table-cell office:value-type="string" table:style-name="ce3">
            <text:p>4.Campagne</text:p>
          </table:table-cell>
          <table:table-cell office:value-type="string" table:style-name="ce3">
            <text:p><text:s/>6. Considérant que, en dehors du cas prévu à l'article L.O. 160 du code électoral, le préfet ne peut pas refuser d'enregistrer une candidature</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1993\rejet\CONSTEXT000017667734_annot.xml</text:p>
          </table:table-cell>
          <table:table-cell office:value-type="string" table:style-name="ce3">
            <text:p>4.Campagne</text:p>
          </table:table-cell>
          <table:table-cell office:value-type="string" table:style-name="ce3">
            <text:p><text:s/>9. Considérant enfin qu'il n'est ni établi ni même prétendu que les électeurs auraient été empêchés de voter pour le candidat de leur choix</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1993\rejet\CONSTEXT000017667735_annot.xml</text:p>
          </table:table-cell>
          <table:table-cell office:value-type="string" table:style-name="ce3">
            <text:p>4.Campagne</text:p>
          </table:table-cell>
          <table:table-cell office:value-type="string" table:style-name="ce3">
            <text:p><text:s/>8. Considérant, enfin, qu'il n'est ni établi ni même prétendu que les électeurs auraient été empêchés de voter pour le candidat de leur choix</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1993\rejet\CONSTEXT000017667736_annot.xml</text:p>
          </table:table-cell>
          <table:table-cell office:value-type="string" table:style-name="ce3">
            <text:p>4.Campagne</text:p>
          </table:table-cell>
          <table:table-cell office:value-type="string" table:style-name="ce3">
            <text:p><text:s/>8. Considérant enfin qu'il n'est ni établi, ni même prétendu que les électeurs auraient été empêchés de voter pour le candidat de leur choix</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738_annot.xml</text:p>
          </table:table-cell>
          <table:table-cell office:value-type="string" table:style-name="ce3">
            <text:p>4.Campagne</text:p>
          </table:table-cell>
          <table:table-cell office:value-type="string" table:style-name="ce3">
            <text:p><text:s/>1. Considérant, en premier lieu, que M. Bosviel soutient que M. Vergès, candidat élu dans la 2e circonscription de la Réunion, a irrégulièrement bénéficié du soutien de la station Radio-Freedom, laquelle aurait ainsi rompu l'égalité entre les candidats et méconnu, tant les dispositions régissant la communication audiovisuelle que celles du premier alinéa de l'article L. 52-1 du code électoral aux termes desquelles ' pendant trois mois précédant le premier jour du mois d'une élection et jusqu'à la date du tour de scrutin où celle-ci est acquise, l'utilisation à des fins de propagande électorale de tout procédé de publicité commerciale par la voie de la presse ou par tout moyen de communication audiovisuelle est interdit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741_annot.xml</text:p>
          </table:table-cell>
          <table:table-cell office:value-type="string" table:style-name="ce3">
            <text:p>4.Campagne</text:p>
          </table:table-cell>
          <table:table-cell office:value-type="string" table:style-name="ce3">
            <text:p><text:s/>3. Considérant que le requérant fait état de la distribution dans une partie de la circonscription, la veille du scrutin, d'un tract diffamatoire mettant gravement en cause son comportement personnel et son activité professionnelle ainsi que la probité de sa suppléante; que, toutefois, il ne résulte pas de l'instruction que ce tract ait fait l'objet d'une distribution au-delà d'un seul canton sur les quatorze que comporte cette circonscription; que, par ailleurs, l'origine de ce tract anonyme n'a pu être établie; que dès lors aussi condamnable que soit le contenu de ce tract, la diffusion de celui-ci ne peut être regardée comme ayant exercé une influence de nature à modifier l'issue du scrutin; En ce qui concerne le grief tiré d'un affichage illégal</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1993\rejet\CONSTEXT000017667741_annot.xml</text:p>
          </table:table-cell>
          <table:table-cell office:value-type="string" table:style-name="ce3">
            <text:p>4.Campagne</text:p>
          </table:table-cell>
          <table:table-cell office:value-type="string" table:style-name="ce3">
            <text:p><text:s/>6. Considérant qu'il résulte de ce qui précède que le requête ne peut qu'être rejetée,</text:p>
          </table:table-cell>
          <table:table-cell table:number-columns-repeated="16377"/>
        </table:table-row>
        <table:table-row table:style-name="ro1">
          <table:table-cell office:value-type="string" table:style-name="ce3">
            <text:p>Oui</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1993\rejet\CONSTEXT000017667742_annot.xml</text:p>
          </table:table-cell>
          <table:table-cell office:value-type="string" table:style-name="ce3">
            <text:p>4.Campagne</text:p>
          </table:table-cell>
          <table:table-cell office:value-type="string" table:style-name="ce3">
            <text:p><text:s/>2. Considérant qu'il ne ressort pas des pièces du dossier que l'égalité entre les candidats ait été violée à la fin de la campagne audiovisuelle ni que, lors de la dernière émission télévisée, M. Chammougon ait apporté d'éléments polémiques nouveaux auxquels M. Larifla n'aurait pas pu répondre en temps utile; Sur les griefs tirés du déroulement du scrutin</text:p>
          </table:table-cell>
          <table:table-cell table:number-columns-repeated="16377"/>
        </table:table-row>
        <table:table-row table:style-name="ro1">
          <table:table-cell office:value-type="string" table:style-name="ce3">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1993\rejet\CONSTEXT000017667783_annot.xml</text:p>
          </table:table-cell>
          <table:table-cell office:value-type="string" table:style-name="ce3">
            <text:p>4.Campagne</text:p>
          </table:table-cell>
          <table:table-cell office:value-type="string" table:style-name="ce3">
            <text:p><text:s/>2. Considérant, en premier lieu, qu'aux termes de l'article L. 52-1 du code électoral: ' Pendant trois mois précédant le premier jour du mois d'une élection et jusqu'à la date du tour de scrutin où celle-ci est acquise, l'utilisation à des fins de propagande électorale de tout procédé de publicité commerciale par la voix de la presse ou par tout moyen de communication audiovisuelle est interdite. A compter du premier jour du sixième mois précédant le mois au cours duquel il doit être procédé à des élections générales, aucune campagne de promotion publicitaire des réalisations ou de la gestion de cette collectivité ne peut être organisée sur le territoire des collectivités intéressées par le scrutin</text:p>
          </table:table-cell>
          <table:table-cell table:number-columns-repeated="16377"/>
        </table:table-row>
        <table:table-row table:style-name="ro1">
          <table:table-cell office:value-type="string" table:style-name="ce3">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1993\rejet\CONSTEXT000017667783_annot.xml</text:p>
          </table:table-cell>
          <table:table-cell office:value-type="string" table:style-name="ce3">
            <text:p>6.Financement</text:p>
          </table:table-cell>
          <table:table-cell office:value-type="string" table:style-name="ce3">
            <text:p><text:s/>6. Considérant qu'aux termes du premier alinéa de l'article L. 52-12 du code électoral ' Chaque candidat ou candidat tête de liste soumis au plafonnement prévu à l'article L. 52-11 est tenu d'établir un compte de campagne retraçant, selon leur origine, l'ensemble des recettes perçues et, selon leur nature, l'ensemble des dépenses engagées ou effectuées en vue de l'élection, par lui-même ou pour son compte, au cours de la période mentionnée à l'article L. 52-4. Sont réputées faites pour son compte des dépenses exposées directement au profit du candidat et avec l'accord, même tacite, de celui-ci, par les personnes physiques ou morales, les groupements et partis qui lui apportent leur soutie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783_annot.xml</text:p>
          </table:table-cell>
          <table:table-cell office:value-type="string" table:style-name="ce3">
            <text:p>6.Financement</text:p>
          </table:table-cell>
          <table:table-cell office:value-type="string" table:style-name="ce3">
            <text:p><text:s/>8. Considérant, d'autre part, que les dépenses exposées par la ville de Cahors et correspondant à l'affichage mentionné ci-dessus ne peuvent être regardées comme étant au nombre de celles que visent les dispositions précitées de l'article L. 52-12; que par suite, et contrairement à ce que soutient M. Dridi, le coût de cet affichage n'avait pas à être inclus dans le compte de campagne de M. Charles; Sur les griefs relatifs au déroulement des opérations électorales</text:p>
          </table:table-cell>
          <table:table-cell table:number-columns-repeated="16377"/>
        </table:table-row>
        <table:table-row table:style-name="ro1">
          <table:table-cell office:value-type="string" table:style-name="ce3">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1993\rejet\CONSTEXT000017667784_annot.xml</text:p>
          </table:table-cell>
          <table:table-cell office:value-type="string" table:style-name="ce3">
            <text:p>4.Campagne</text:p>
          </table:table-cell>
          <table:table-cell office:value-type="string" table:style-name="ce3">
            <text:p><text:s/>1. Considérant qu'aux termes de l'article L. 51 du code électoral: ' Pendant la durée de la période électorale, dans chaque commune, des emplacements spéciaux sont réservés par l'autorité municipale pour l'apposition des affiches électorales; ' Dans chacun de ces emplacements, une surface égale est attribuée à chaque candidat ou chaque liste de candidats. ' Pendant les trois mois précédant le premier jour du mois d'une élection et jusqu'à la date du tour de scrutin où celle-ci est acquise, tout affichage relatif à l'élection, même par affiches timbrées, est interdit en dehors de cet emplacement ou sur l'emplacement réservé aux autres candidats.</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1993\rejet\CONSTEXT000017667784_annot.xml</text:p>
          </table:table-cell>
          <table:table-cell office:value-type="string" table:style-name="ce3">
            <text:p>4.Campagne</text:p>
          </table:table-cell>
          <table:table-cell office:value-type="string" table:style-name="ce3">
            <text:p><text:s/>7. Considérant que le requérant n'établit pas que, dans le bureau no 3, les enveloppes contenant une centaine de bulletins ont été distribuées sans avoir été préalablement cachetées et signées par les assesseur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784_annot.xml</text:p>
          </table:table-cell>
          <table:table-cell office:value-type="string" table:style-name="ce3">
            <text:p>7.Opérations</text:p>
          </table:table-cell>
          <table:table-cell office:value-type="string" table:style-name="ce3">
            <text:p><text:s/>10. Considérant que la circonstance que, dans le bureau no 13, les feuilles de pointage n'ont pas été annexées au procès-verbal ne constitue pas par elle-même une irrégularité susceptible de vicier les résultats du scrutin, dès lors que le décompte des suffrages opéré dans ce bureau n'est pas contesté</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93\rejet\CONSTEXT000017667785_annot.xml</text:p>
          </table:table-cell>
          <table:table-cell office:value-type="string" table:style-name="ce3">
            <text:p>4.Campagne</text:p>
          </table:table-cell>
          <table:table-cell office:value-type="string" table:style-name="ce3">
            <text:p><text:s/>2. Considérant que cet article édicte une inégibilité que celle-ci doit s'interpréter stricteme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786_annot.xml</text:p>
          </table:table-cell>
          <table:table-cell office:value-type="string" table:style-name="ce3">
            <text:p>4.Campagne</text:p>
          </table:table-cell>
          <table:table-cell office:value-type="string" table:style-name="ce3">
            <text:p><text:s/>4. Considérant que le document intitulé ' Lettre aux agriculteurs ' appelant à voter pour M. Soulage et adressé par la poste, la veille du second tour de scrutin, à plusieurs milliers d'électeurs, ne comportait aucune mention injurieuse ou diffamatoire, ni aucun élément nouveau dans le débat électoral; que, par suite, la diffusion de ce document, pour irrégulière qu'elle fût, n'a pu être de nature à fausser les résultats du scrutin</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1993\rejet\CONSTEXT000017667786_annot.xml</text:p>
          </table:table-cell>
          <table:table-cell office:value-type="string" table:style-name="ce3">
            <text:p>4.Campagne</text:p>
          </table:table-cell>
          <table:table-cell office:value-type="string" table:style-name="ce3">
            <text:p><text:s/>6. Considérant que la circonstance que certains des bulletins de vote de M. Soulage, mis à la disposition des électeurs au second tour de scrutin, aient comporté par erreur la mention ' U.D.F. ', alors que cette formation politique n'apportait plus son soutien à ce candidat, n'a pu être de nature, eu égard notamment au petit nombre de bulletins concernés, à tromper les électeurs et à altérer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786_annot.xml</text:p>
          </table:table-cell>
          <table:table-cell office:value-type="string" table:style-name="ce3">
            <text:p>6.Financement</text:p>
          </table:table-cell>
          <table:table-cell office:value-type="string" table:style-name="ce3">
            <text:p><text:s/>10. Considérant que, par une décision du 15 octobre 1993, la Commission nationale des comptes de campagne et des financements politiques, après avoir réformé le compte de campagne présenté par M. Soulage en ajoutant diverses sommes tant au titre des dépenses qu'à celui des recettes, a estimé que l'intéressé n'avait pas dépassé le plafond légal des dépenses; que, cependant, M. Gonelle soutient que certaines dépenses exposées par M. Soulage pour les besoins de sa campagne n'ont pas été prises en compte et que l'adjonction des sommes correspondantes aboutit à porter le total des dépenses à un montant supérieur au plafond lég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786_annot.xml</text:p>
          </table:table-cell>
          <table:table-cell office:value-type="string" table:style-name="ce3">
            <text:p>6.Financement</text:p>
          </table:table-cell>
          <table:table-cell office:value-type="string" table:style-name="ce3">
            <text:p><text:s/>11. Considérant toutefois qu'il n'est pas établi que M. Soulage ait fait réaliser un sondage d'opinion pour les besoins de sa campagne électorale; qu'il ne résulte pas non plus de l'instruction que le montant des dépenses afférentes à la réception organisée le 4 mars 1993 pour soutenir la candidature de M. Soulage tel qu'établi par la commission des comptes de campagne soit inférieur au montant des dépenses réellement exposées à cette occasion; qu'il en va de même du montant, figurant au compte de campagne, des dépenses exposées pour l'envoi du document intitulé ' Lettre aux agriculteurs ' qu'enfin, il n'est pas établi que M. Soulage ait omis d'inclure dans son compte de campagne certains des frais exposés par lui pour l'utilisation de fichiers en vue de l'envoi aux électeurs de documents de propagande</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93\rejet\CONSTEXT000017667788_annot.xml</text:p>
          </table:table-cell>
          <table:table-cell office:value-type="string" table:style-name="ce3">
            <text:p>4.Campagne</text:p>
          </table:table-cell>
          <table:table-cell office:value-type="string" table:style-name="ce3">
            <text:p><text:s/>2. Considérant que si le requérant soutient que la candidature de Mme Barbosa n'aurait pas été enregistrée dans le respect des règles prévues aux articles L. 154 à L. 158 du code électoral, cette allégation n'est pas corroborée par les pièces du dossier</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93\rejet\CONSTEXT000017667789_annot.xml</text:p>
          </table:table-cell>
          <table:table-cell office:value-type="string" table:style-name="ce3">
            <text:p>4.Campagne</text:p>
          </table:table-cell>
          <table:table-cell office:value-type="string" table:style-name="ce3">
            <text:p><text:s/>2. Considérant que si le requérant soutient que la candidature de Mme Barreiros n'aurait pas été enregistrée dans le respect des règles prévues aux articles L. 154 à L. 158 du code électoral, cette allégation n'est pas corroborée par les pièces du dossier</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93\rejet\CONSTEXT000017667789_annot.xml</text:p>
          </table:table-cell>
          <table:table-cell office:value-type="string" table:style-name="ce3">
            <text:p>4.Campagne</text:p>
          </table:table-cell>
          <table:table-cell office:value-type="string" table:style-name="ce3">
            <text:p><text:s/>3. Considérant que, si le requérant soutient que Mme Barreiros n'a été convaincue de présenter sa candidature que par des dons ou des promesses d'avantages, cette allégation n'est pas corroborée par les pièces du dossier</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93\rejet\CONSTEXT000017667790_annot.xml</text:p>
          </table:table-cell>
          <table:table-cell office:value-type="string" table:style-name="ce3">
            <text:p>4.Campagne</text:p>
          </table:table-cell>
          <table:table-cell office:value-type="string" table:style-name="ce3">
            <text:p><text:s/>2. Considérant que, si le requérant soutient que la candidature de M. Chalumet n'aurait pas été enregistrée dans le respect des règles prévues aux articles L. 154 à L. 158 du code électoral, cette allégation n'est pas corroborée par les pièces du dossier</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93\rejet\CONSTEXT000017667790_annot.xml</text:p>
          </table:table-cell>
          <table:table-cell office:value-type="string" table:style-name="ce3">
            <text:p>4.Campagne</text:p>
          </table:table-cell>
          <table:table-cell office:value-type="string" table:style-name="ce3">
            <text:p><text:s/>3. Considérant que, si le requérant soutient que M. Chalumet n'a été convaincu de présenter sa candidature que par des dons ou des promesses d'avantages, cette allégation n'est pas non plus corroborée par les pièces du dossier</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93\rejet\CONSTEXT000017667791_annot.xml</text:p>
          </table:table-cell>
          <table:table-cell office:value-type="string" table:style-name="ce3">
            <text:p>4.Campagne</text:p>
          </table:table-cell>
          <table:table-cell office:value-type="string" table:style-name="ce3">
            <text:p><text:s/>3. Considérant que, si le requérant soutient que la candidature de Mme Metzger n'aurait pas été enregistrée dans le respect des règles prévues aux article L. 154 à L. 158 du code électoral, cette allégation n'est pas corroborée par les pièces du dossier</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93\rejet\CONSTEXT000017667791_annot.xml</text:p>
          </table:table-cell>
          <table:table-cell office:value-type="string" table:style-name="ce3">
            <text:p>4.Campagne</text:p>
          </table:table-cell>
          <table:table-cell office:value-type="string" table:style-name="ce3">
            <text:p><text:s/>4. Considérant que, si le requérant soutient que Mme Metzger n'a été convaincue de présenter sa candidature que par des dons ou des promesses d'avantages, cette allégation n'est pas corroborée par les pièces du dossier</text:p>
          </table:table-cell>
          <table:table-cell table:number-columns-repeated="16377"/>
        </table:table-row>
        <table:table-row table:style-name="ro1">
          <table:table-cell office:value-type="string" table:style-name="ce3">
            <text:p>Oui</text:p>
          </table:table-cell>
          <table:table-cell table:style-name="ce3"/>
          <table:table-cell office:value-type="string" table:style-name="ce3">
            <text:p>Seulement la majeure annotée</text:p>
          </table:table-cell>
          <table:table-cell table:style-name="ce3"/>
          <table:table-cell office:value-type="string" table:style-name="ce3">
            <text:p>file:\\\P:\CRJ\RECHERCHE\PROJET_JADE\JADE_COMMUN\Annotation\Annotation_automatique_Maritaud\Technologie_light\Super-catégories-objets_0,8\AN\1993\rejet\CONSTEXT000017667791_annot.xml</text:p>
          </table:table-cell>
          <table:table-cell office:value-type="string" table:style-name="ce3">
            <text:p>4.Campagne</text:p>
          </table:table-cell>
          <table:table-cell office:value-type="string" table:style-name="ce3">
            <text:p><text:s/>12. Considérant que le second alinéa de l'article L. 52-1 du code électoral prévoit qu' ' à compter du premier jour du sixième mois précédant le mois au cours duquel il doit être procédé à des élections générales aucune campagne de promotion publicitaire des réalisations et de la gestion d'une collectivité ne peut être organisée sur le territoire des collectivités intéressées par le scrutin ' ; qu'une communauté urbaine, établissement public de coopération intercommunale dont ' les attributions et les règles de fonctionnement sont identiques à celles des collectivités territoriales 'et auquel s'appliquent ' les lois et les règlements concernant les communes ', aux termes des articles L. 165-I et L. 165-2 du code des communes, constitue une collectivité au sens de l'article L. 52-I du code électoral</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93\rejet\CONSTEXT000017667792_annot.xml</text:p>
          </table:table-cell>
          <table:table-cell office:value-type="string" table:style-name="ce3">
            <text:p>4.Campagne</text:p>
          </table:table-cell>
          <table:table-cell office:value-type="string" table:style-name="ce3">
            <text:p><text:s/>2. Considérant que si le requérant soutient que la candidature de Mme Ouillon n'aurait pas été enregistrée dans le respect des règles prévues aux articles L. 154 à L. 158 du code électoral, cette allégation n'est pas corroborée par les pièces du dossier</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93\rejet\CONSTEXT000017667792_annot.xml</text:p>
          </table:table-cell>
          <table:table-cell office:value-type="string" table:style-name="ce3">
            <text:p>4.Campagne</text:p>
          </table:table-cell>
          <table:table-cell office:value-type="string" table:style-name="ce3">
            <text:p><text:s/>3. Considérant que, si le requérant soutient que Mme Ouillon n'a été convaincue de présenter sa candidature que par des dons ou des promesses d'avantages, cette allégation n'est pas corroborée par les pièces du dossie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793_annot.xml</text:p>
          </table:table-cell>
          <table:table-cell office:value-type="string" table:style-name="ce3">
            <text:p>4.Campagne</text:p>
          </table:table-cell>
          <table:table-cell office:value-type="string" table:style-name="ce3">
            <text:p><text:s/>1. Considérant en premier lieu que la distribution, dans la nuit précédant le scrutin, de tracts favorables à M. Danilet, qui ne comportent aucun élément injurieux et ne font que reprendre les arguments utilisés tout au long de la campagne, ne saurait, bien qu'irrégulière, être regardée comme constitutive d'une manoeuvre de dernière heure qui aurait exercé une influence sur le résultat de l'électio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796_annot.xml</text:p>
          </table:table-cell>
          <table:table-cell office:value-type="string" table:style-name="ce3">
            <text:p>7.Opérations</text:p>
          </table:table-cell>
          <table:table-cell office:value-type="string" table:style-name="ce3">
            <text:p><text:s/>2. Considérant qu'aucune disposition législative ou réglementaire n'impose l'obligation d'annexer au procès-verbal des opérations électorales les enveloppes vides trouvées dans l'urne; que, dès lors, le grief tiré de ce que certaines de ces enveloppes, annexées aux procès-verbaux des communes de Pont-Scorff et de Brandérion, n'ont pas été contresignées par les membres des bureaux de vote est inopéra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796_annot.xml</text:p>
          </table:table-cell>
          <table:table-cell office:value-type="string" table:style-name="ce3">
            <text:p>7.Opérations</text:p>
          </table:table-cell>
          <table:table-cell office:value-type="string" table:style-name="ce3">
            <text:p><text:s/>3. Considérant que si, dans la commune de Pont-Scorff, un certain nombre de bulletins nuls annexés au procès-verbal des opérations électorales n'ont pas été contresignés par l'ensemble des membres du bureau de vote, en méconnaissance des prescriptions de l'article L. 66 du code électoral, cette circonstance est sans incidence sur la régularité du scrutin, dès lors que l'authenticité desdits bulletins résulte des mentions figurant au procès-verbal établi et signé sans observation par le bureau de vote de cette commune; que si, dans les communes de Cléguer et de Quéven, onze bulletins déclarés nuls n'ont pas été annexés aux procès-verbaux, cette omission est sans influence sur la régularité du scrutin dès lors qu'il ne résulte pas de l'instruction qu'elle ait eu pour but et pour conséquence de porter atteinte à la sincérité dudit scrutin; que l'article L. 66 du code électoral n'imposant que l'annexion au procès-verbal des bulletins déclarés nuls et non celle des enveloppes qui contenaient lesdits bulletins, la circonstance que, dans la commune de Silfiac, les bulletins nuls aient été annexés sans les enveloppes correspondantes n'a pas constitué une irrégularité</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2. Opérations préalables au scrutin</text:p>
          </table:table-cell>
          <table:table-cell office:value-type="string" table:style-name="ce3">
            <text:p>file:\\\P:\CRJ\RECHERCHE\PROJET_JADE\JADE_COMMUN\Annotation\Annotation_automatique_Maritaud\Technologie_light\Super-catégories-objets_0,8\AN\1993\rejet\CONSTEXT000017667798_annot.xml</text:p>
          </table:table-cell>
          <table:table-cell office:value-type="string" table:style-name="ce3">
            <text:p>4.Campagne</text:p>
          </table:table-cell>
          <table:table-cell office:value-type="string" table:style-name="ce3">
            <text:p><text:s/>7. Considérant que si M. Logologofolau invoque quelques irrégularités et erreurs matérielles concernant la tenue des listes électorales, mentionnées sur les procès-verbaux, celles-ci n'ont pu, à les supposer établies, exercer une influence sur les résultats de l'électio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799_annot.xml</text:p>
          </table:table-cell>
          <table:table-cell office:value-type="string" table:style-name="ce3">
            <text:p>4.Campagne</text:p>
          </table:table-cell>
          <table:table-cell office:value-type="string" table:style-name="ce3">
            <text:p><text:s/>1. Considérant que M. Pierre Lajournade invoque l'utilisation par M. André Trigano de moyens de propagande prohibés par les articles L. 51 et L. 165 du code électoral; qu'il n'apporte cependant aucun commencement de preuve à l'appui de ses allégations; Sur les moyens tirés du dépassement du plafond légal des dépenses électoral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799_annot.xml</text:p>
          </table:table-cell>
          <table:table-cell office:value-type="string" table:style-name="ce3">
            <text:p>6.Financement</text:p>
          </table:table-cell>
          <table:table-cell office:value-type="string" table:style-name="ce3">
            <text:p><text:s/>2. Considérant que le requérant affirme que les dépenses de campagne électorale de M. André Trigano ont dépassé le plafond des dépenses électorales fixé en application de l'article L. 52-11 du code électoral; que ce plafond est de 400 000 F par candidat pour l'élection des députés dans les circonscriptions dont la population est inférieure à 80 000 habitants; que M. Lajournade demande au Conseil constitutionnel de constater le dépassement du plafond des dépenses autorisées, de prononcer l'inéligibilité de M. Trigano en tant que député pour une durée d'un an à compter de l'élection et d'annuler celle-ci</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799_annot.xml</text:p>
          </table:table-cell>
          <table:table-cell office:value-type="string" table:style-name="ce3">
            <text:p>6.Financement</text:p>
          </table:table-cell>
          <table:table-cell office:value-type="string" table:style-name="ce3">
            <text:p><text:s/>3. Considérant que le requérant fait grief à M. Trigano d'avoir minimisé le coût de certaines dépenses, liées en particulier à l'organisation de réunions électorales et pour lesquelles la dépense déclarée dans le compte de campagne serait inférieure aux prix habituellement pratiqué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800_annot.xml</text:p>
          </table:table-cell>
          <table:table-cell office:value-type="string" table:style-name="ce3">
            <text:p>4.Campagne</text:p>
          </table:table-cell>
          <table:table-cell office:value-type="string" table:style-name="ce3">
            <text:p><text:s/>2. Considérant que le fait que M. Mercieca ne se soit pas prévalu de son appartenance à une formation politique entre les deux tours ne peut être considéré comme une manoeuvre ayant altéré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800_annot.xml</text:p>
          </table:table-cell>
          <table:table-cell office:value-type="string" table:style-name="ce3">
            <text:p>7.Opérations</text:p>
          </table:table-cell>
          <table:table-cell office:value-type="string" table:style-name="ce3">
            <text:p><text:s/>3. Considérant que si le requérant allègue une méconnaissance du secret du vote au motif que des électeurs n'auraient pris qu'un seul bulletin de vote avant de passer par l'isoloir, aucune disposition du code électoral n'oblige les électeurs à prendre plusieurs bulletins; que, par suite, la circonstance alléguée n'est pas constitutive d'une irrégularité de nature à vicier les résultats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3\rejet\CONSTEXT000017667839_annot.xml</text:p>
          </table:table-cell>
          <table:table-cell office:value-type="string" table:style-name="ce3">
            <text:p>4.Campagne</text:p>
          </table:table-cell>
          <table:table-cell office:value-type="string" table:style-name="ce3">
            <text:p><text:s/>1. Considérant que si un tract appelant à voter pour M. Borloo a été trouvé le jour du second tour de scrutin dans la boîte aux lettres de M. Hirsoux, le contenu de ce document, dont il n'est d'ailleurs pas allégué qu'il aurait fait l'objet d'une distribution massive, n'apportait aucun élément nouveau dans le débat électoral; qu'ainsi cette circonstance n'a pu, compte tenu de l'important écart des voix séparant les candidats en présence, exercer d'influence sur le résultat du scrutin</text:p>
          </table:table-cell>
          <table:table-cell table:number-columns-repeated="16377"/>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3\rejet\CONSTEXT000017667840_annot.xml</text:p>
          </table:table-cell>
          <table:table-cell office:value-type="string" table:style-name="ce7">
            <text:p>7.Opérations</text:p>
          </table:table-cell>
          <table:table-cell office:value-type="string" table:style-name="ce7">
            <text:p><text:s/>3. Considérant que le requérant fait valoir que le contrôle de l'identité des électeurs a été systématiquement négligé dans trois bureaux de vote de la commune de Bauvin, sur ordre du maire; qu'il ne résulte pas de l'instruction qu'une telle irrégularité qui n'est pas mentionnée dans les procès-verbaux de recensement des votes ait été commise</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3\rejet\CONSTEXT000017667841_annot.xml</text:p>
          </table:table-cell>
          <table:table-cell office:value-type="string" table:style-name="ce7">
            <text:p>7.Opérations</text:p>
          </table:table-cell>
          <table:table-cell office:value-type="string" table:style-name="ce7">
            <text:p><text:s/>5. Considérant que, si dans la commune d'Ailly-sur-Somme un seul président et six assesseurs ont constitué trois bureaux de vote, en méconnaissance des prescriptions de l'article R. 42 du code électoral, cette irrégularité n'est pas de nature, en l'absence de manoeuvre frauduleuse, à justifier l'annulation des suffrages exprimés dans cette commune; qu'il en va de même de la circonstance que le procès-verbal du bureau centralisateur de Crouy-Saint-Pierre ne mentionne pas les noms des membres de ce bureau</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3\rejet\CONSTEXT000017667841_annot.xml</text:p>
          </table:table-cell>
          <table:table-cell office:value-type="string" table:style-name="ce7">
            <text:p>4.Campagne</text:p>
          </table:table-cell>
          <table:table-cell office:value-type="string" table:style-name="ce7">
            <text:p><text:s/>8. Considérant qu'il résulte de l'instruction que si ce tract a été diffusé en nombre important aux dates indiquées, Mlle Foure y a répondu par un tract distribué dans l'après-midi et la soirée du 27 mars; qu'au surplus, le tract litigieux dont l'origine n'est pas établie ne comporte aucune allégation diffamatoire; que dès lors la diffusion de ce tract n'a pas été de nature à altérer les résultats du scrutin; que par suite le grief doit être rejeté</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3\rejet\CONSTEXT000017667841_annot.xml</text:p>
          </table:table-cell>
          <table:table-cell office:value-type="string" table:style-name="ce7">
            <text:p>4.Campagne</text:p>
          </table:table-cell>
          <table:table-cell office:value-type="string" table:style-name="ce7">
            <text:p><text:s/>9. Considérant que si des tracts appelant à voter pour M. Gremetz ont été distribués dans plusieurs communes de la circonscription, au cours de la nuit précédant le scrutin, lesdits tracts ne comportaient aucun propos diffamatoire ni aucun élément nouveau dans le débat électoral; que leur diffusion n'a donc pas pu être de nature à altérer la sincérité du scrutin</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3\rejet\CONSTEXT000017667842_annot.xml</text:p>
          </table:table-cell>
          <table:table-cell office:value-type="string" table:style-name="ce7">
            <text:p>4.Campagne</text:p>
          </table:table-cell>
          <table:table-cell office:value-type="string" table:style-name="ce7">
            <text:p><text:s/>3. Considérant que la requérante fait état de la diffusion entre les deux tours d'un tract reproduisant la première page d'un quotidien régional paru le 13 mars rappelant les résultats du sondage mentionné ci-dessus; qu'elle n'apporte aucune preuve de l'origine et de la diffusion de ce tract; que, par suite, ce moyen ne peut être retenu</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3\rejet\CONSTEXT000017667842_annot.xml</text:p>
          </table:table-cell>
          <table:table-cell office:value-type="string" table:style-name="ce7">
            <text:p>4.Campagne</text:p>
          </table:table-cell>
          <table:table-cell office:value-type="string" table:style-name="ce7">
            <text:p><text:s/>4. Considérant que les propos contenus dans les tracts de M. Hamel et dans les déclarations à la presse n'ont pas excédé les limites de la polémique électorale et ne constituent pas une manoeuvre de nature à altérer la sincérité du scrutin,</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3\rejet\CONSTEXT000017667845_annot.xml</text:p>
          </table:table-cell>
          <table:table-cell office:value-type="string" table:style-name="ce7">
            <text:p>4.Campagne</text:p>
          </table:table-cell>
          <table:table-cell office:value-type="string" table:style-name="ce7">
            <text:p><text:s/>1. Considérant en premier lieu que si des exemplaires du journal électoral de M. Féron, édité et diffusé dès avant le début de la campagne électorale et intitulé Actualités du 19e, édition ' Spécial élections législatives ', ont été diffusés entre les deux tours de scrutin et le jour même du deuxième tour, avec à l'intérieur un communiqué du Front national appelant à faire barrage à l'élection du requérant, le contenu dudit journal comme du communiqué n'a pas dépassé les limites de la polémique électorale, et il n'est pas établi que sa diffusion ait eu un caractère significatif; qu'au surplus le requérant a procédé de son côté à la distribution irrégulière d'un journal électoral; que la diffusion en cause n'est, dès lors, pas de nature à avoir altéré les résultats du scrutin</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3\rejet\CONSTEXT000017667845_annot.xml</text:p>
          </table:table-cell>
          <table:table-cell office:value-type="string" table:style-name="ce7">
            <text:p>4.Campagne</text:p>
          </table:table-cell>
          <table:table-cell office:value-type="string" table:style-name="ce7">
            <text:p><text:s/>2. Considérant en deuxième lieu que si des affiches malveillantes à l'égard du requérant ont été apposées irrégulièrement, y compris sur des panneaux officiels de l'intéressé, cet affichage, pour très critiquable qu'en soit le texte, n'est pas, en raison de son ampleur limitée, de nature à avoir altéré le résultat du scrutin</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3\rejet\CONSTEXT000017667846_annot.xml</text:p>
          </table:table-cell>
          <table:table-cell office:value-type="string" table:style-name="ce7">
            <text:p>6.Financement</text:p>
          </table:table-cell>
          <table:table-cell office:value-type="string" table:style-name="ce7">
            <text:p><text:s/>2. Considérant que la Commission nationale des comptes de campagne et des financements politiques à réintégré à hauteur de 8 597 F dans le compte de campagne de M. Dubernard la valeur de l'avantage en nature correspondant au supplément que la revue municipale ' C'est 9 à Lyon ' a consacré au 8e arrondissement de cette ville dont la circonscription de M. Dubernard faisait partiellement partie; qu'ainsi le compte de campagne du candidat élu s'établit après réformation à un montant en dépenses de 381 282 F, inférieur au plafond légal de 500 000 F</text:p>
          </table:table-cell>
          <table:table-cell table:number-columns-repeated="16377" table:style-name="ce2"/>
        </table:table-row>
        <table:table-row table:style-name="ro1">
          <table:table-cell office:value-type="string" table:style-name="ce8">
            <text:p>Non</text:p>
          </table:table-cell>
          <table:table-cell table:number-columns-repeated="2" table:style-name="ce7"/>
          <table:table-cell office:value-type="string" table:style-name="ce7">
            <text:p>5. Campagnes : pressions</text:p>
          </table:table-cell>
          <table:table-cell office:value-type="string" table:style-name="ce7">
            <text:p>file:\\\P:\CRJ\RECHERCHE\PROJET_JADE\JADE_COMMUN\Annotation\Annotation_automatique_Maritaud\Technologie_light\Super-catégories-objets_0,8\AN\1993\rejet\CONSTEXT000017667850_annot.xml</text:p>
          </table:table-cell>
          <table:table-cell office:value-type="string" table:style-name="ce7">
            <text:p>4.Campagne</text:p>
          </table:table-cell>
          <table:table-cell office:value-type="string" table:style-name="ce7">
            <text:p><text:s/>3. Considérant que M. Bourrinet fait valoir que Mme Bachelot a fait diffuser sur papier à en-tête de l'Assemblée nationale une lettre dans la semaine précédant l'élection; que cet envoi ne constitue pas une infraction aux dispositions régissant le déroulement de celle-ci</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4\rejet\CONSTEXT000017666433_annot.xml</text:p>
          </table:table-cell>
          <table:table-cell office:value-type="string" table:style-name="ce7">
            <text:p>6.Financement</text:p>
          </table:table-cell>
          <table:table-cell office:value-type="string" table:style-name="ce7">
            <text:p><text:s/>3. Considérant, d'une part, que les frais liés au déplacement et à l'hébergement de représentants de formations politiques se rendant dans une circonscription ne constituent pas, pour le candidat qu'ils viennent soutenir, une dépense électorale qui doit figurer dans son compte de campagne; qu'il suit de là que les requérants ne sont pas fondés à demander la réintégration, à ce titre, d'une somme de 175 000 F dans le compte de campagne de M. Garnier</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4\rejet\CONSTEXT000017666433_annot.xml</text:p>
          </table:table-cell>
          <table:table-cell office:value-type="string" table:style-name="ce7">
            <text:p>6.Financement</text:p>
          </table:table-cell>
          <table:table-cell office:value-type="string" table:style-name="ce7">
            <text:p><text:s/>4. Considérant, d'autre part, qu'il n'est pas établi que M. Bongrand, conseiller en communication, ait fourni à M. Garnier des prestations dans le cadre de la conduite de sa campagne électorale; que les requérants ne sont donc pas fondés à demander, à ce titre, la réintégration d'une somme de 100 000 F, représentant les honoraires correspondant aux prestations prétendument fournies, dans le compte de campagne de M. Garnier</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4\rejet\CONSTEXT000017666433_annot.xml</text:p>
          </table:table-cell>
          <table:table-cell office:value-type="string" table:style-name="ce7">
            <text:p>6.Financement</text:p>
          </table:table-cell>
          <table:table-cell office:value-type="string" table:style-name="ce7">
            <text:p><text:s/>5. Considérant, enfin, qu'il n'est pas établi que M. Garnier ait sous-évalué les frais postaux et téléphoniques afférents à sa campagne électorale; que les requérants ne sont donc pas fondés à demander la réintégration dans son compte de campagne, à ce titre, d'une somme dont ils ne fixent d'ailleurs pas le montant</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4\rejet\CONSTEXT000017666436_annot.xml</text:p>
          </table:table-cell>
          <table:table-cell office:value-type="string" table:style-name="ce7">
            <text:p>4.Campagne</text:p>
          </table:table-cell>
          <table:table-cell office:value-type="string" table:style-name="ce7">
            <text:p><text:s/>10. Considérant, en deuxième lieu, que si l'utilisation d'affiches comprenant une combinaison des trois couleurs bleu, blanc, rouge est prohibée par l'article R. 27 du code électoral, ni ce texte, ni aucune autre disposition n'édicte la même interdiction à l'égard des circulaires que les candidats adressent aux électeurs; que par suite M. Guegan ne peut utilement critiquer à cet égard la circulaire appelant à voter pour M. Paix; que la circulaire que ce dernier a fait parvenir aux électeurs en application de l'article R. 29 dudit code respectait, contrairement à ce que soutient le requérant, les dimensions définies par cette disposition; que le caractère uninominal du scrutin ne faisait pas obstacle à ce que la propagande du candidat élu comportât l'expression 'avec Dominique Baudis ', qui tendait seulement à faite état du soutien apporté à M. Paix par le député sortant</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4\rejet\CONSTEXT000017666436_annot.xml</text:p>
          </table:table-cell>
          <table:table-cell office:value-type="string" table:style-name="ce7">
            <text:p>7.Opérations</text:p>
          </table:table-cell>
          <table:table-cell office:value-type="string" table:style-name="ce7">
            <text:p><text:s/>12. Considérant, d'une part, qu'aucun texte législatif ou réglementaire ne prescrit la mise à disposition de bulletins blancs dans les bureaux de vote</text:p>
          </table:table-cell>
          <table:table-cell table:number-columns-repeated="16377" table:style-name="ce2"/>
        </table:table-row>
        <table:table-row table:style-name="ro1">
          <table:table-cell office:value-type="string" table:style-name="ce8">
            <text:p>Non</text:p>
          </table:table-cell>
          <table:table-cell office:value-type="string" table:style-name="ce7">
            <text:p>a annoté la conclusion générale<text:s/></text:p>
          </table:table-cell>
          <table:table-cell table:number-columns-repeated="2" table:style-name="ce7"/>
          <table:table-cell office:value-type="string" table:style-name="ce7">
            <text:p>file:\\\P:\CRJ\RECHERCHE\PROJET_JADE\JADE_COMMUN\Annotation\Annotation_automatique_Maritaud\Technologie_light\Super-catégories-objets_0,8\AN\1994\rejet\CONSTEXT000017666436_annot.xml</text:p>
          </table:table-cell>
          <table:table-cell office:value-type="string" table:style-name="ce7">
            <text:p>7.Opérations</text:p>
          </table:table-cell>
          <table:table-cell office:value-type="string" table:style-name="ce7">
            <text:p><text:s/>20. Considérant qu'il résulte de tout ce qui précède que les requêtes susvisées doivent être rejetées,</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4\rejet\CONSTEXT000017666436_annot.xml</text:p>
          </table:table-cell>
          <table:table-cell office:value-type="string" table:style-name="ce7">
            <text:p>6.Financement</text:p>
          </table:table-cell>
          <table:table-cell office:value-type="string" table:style-name="ce7">
            <text:p><text:s/>16. Considérant qu'en vertu de l'article L. 52-12 du code électoral, chaque candidat est tenu d'établir un compte de campagne retraçant l'ensemble des recettes et, selon leur nature, l'ensemble des dépenses engagées ou effectuées en vue de l'élection, par lui-même ou pour son compte</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5\rejet\CONSTEXT000017666611_annot.xml</text:p>
          </table:table-cell>
          <table:table-cell office:value-type="string" table:style-name="ce7">
            <text:p>7.Opérations</text:p>
          </table:table-cell>
          <table:table-cell office:value-type="string" table:style-name="ce7">
            <text:p><text:s/>5. Considérant que si plusieurs des procès-verbaux de bureaux de vote de la commune de Petit-Bourg ne sont pas revêtus de la signature de tous les membres desdits bureaux, en méconnaissance de l'article R. 67 du code électoral, il ne résulte pas non plus de l'instruction que de telles irrégularités aient porté atteinte à la liberté et à la sincérité du scrutin; Sur les griefs tirés des émargements</text:p>
          </table:table-cell>
          <table:table-cell table:number-columns-repeated="16377" table:style-name="ce2"/>
        </table:table-row>
        <table:table-row table:style-name="ro1">
          <table:table-cell office:value-type="string" table:style-name="ce8">
            <text:p>Non</text:p>
          </table:table-cell>
          <table:table-cell table:number-columns-repeated="2" table:style-name="ce7"/>
          <table:table-cell office:value-type="string" table:style-name="ce7">
            <text:p>1. Irrecevabilité<text:s/></text:p>
          </table:table-cell>
          <table:table-cell office:value-type="string" table:style-name="ce7">
            <text:p>file:\\\P:\CRJ\RECHERCHE\PROJET_JADE\JADE_COMMUN\Annotation\Annotation_automatique_Maritaud\Technologie_light\Super-catégories-objets_0,8\AN\1995\rejet\CONSTEXT000017666612_annot.xml</text:p>
          </table:table-cell>
          <table:table-cell office:value-type="string" table:style-name="ce7">
            <text:p>4.Campagne</text:p>
          </table:table-cell>
          <table:table-cell office:value-type="string" table:style-name="ce7">
            <text:p><text:s/>2. Considérant que ces dispositions font obstacle à ce qu'une association puisse contester une élection</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6\rejet\CONSTEXT000017666454_annot.xml</text:p>
          </table:table-cell>
          <table:table-cell office:value-type="string" table:style-name="ce7">
            <text:p>6.Financement</text:p>
          </table:table-cell>
          <table:table-cell office:value-type="string" table:style-name="ce7">
            <text:p><text:s/>5. Considérant qu'il n'est pas établi que les frais d'impression de divers documents de propagande électorale qui figurent dans le compte de campagne aient été sous-évalués ; que si la location d'une salle municipale pour la tenue de deux réunions organisées par M. Pajon à Noisy-le-Grand a été consentie à un tarif, inférieur au prix de revient, réservé habituellement aux associations noiséennes, il résulte de l'instruction que cette prestation a été offerte aux mêmes conditions aux autres candidats ; que dès lors le requérant n'est pas fondé à invoquer une rupture de l'égalité entre les candidats et à demander la réintégration, dans le compte de campagne, de sommes représentatives de compléments de loyer</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6\rejet\CONSTEXT000017666454_annot.xml</text:p>
          </table:table-cell>
          <table:table-cell office:value-type="string" table:style-name="ce7">
            <text:p>6.Financement</text:p>
          </table:table-cell>
          <table:table-cell office:value-type="string" table:style-name="ce7">
            <text:p><text:s/>6. Considérant qu'après les rectifications opérées par la Commission nationale des comptes de campagne et des financements politiques et qui ne sont pas contestées, le total des dépenses du compte de campagne de M. Pajon s'élève à la somme de 287 736 F, montant inférieur au plafond légal des dépenses</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04_annot.xml</text:p>
          </table:table-cell>
          <table:table-cell office:value-type="string" table:style-name="ce7">
            <text:p>6.Financement</text:p>
          </table:table-cell>
          <table:table-cell office:value-type="string" table:style-name="ce7">
            <text:p><text:s/>8. Considérant que c'est à bon droit que la Commission nationale des comptes de campagne et des financements politiques a réintégré dans les dépenses électorales de M. OUTIN, outre la somme de 5 000 francs susmentionnée, correspondant aux avantages en nature accordés par la commune de Firminy, la somme de 2 000 francs équivalant à la location d'une pièce mise à sa disposition par le parti politique lui ayant donné son investiture ; qu'il résulte de cette réintégration que le compte de campagne de M. OUTIN s'établit en dépenses au montant de 281 673 francs ; que, par suite, le plafond des dépenses électorales fixé pour la circonscription à 376 657 francs n'est pas dépassé ; SUR LES AUTRES GRIEFS</text:p>
          </table:table-cell>
          <table:table-cell table:number-columns-repeated="16377" table:style-name="ce2"/>
        </table:table-row>
        <table:table-row table:style-name="ro1">
          <table:table-cell office:value-type="string" table:style-name="ce8">
            <text:p>Non</text:p>
          </table:table-cell>
          <table:table-cell table:number-columns-repeated="2" table:style-name="ce7"/>
          <table:table-cell office:value-type="string" table:style-name="ce7">
            <text:p>7. Opérations</text:p>
          </table:table-cell>
          <table:table-cell office:value-type="string" table:style-name="ce7">
            <text:p>file:\\\P:\CRJ\RECHERCHE\PROJET_JADE\JADE_COMMUN\Annotation\Annotation_automatique_Maritaud\Technologie_light\Super-catégories-objets_0,8\AN\1997\rejet\CONSTEXT000017666006_annot.xml</text:p>
          </table:table-cell>
          <table:table-cell office:value-type="string" table:style-name="ce7">
            <text:p>4.Campagne</text:p>
          </table:table-cell>
          <table:table-cell office:value-type="string" table:style-name="ce7">
            <text:p><text:s/>2. Considérant, en deuxième lieu, que le grief tiré de ce que 136 émargements seraient irréguliers n'est assorti d'aucune précision permettant d'en apprécier le bien-fondé</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06_annot.xml</text:p>
          </table:table-cell>
          <table:table-cell office:value-type="string" table:style-name="ce7">
            <text:p>7.Opérations</text:p>
          </table:table-cell>
          <table:table-cell office:value-type="string" table:style-name="ce7">
            <text:p><text:s/>3. Considérant, en troisième lieu, que, si pendant un intervalle de temps au plus égal à une heure, les bulletins de vote de Monsieur LACHAUD ont été recouverts par ceux d'un des deux autres candidats dans le bureau de vote n° 601, cette irrégularité n'a pas été de nature à altérer la sincérité du scrutin, dès lors que les bulletins n'étaient pas indisponibles et que le président du bureau de vote a mis fin à cette anomalie dès qu'elle lui a été signalée ; que la circonstance que l'une des charnières de l'urne du bureau de vote n° 606 ait été mal fixée a été sans incidence en l'espèce, alors qu'il n'est ni établi ni même allégué que cette irrégularité a donné lieu à une fraude ou à une atteinte au secret du vote; qu'il n'est pas non plus établi que des bulletins nuls auraient été détruits par des présidents de bureaux de vote ; que si des enveloppes contenant des bulletins nuls, annexés au procès-verbal du bureau de vote n° 118, ne sont pas paraphées ou ne le sont que par un membre du bureau de vote, ce procès-verbal ne porte la mention d'aucune réclamation concernant la validité des votes déclarés nuls ; que cette irrégularité, pour regrettable qu'elle soit, est restée sans effet sur le résultat du scrutin</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07_annot.xml</text:p>
          </table:table-cell>
          <table:table-cell office:value-type="string" table:style-name="ce7">
            <text:p>4.Campagne</text:p>
          </table:table-cell>
          <table:table-cell office:value-type="string" table:style-name="ce7">
            <text:p><text:s/>1. Considérant, en premier lieu, que, si le requérant soutient que des affiches favorables à son adversaire ont été apposées en violation des dispositions du troisième alinéa de l'article L. 165 du code électoral, il résulte de l'instruction que cette irrégularité a revêtu un caractère limité</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07_annot.xml</text:p>
          </table:table-cell>
          <table:table-cell office:value-type="string" table:style-name="ce7">
            <text:p>4.Campagne</text:p>
          </table:table-cell>
          <table:table-cell office:value-type="string" table:style-name="ce7">
            <text:p><text:s/>2. Considérant, en deuxième lieu, que, si une publication dénommée 'Anti-Fada', qui comportait des imputations diffamatoires à l'encontre de M. ANDRE, a été diffusée au cours de la campagne, il résulte de l'instruction que la diffusion de ce document est demeurée limitée ; que rien ne permet d'établir un lien entre les adversaires de M. ANDRE et la publication en cause ; que, dans ces conditions, et eu égard à l'écart des voix entre les deux candidats arrivés en tête au second tour, la diffusion de ladite publication est restée sans effet sur l'issue du scrutin</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07_annot.xml</text:p>
          </table:table-cell>
          <table:table-cell office:value-type="string" table:style-name="ce7">
            <text:p>6.Financement</text:p>
          </table:table-cell>
          <table:table-cell office:value-type="string" table:style-name="ce7">
            <text:p><text:s/>11. Considérant qu'il résulte de l'instruction que le concours apporté à M. ANDRE par la commune de Beaucaire pour sa campagne électorale a consisté en l'utilisation épisodique d'un véhicule de fonction ; que le coût correspondant à l'usage de ce véhicule a été intégré dans le compte de campagne de l'intéressé ; qu'en raison de son montant et de sa nature, l'avantage ainsi consenti ne justifie pas, comme l'a estimé à bon droit la Commission nationale des comptes de campagne et des financements politiques, le rejet du compte de campagne de M. ANDRE ; que, par ailleurs, les coûts d'impression et de diffusion de documents liés à sa campagne électorale, dont il n'est pas soutenu qu'ils auraient été évalués à un montant inférieur aux prix habituellement pratiqués, ont été inscrits audit compte de campagne</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08_annot.xml</text:p>
          </table:table-cell>
          <table:table-cell office:value-type="string" table:style-name="ce7">
            <text:p>4.Campagne</text:p>
          </table:table-cell>
          <table:table-cell office:value-type="string" table:style-name="ce7">
            <text:p><text:s/>3. Considérant que M. LEMOINE, après avoir renoncé à publier un éditorial dans le numéro 184 du bulletin municipal qui devait normalement être diffusé le 26 mai 1997, a décidé de repousser la diffusion de cette publication après le second tour de scrutin</text:p>
          </table:table-cell>
          <table:table-cell table:number-columns-repeated="16377" table:style-name="ce2"/>
        </table:table-row>
        <table:table-row table:style-name="ro1">
          <table:table-cell office:value-type="string" table:style-name="ce8">
            <text:p>Non</text:p>
          </table:table-cell>
          <table:table-cell table:number-columns-repeated="2" table:style-name="ce7"/>
          <table:table-cell office:value-type="string" table:style-name="ce7">
            <text:p>4. Campagne et 6. Financement</text:p>
          </table:table-cell>
          <table:table-cell office:value-type="string" table:style-name="ce7">
            <text:p>file:\\\P:\CRJ\RECHERCHE\PROJET_JADE\JADE_COMMUN\Annotation\Annotation_automatique_Maritaud\Technologie_light\Super-catégories-objets_0,8\AN\1997\rejet\CONSTEXT000017666008_annot.xml</text:p>
          </table:table-cell>
          <table:table-cell office:value-type="string" table:style-name="ce7">
            <text:p>4.Campagne</text:p>
          </table:table-cell>
          <table:table-cell office:value-type="string" table:style-name="ce7">
            <text:p><text:s/>4. Considérant qu'il résulte de ce qui précède que le grief tiré de l'utilisation à des fins électorales des numéros 183 et 184 du bulletin municipal de la ville de Chartres doit être rejeté ; SUR LA DEMANDE DU REQUERANT DE VOIR PRIS EN COMPTE LE COUT DE LA REALISATION DES NUMEROS 182 ET 183 DU BULLETIN MUNICIPAL DE LA VILLE DE CHARTRES DANS LE COMPTE DE CAMPAGNE DE M. LEMOINE</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08_annot.xml</text:p>
          </table:table-cell>
          <table:table-cell office:value-type="string" table:style-name="ce7">
            <text:p>6.Financement</text:p>
          </table:table-cell>
          <table:table-cell office:value-type="string" table:style-name="ce7">
            <text:p><text:s/>5. Considérant que le premier alinéa de l'article L. 52-12 du code électoral dispose que 'chaque candidat ... soumis au plafonnement prévu à l'article L. 52-11 est tenu d'établir un compte de campagne retraçant, selon leur origine, l'ensemble des recettes perçues et, selon leur nature, l'ensemble des dépenses engagées ou effectuées en vue de l'élection...' ; qu'il s'ensuit que seules les dépenses engagées ou effectuées spécialement en vue de l'élection doivent figurer au compte de campagne</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11_annot.xml</text:p>
          </table:table-cell>
          <table:table-cell office:value-type="string" table:style-name="ce7">
            <text:p>4.Campagne</text:p>
          </table:table-cell>
          <table:table-cell office:value-type="string" table:style-name="ce7">
            <text:p><text:s/>1. Considérant en premier lieu que le grief tiré de la méconnaissance des dispositions de l'article R. 27 du code électoral, relatives à l'utilisation des couleurs bleu, blanc, rouge, manque en fait</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11_annot.xml</text:p>
          </table:table-cell>
          <table:table-cell office:value-type="string" table:style-name="ce7">
            <text:p>6.Financement</text:p>
          </table:table-cell>
          <table:table-cell office:value-type="string" table:style-name="ce7">
            <text:p><text:s/>3. Considérant enfin que Monsieur HOYEZ n'est pas fondé à soutenir que le coût de cette manifestation, qui ne présente pas un caractère électoral, aurait dû être inclus dans les dépenses électorales de Monsieur CABIDDU et que ce dernier aurait bénéficié, de la part du syndicat intercommunal, d'un avantage proscrit par les dispositions de l'article L. 52-8 du code électoral</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14_annot.xml</text:p>
          </table:table-cell>
          <table:table-cell office:value-type="string" table:style-name="ce7">
            <text:p>4.Campagne</text:p>
          </table:table-cell>
          <table:table-cell office:value-type="string" table:style-name="ce7">
            <text:p><text:s/>1. Considérant que les tracts et affichettes mettant en cause Monsieur THOMAS se bornaient à reproduire des articles de presse remontant à plus de vingt mois ; que leur origine est inconnue et qu'ils n'ont introduit aucun élément nouveau dans la polémique électorale ; que les autres actes de propagande mis en cause par le requérant n'ont ni revêtu un caractère massif, ni excédé les limites de la polémique électorale ; que, dans ces conditions, ces diffusions n'ont pu inverser le résultat du scrutin ; que, par suite, la requête doit être rejetée,</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15_annot.xml</text:p>
          </table:table-cell>
          <table:table-cell office:value-type="string" table:style-name="ce7">
            <text:p>6.Financement</text:p>
          </table:table-cell>
          <table:table-cell office:value-type="string" table:style-name="ce7">
            <text:p><text:s/>5. Considérant, enfin, que le grief tiré de ce que les dépenses engagées par le candidat soutenu par le Front national excéderaient le plafond fixé dans cette circonscription par les dispositions du troisième alinéa de l'article L. 52-11 du code électoral manque en fait,</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17_annot.xml</text:p>
          </table:table-cell>
          <table:table-cell office:value-type="string" table:style-name="ce7">
            <text:p>4.Campagne</text:p>
          </table:table-cell>
          <table:table-cell office:value-type="string" table:style-name="ce7">
            <text:p><text:s/>4. Considérant qu'au soutien de sa requête Monsieur GAYET affirme que le suppléant de Monsieur DELATTRE aurait, par des manoeuvres d'intimidation, contrarié la distribution d'un tract défavorable à celui-ci ; que néanmoins le requérant ne saurait se prévaloir, dans les circonstances de l'espèce, de ce que la diffusion irrégulière de ce tract n'ait pu être pleinement effectuée ; qu'il suit de là que le grief ne peut qu'être rejeté ; . En ce qui concerne le grief tiré de l'apposition d'une affichette</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24_annot.xml</text:p>
          </table:table-cell>
          <table:table-cell office:value-type="string" table:style-name="ce7">
            <text:p>6.Financement</text:p>
          </table:table-cell>
          <table:table-cell office:value-type="string" table:style-name="ce7">
            <text:p><text:s/>5. Considérant qu'il n'est pas établi que Monsieur MONTANÉ ait utilisé pour les besoins de sa campagne les services de fonctionnaires municipaux pendant leurs horaires de travail ; qu'il ne résulte pas de l'instruction qu'il ait omis de comptabiliser des dépenses engagées par sa suppléante ou sous-évalué le coût de fabrication et de distribution de ses documents de propagande ; que le montant total des dépenses engagées par Monsieur MONTANÉ n'excède pas le plafond fixé pour cette circonscription en application de l'article L. 52-11 du code électoral ; SUR LES OPERATIONS DE VOTE</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25_annot.xml</text:p>
          </table:table-cell>
          <table:table-cell office:value-type="string" table:style-name="ce7">
            <text:p>7.Opérations</text:p>
          </table:table-cell>
          <table:table-cell office:value-type="string" table:style-name="ce7">
            <text:p><text:s/>2. Considérant que, compte tenu du nombre important de suffrages qui lui ont fait défaut pour se maintenir au second tour, ainsi que du faible nombre de bulletins au nom de Monsieur SEGUR qui ont été comptés comme nuls dans les bureaux de vote où les feuilles de dépouillement ne mentionnaient que le nom patronymique du requérant, les faits allégués n'ont pu priver le requérant de la possibilité de se présenter au second tour, ni par suite affecter le résultat du scrutin</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26_annot.xml</text:p>
          </table:table-cell>
          <table:table-cell office:value-type="string" table:style-name="ce7">
            <text:p>4.Campagne</text:p>
          </table:table-cell>
          <table:table-cell office:value-type="string" table:style-name="ce7">
            <text:p><text:s/>2. Considérant, en deuxième lieu, que la circonstance qu'un slogan ait figuré sur les bulletins de la candidate soutenue par le Front National ne constitue pas, dans les circonstances de l'espèce, une manoeuvre de nature à altérer la sincérité du scrutin</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29_annot.xml</text:p>
          </table:table-cell>
          <table:table-cell office:value-type="string" table:style-name="ce7">
            <text:p>4.Campagne</text:p>
          </table:table-cell>
          <table:table-cell office:value-type="string" table:style-name="ce7">
            <text:p><text:s/>1. Considérant, en premier lieu, que l'apposition d'affiches du candidat élu sur la vitrine de sa permanence n'a pas été de nature à altérer le résultat du scrutin</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33_annot.xml</text:p>
          </table:table-cell>
          <table:table-cell office:value-type="string" table:style-name="ce7">
            <text:p>4.Campagne</text:p>
          </table:table-cell>
          <table:table-cell office:value-type="string" table:style-name="ce7">
            <text:p><text:s/>5. Considérant que l'absence de mention du nom et du domicile de l'imprimeur sur les documents électoraux établis au nom du candidat, quoique contraire à l'article 2 de la loi du 29 juillet 1881 sur la liberté de la presse, lequel est applicable à la propagande électorale en vertu de l'article L. 48 du code électoral, est demeurée sans influence sur la sincérité du scrutin ; SUR LES GRIEFS RELATIFS AUX CONDITIONS DANS LESQUELLES ONT ETE DIFFUSES DES TRACTS ELECTORAUX</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33_annot.xml</text:p>
          </table:table-cell>
          <table:table-cell office:value-type="string" table:style-name="ce7">
            <text:p>4.Campagne</text:p>
          </table:table-cell>
          <table:table-cell office:value-type="string" table:style-name="ce7">
            <text:p><text:s/>6. Considérant que, si M. HODEL fait grief au député élu d'avoir fait diffuser massivement, par la voie d'une entreprise de 'publi-portage', des documents électoraux, cette circonstance n'a pas été en l'espèce de nature à affecter la liberté et la sincérité du scrutin</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33_annot.xml</text:p>
          </table:table-cell>
          <table:table-cell office:value-type="string" table:style-name="ce7">
            <text:p>4.Campagne</text:p>
          </table:table-cell>
          <table:table-cell office:value-type="string" table:style-name="ce7">
            <text:p><text:s/>7. Considérant que, contrairement à ce que soutient M. HODEL, ce mode de distribution des tracts ne contrevient pas aux dispositions du premier alinéa de l'article L. 52-1 du code électoral, qui interdit l'utilisation à des fins de propagande électorale de tout procédé de publicité commerciale par la voie de la presse ou par tout moyen de communication audiovisuelle ; SUR LES AUTRES GRIEFS CONCERNANT LA CAMPAGNE ELECTORALE ET LE DEROULEMENT DU SCRUTIN</text:p>
          </table:table-cell>
          <table:table-cell table:number-columns-repeated="16377" table:style-name="ce2"/>
        </table:table-row>
        <table:table-row table:style-name="ro1">
          <table:table-cell office:value-type="string" table:style-name="ce8">
            <text:p>Non</text:p>
          </table:table-cell>
          <table:table-cell table:number-columns-repeated="2" table:style-name="ce7"/>
          <table:table-cell office:value-type="string" table:style-name="ce7">
            <text:p>3. Candidatures</text:p>
          </table:table-cell>
          <table:table-cell office:value-type="string" table:style-name="ce7">
            <text:p>file:\\\P:\CRJ\RECHERCHE\PROJET_JADE\JADE_COMMUN\Annotation\Annotation_automatique_Maritaud\Technologie_light\Super-catégories-objets_0,8\AN\1997\rejet\CONSTEXT000017666036_annot.xml</text:p>
          </table:table-cell>
          <table:table-cell office:value-type="string" table:style-name="ce7">
            <text:p>4.Campagne</text:p>
          </table:table-cell>
          <table:table-cell office:value-type="string" table:style-name="ce7">
            <text:p><text:s/>1. Considérant que le requérant fait valoir qu'à la date de son élection, M. TURINAY, député sous la précédente législature, n'avait pas produit la déclaration patrimoniale prévue par l'article L.O. 135-1 du code électoral</text:p>
          </table:table-cell>
          <table:table-cell table:number-columns-repeated="16377" table:style-name="ce2"/>
        </table:table-row>
        <table:table-row table:style-name="ro1">
          <table:table-cell office:value-type="string" table:style-name="ce8">
            <text:p>Non</text:p>
          </table:table-cell>
          <table:table-cell table:number-columns-repeated="2" table:style-name="ce7"/>
          <table:table-cell office:value-type="string" table:style-name="ce7">
            <text:p>5. Campagne : pressions et manœuvres</text:p>
          </table:table-cell>
          <table:table-cell office:value-type="string" table:style-name="ce7">
            <text:p>file:\\\P:\CRJ\RECHERCHE\PROJET_JADE\JADE_COMMUN\Annotation\Annotation_automatique_Maritaud\Technologie_light\Super-catégories-objets_0,8\AN\1997\rejet\CONSTEXT000017666036_annot.xml</text:p>
          </table:table-cell>
          <table:table-cell office:value-type="string" table:style-name="ce7">
            <text:p>4.Campagne</text:p>
          </table:table-cell>
          <table:table-cell office:value-type="string" table:style-name="ce7">
            <text:p><text:s/>3. Considérant que le requérant invoque l'effet qu'aurait eu, sur les électeurs de la commune de La Trinité, la diffusion d'un tract mettant en cause, en termes diffamatoires, le civisme et l'honnêteté de M. LORDINOT, candidat du groupement politique 'Renouveau', présent au second tour de scrutin, ainsi que les propos tenus sur ce tract par le candidat élu lors d'une émission télévisée le 28 mai 1997</text:p>
          </table:table-cell>
          <table:table-cell table:number-columns-repeated="16377" table:style-name="ce2"/>
        </table:table-row>
        <table:table-row table:style-name="ro1">
          <table:table-cell office:value-type="string" table:style-name="ce8">
            <text:p>Non</text:p>
          </table:table-cell>
          <table:table-cell table:number-columns-repeated="2" table:style-name="ce7"/>
          <table:table-cell office:value-type="string" table:style-name="ce7">
            <text:p>5. Campagne : pressions et manœuvres</text:p>
          </table:table-cell>
          <table:table-cell office:value-type="string" table:style-name="ce7">
            <text:p>file:\\\P:\CRJ\RECHERCHE\PROJET_JADE\JADE_COMMUN\Annotation\Annotation_automatique_Maritaud\Technologie_light\Super-catégories-objets_0,8\AN\1997\rejet\CONSTEXT000017666036_annot.xml</text:p>
          </table:table-cell>
          <table:table-cell office:value-type="string" table:style-name="ce7">
            <text:p>4.Campagne</text:p>
          </table:table-cell>
          <table:table-cell office:value-type="string" table:style-name="ce7">
            <text:p><text:s/>4. Considérant que, si le tract en cause comportait, à l'encontre de M. LORDINOT, des imputations excédant les limites de la polémique électorale, il résulte de l'instruction que son contenu avait été porté à la connaissance du public plusieurs semaines avant la campagne électorale ; qu'en l'espèce, le candidat a été en mesure d'y répondre utilement ; qu'au surplus, le caractère massif de la diffusion dudit tract n'est pas établi ; que son évocation, par des moyens de communication audiovisuelle, a été le fait tant de M. LORDINOT que du candidat élu</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36_annot.xml</text:p>
          </table:table-cell>
          <table:table-cell office:value-type="string" table:style-name="ce7">
            <text:p>7.Opérations</text:p>
          </table:table-cell>
          <table:table-cell office:value-type="string" table:style-name="ce7">
            <text:p><text:s/>11. Considérant que M. TURINAY a, en sa qualité de maire de Gros-Morne, la veille du scrutin, pressenti des électeurs pour compléter en tant que de besoin le sixième bureau de vote de cette commune ; que, ce faisant, il a pris les précautions nécessaires pour que l'ouverture du scrutin ne soit pas retardée faute d'électeur présent à l'ouverture du scrutin et volontaire pour être désigné comme assesseur ; qu'une telle pratique n'est pas irrégulière dès lors qu'elle n'a ni pour objet, ni pour effet de contrevenir aux dispositions de l'article R. 44 du code électoral relatives à la désignation des assesseurs des bureaux de vote, ce qui n'est au demeurant pas allégué en l'espèce ; SUR LE GRIEF TIRE DE LA REQUISITION, PAR LE CANDIDAT ELU, DES AUTOBUS DE LA COMMUNE DE GROS-MORNE LE JOUR DU SCRUTIN</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44_annot.xml</text:p>
          </table:table-cell>
          <table:table-cell office:value-type="string" table:style-name="ce7">
            <text:p>4.Campagne</text:p>
          </table:table-cell>
          <table:table-cell office:value-type="string" table:style-name="ce7">
            <text:p>: 1. Considérant que le requérant met en cause la publication, le 19 mai 1997, par l'hebdomadaire ' L'hebdo-Infos ', diffusé dans la seule île de Saint-Martin, d'une page, de teneur publicitaire, en faveur de la candidature de M. CHAULET ; qu'il résulte de l'instruction que cette publication s'est faite à la seule initiative du propriétaire du journal, sans l'accord de M. CHAULET, qui l'a d'ailleurs clairement désavouée dès le 21 mai 1997 ; que le requérant ne saurait dès lors utilement invoquer la méconnaissance des dispositions du premier alinéa de l'article L. 52-1 du code électoral qui prohibent, pendant les trois mois précédant le premier jour du mois d'une élection et jusqu'à la date du tour de scrutin où celle-ci est acquise, l'utilisation à des fins de propagande de tout procédé de publicité commerciale, notamment par la voie de la presse ; SUR LE GRIEF TIRE D'UNE CAMPAGNE RADIODIFFUSEE EN FAVEUR DES PRODUITS DE LA SOCIETE DONT LE CANDIDAT ELU EST LE GERANT</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044_annot.xml</text:p>
          </table:table-cell>
          <table:table-cell office:value-type="string" table:style-name="ce7">
            <text:p>4.Campagne</text:p>
          </table:table-cell>
          <table:table-cell office:value-type="string" table:style-name="ce7">
            <text:p>: 2. Considérant que le requérant soutient qu'une campagne de publicité radiodiffusée, qualifiée par lui de massive, en faveur des ' cafés Chaulet ', produits par la société ' Chaulet Frères ', dont le candidat élu est le gérant, aurait eu pour effet de renforcer significativement l'audience de celui-ci ; qu'aucune disposition du code électoral n'interdit à une entreprise, dont le nom comporte le patronyme d'un candidat, de se livrer à une campagne publicitaire tandis que se déroule une campagne électorale, dès lors qu'il n'y a pas confusion sur la portée du message ; qu'en l'espèce, il n'est pas allégué que les messages diffusés au cours de cette campagne auraient revêtu un contenu autre que la promotion des ' cafés Chaulet ' ; que, dès lors, il n'en pouvait résulter aucune confusion dans l'esprit des électeurs ; SUR LE GRIEF TIRE DE L'AIDE APPORTEE AU DEPUTE ELU PAR LA COMMUNE DE SAINT-MARTIN</text:p>
          </table:table-cell>
          <table:table-cell table:number-columns-repeated="16377" table:style-name="ce2"/>
        </table:table-row>
        <table:table-row table:style-name="ro1">
          <table:table-cell office:value-type="string" table:style-name="ce8">
            <text:p>Non</text:p>
          </table:table-cell>
          <table:table-cell table:number-columns-repeated="2" table:style-name="ce7"/>
          <table:table-cell office:value-type="string" table:style-name="ce7">
            <text:p>1. Procédure</text:p>
          </table:table-cell>
          <table:table-cell office:value-type="string" table:style-name="ce7">
            <text:p>file:\\\P:\CRJ\RECHERCHE\PROJET_JADE\JADE_COMMUN\Annotation\Annotation_automatique_Maritaud\Technologie_light\Super-catégories-objets_0,8\AN\1997\rejet\CONSTEXT000017666673_annot.xml</text:p>
          </table:table-cell>
          <table:table-cell office:value-type="string" table:style-name="ce7">
            <text:p>4.Campagne</text:p>
          </table:table-cell>
          <table:table-cell office:value-type="string" table:style-name="ce7">
            <text:p><text:s/>2. Considérant que la requête formée par M. Barbe a été enregistrée au secrétariat général du Conseil constitutionnel le 15 mai 1997, avant même le premier tour du scrutin ; que, dès lors, ladite requête est prématurée et par suite irrecevable,</text:p>
          </table:table-cell>
          <table:table-cell table:number-columns-repeated="16377" table:style-name="ce2"/>
        </table:table-row>
        <table:table-row table:style-name="ro1">
          <table:table-cell office:value-type="string" table:style-name="ce8">
            <text:p>Non</text:p>
          </table:table-cell>
          <table:table-cell table:number-columns-repeated="2" table:style-name="ce7"/>
          <table:table-cell office:value-type="string" table:style-name="ce7">
            <text:p>1. Procédure</text:p>
          </table:table-cell>
          <table:table-cell office:value-type="string" table:style-name="ce7">
            <text:p>file:\\\P:\CRJ\RECHERCHE\PROJET_JADE\JADE_COMMUN\Annotation\Annotation_automatique_Maritaud\Technologie_light\Super-catégories-objets_0,8\AN\1997\rejet\CONSTEXT000017666676_annot.xml</text:p>
          </table:table-cell>
          <table:table-cell office:value-type="string" table:style-name="ce7">
            <text:p>4.Campagne</text:p>
          </table:table-cell>
          <table:table-cell office:value-type="string" table:style-name="ce7">
            <text:p><text:s/>2. Considérant que la requête formée par M. Dray a été déposée à la préfecture du département le 24 mai 1997, avant même le premier tour du scrutin ; que, dès lors, ladite requête est prématurée et par suite irrecevable,</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684_annot.xml</text:p>
          </table:table-cell>
          <table:table-cell office:value-type="string" table:style-name="ce7">
            <text:p>7.Opérations</text:p>
          </table:table-cell>
          <table:table-cell office:value-type="string" table:style-name="ce7">
            <text:p><text:s/>4. Considérant qu'en l'espèce, les irrégularités commises dans les bureaux de vote de la commune de Pirae ne sont pas de nature à justifier l'annulation du scrutin, dès lors qu'il ne résulte pas de l'instruction qu'elles aient eu pour objet ou pour effet de permettre des fraudes dans le déroulement du scrutin</text:p>
          </table:table-cell>
          <table:table-cell table:number-columns-repeated="16377" table:style-name="ce2"/>
        </table:table-row>
        <table:table-row table:style-name="ro1">
          <table:table-cell office:value-type="string" table:style-name="ce8">
            <text:p>Non</text:p>
          </table:table-cell>
          <table:table-cell table:number-columns-repeated="2" table:style-name="ce7"/>
          <table:table-cell office:value-type="string" table:style-name="ce7">
            <text:p>1. Procédure</text:p>
          </table:table-cell>
          <table:table-cell office:value-type="string" table:style-name="ce7">
            <text:p>file:\\\P:\CRJ\RECHERCHE\PROJET_JADE\JADE_COMMUN\Annotation\Annotation_automatique_Maritaud\Technologie_light\Super-catégories-objets_0,8\AN\1997\rejet\CONSTEXT000017666733_annot.xml</text:p>
          </table:table-cell>
          <table:table-cell office:value-type="string" table:style-name="ce7">
            <text:p>4.Campagne</text:p>
          </table:table-cell>
          <table:table-cell office:value-type="string" table:style-name="ce7">
            <text:p><text:s/>1. Considérant que le désistement de M. Brumpt est pur et simple ; que rien ne s'oppose à ce qu'il lui en soit donné acte,</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736_annot.xml</text:p>
          </table:table-cell>
          <table:table-cell office:value-type="string" table:style-name="ce7">
            <text:p>7.Opérations</text:p>
          </table:table-cell>
          <table:table-cell office:value-type="string" table:style-name="ce7">
            <text:p><text:s/>9. Considérant que les faits allégués par M. ZAREMBSKI n'ont fait l'objet d'aucune mention au procès verbal des opérations de vote dans ce bureau ; qu'à supposer ces faits établis, il n'est pas soutenu que ces irrégularités auraient eu pour effet de modifier le décompte des voix ; que par suite la requête doit être rejetée,</text:p>
          </table:table-cell>
          <table:table-cell table:number-columns-repeated="16377" table:style-name="ce2"/>
        </table:table-row>
        <table:table-row table:style-name="ro1">
          <table:table-cell office:value-type="string" table:style-name="ce8">
            <text:p>Non</text:p>
          </table:table-cell>
          <table:table-cell table:number-columns-repeated="2" table:style-name="ce7"/>
          <table:table-cell office:value-type="string" table:style-name="ce7">
            <text:p>1. Procédure</text:p>
          </table:table-cell>
          <table:table-cell office:value-type="string" table:style-name="ce7">
            <text:p>file:\\\P:\CRJ\RECHERCHE\PROJET_JADE\JADE_COMMUN\Annotation\Annotation_automatique_Maritaud\Technologie_light\Super-catégories-objets_0,8\AN\1997\rejet\CONSTEXT000017666738_annot.xml</text:p>
          </table:table-cell>
          <table:table-cell office:value-type="string" table:style-name="ce7">
            <text:p>4.Campagne</text:p>
          </table:table-cell>
          <table:table-cell office:value-type="string" table:style-name="ce7">
            <text:p><text:s/>1. Considérant que le désistement de Mme Tysler Jegado est pur et simple ; que rien ne s'oppose à ce qu'il lui en soit donné acte,</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743_annot.xml</text:p>
          </table:table-cell>
          <table:table-cell office:value-type="string" table:style-name="ce7">
            <text:p>7.Opérations</text:p>
          </table:table-cell>
          <table:table-cell office:value-type="string" table:style-name="ce7">
            <text:p><text:s/>1. Considérant que la requête n'invoque que des irrégularités, au demeurant mineures, qui auraient été commises dans l'unique bureau de vote de la commune de Moragne, comptant deux cent soixante seize électeurs inscrits ; qu'eu égard à l'écart de voix entre les candidats, tant au premier qu'au second tour, les irrégularités alléguées par Monsieur MANDON n'ont pu, en tout état de cause, altérer la sincérité du scrutin ; que la requête doit être, par suite, rejetée,</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745_annot.xml</text:p>
          </table:table-cell>
          <table:table-cell office:value-type="string" table:style-name="ce7">
            <text:p>4.Campagne</text:p>
          </table:table-cell>
          <table:table-cell office:value-type="string" table:style-name="ce7">
            <text:p><text:s/>1. Considérant qu'aucune disposition législative ou réglementaire n'interdit les prises de position politiques de la presse écrite pendant la campagne électorale et que les articles contestés par le requérant relèvent du droit des organes de presse de rendre compte librement d'une campagne électorale</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796_annot.xml</text:p>
          </table:table-cell>
          <table:table-cell office:value-type="string" table:style-name="ce7">
            <text:p>4.Campagne</text:p>
          </table:table-cell>
          <table:table-cell office:value-type="string" table:style-name="ce7">
            <text:p><text:s/>2. Considérant en premier lieu qu'aux termes du premier alinéa de l'article L. 48 du code électoral 'sont applicables à la propagande les dispositions de la loi du 29 juillet 1881 sur la liberté de la presse, à l'exception de son article 16.'</text:p>
          </table:table-cell>
          <table:table-cell table:number-columns-repeated="16377" table:style-name="ce2"/>
        </table:table-row>
        <table:table-row table:style-name="ro1">
          <table:table-cell office:value-type="string" table:style-name="ce8">
            <text:p>Non</text:p>
          </table:table-cell>
          <table:table-cell office:value-type="string" table:style-name="ce7">
            <text:p>Problème de découpage d'information</text:p>
          </table:table-cell>
          <table:table-cell table:number-columns-repeated="2" table:style-name="ce7"/>
          <table:table-cell office:value-type="string" table:style-name="ce7">
            <text:p>file:\\\P:\CRJ\RECHERCHE\PROJET_JADE\JADE_COMMUN\Annotation\Annotation_automatique_Maritaud\Technologie_light\Super-catégories-objets_0,8\AN\1997\rejet\CONSTEXT000017666796_annot.xml</text:p>
          </table:table-cell>
          <table:table-cell office:value-type="string" table:style-name="ce7">
            <text:p>4.Campagne</text:p>
          </table:table-cell>
          <table:table-cell office:value-type="string" table:style-name="ce7">
            <text:p><text:s/>6. Considérant, toutefois, que cette irrégularité n'a pu avoir pour effet de priver le candidat en cause des nombreux suffrages qui lui ont manqué pour pouvoir se présenter au second tour de scrutin ; SUR LE GRIEF RELATIF AUX DIMENSIONS DE CERTAINS PANNEAUX D'AFFICHAGE</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03_annot.xml</text:p>
          </table:table-cell>
          <table:table-cell office:value-type="string" table:style-name="ce7">
            <text:p>7.Opérations</text:p>
          </table:table-cell>
          <table:table-cell office:value-type="string" table:style-name="ce7">
            <text:p><text:s/>4. Considérant qu'aucune disposition législative ou réglementaire ne prescrit la mise à disposition de bulletins blancs dans les bureaux de vote, ni ne permet de recenser de tels bulletins dans le décompte des suffrages exprimés</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04_annot.xml</text:p>
          </table:table-cell>
          <table:table-cell office:value-type="string" table:style-name="ce7">
            <text:p>4.Campagne</text:p>
          </table:table-cell>
          <table:table-cell office:value-type="string" table:style-name="ce7">
            <text:p><text:s/>2. Considérant, en premier lieu, que, si Madame PICHINOTY conteste la part réservée à la candidature de Madame GUIGOU par la presse écrite, cette dernière a le droit de rendre compte librement d'une campagne électorale</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04_annot.xml</text:p>
          </table:table-cell>
          <table:table-cell office:value-type="string" table:style-name="ce7">
            <text:p>4.Campagne</text:p>
          </table:table-cell>
          <table:table-cell office:value-type="string" table:style-name="ce7">
            <text:p><text:s/>3. Considérant, en deuxième lieu, que, si Monsieur de BOUGRENET de la TOCNAYE et Madame PICHINOTY formulent la même critique à l'égard des moyens de communication audiovisuelle, ils n'assortissent pas ce grief de précisions permettant d'en apprécier la portée</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04_annot.xml</text:p>
          </table:table-cell>
          <table:table-cell office:value-type="string" table:style-name="ce7">
            <text:p>4.Campagne</text:p>
          </table:table-cell>
          <table:table-cell office:value-type="string" table:style-name="ce7">
            <text:p><text:s/>6. Considérant qu'aucune des émissions contestées n'a été diffusée dans les jours précédant immédiatement le second tour de scrutin ; que, pour certaines de ces émissions, Madame GUIGOU est intervenue sur des thèmes de politique nationale, faisant peu de références à sa circonscription, sans éléments de propagande ni de polémique locales ; que si, en revanche, s'agissant des autres émissions contestées, Madame GUIGOU a été conduite à commenter directement les thèmes de la campagne électorale locale, d'une part l'une de ces émissions a été diffusée un mois avant le second tour et, d'autre part, ses interventions lors des autres émissions ont pu être équilibrées, soit par diverses appréciations critiques formulées au cours de l'émission, soit par l'invitation ultérieure de Madame ROIG sur la même antenne à la même heure d'écoute ; que, dès lors, dans les circonstances de l'espèce, la diffusion des émissions contestées par Madame ROIG ne peut être regardée comme constituant un traitement discriminatoire de nature à avoir altéré la sincérité des résultats du scrutin</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04_annot.xml</text:p>
          </table:table-cell>
          <table:table-cell office:value-type="string" table:style-name="ce7">
            <text:p>7.Opérations</text:p>
          </table:table-cell>
          <table:table-cell office:value-type="string" table:style-name="ce7">
            <text:p><text:s/>9. Considérant que, si Madame ROIG fait valoir en premier lieu que, dans l'un des bureaux de vote, la liste d'émargement n'a pas été signée par tous les assesseurs en méconnaissance des dispositions de l'article R.62 du code électoral, cette circonstance n'est pas, à elle seule, de nature à entacher d'irrégularité les suffrages émis dans ce bureau de vote</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04_annot.xml</text:p>
          </table:table-cell>
          <table:table-cell office:value-type="string" table:style-name="ce7">
            <text:p>7.Opérations</text:p>
          </table:table-cell>
          <table:table-cell office:value-type="string" table:style-name="ce7">
            <text:p><text:s/>11. Considérant qu'il résulte de l'instruction, et notamment de l'examen des listes d'émargement des bureaux de vote concernés, que les circonstances ainsi évoquées ne sont établies que pour un nombre total de suffrages inférieur à celui de l'excédent de voix obtenues par Madame GUIGOU par rapport à la candidate arrivée en seconde position; qu'elles ont été dès lors, en tout état de cause, sans influence sur le résultat du scrutin ; - SUR LE GRIEF RELATIF AU COMPTE DE CAMPAGNE DE MADAME GUIGOU</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04_annot.xml</text:p>
          </table:table-cell>
          <table:table-cell office:value-type="string" table:style-name="ce7">
            <text:p>6.Financement</text:p>
          </table:table-cell>
          <table:table-cell office:value-type="string" table:style-name="ce7">
            <text:p><text:s/>13. Considérant que Madame ROIG fait valoir que le coût des émissions de télévision et de radiodiffusion qui, selon elle, ont entraîné une rupture de l'égalité entre les deux candidates doit être intégré dans le compte de campagne de Madame GUIGOU, ce qui aurait pour conséquence un dépassement du plafond des dépenses électorales autorisé par l'article L. 52-11 du code électoral ; qu'il résulte toutefois de ce qui a été dit ci-dessus que ces émissions n'avaient pas le caractère d'émissions de propagande politique en faveur de Madame GUIGOU ; que, dès lors, il n'y a pas lieu d'intégrer dans le compte de campagne de celle-ci un avantage en nature correspondant</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04_annot.xml</text:p>
          </table:table-cell>
          <table:table-cell office:value-type="string" table:style-name="ce7">
            <text:p>6.Financement</text:p>
          </table:table-cell>
          <table:table-cell office:value-type="string" table:style-name="ce7">
            <text:p><text:s/>15. Considérant qu'aux termes de l'article L. 52-12 du code électoral : 'Chaque candidat ou candidat tête de liste soumis au plafonnement prévu à l'article L. 52-11 est tenu d'établir un compte de campagne retraçant, selon leur origine, l'ensemble des recettes perçues et, selon leur nature, l'ensemble des dépenses engagées ou effectuées en vue de l'élection, hors celles de la campagne officielle par lui-même ou pour son compte, au cours de la période mentionnée à l'article L. 52-4. Sont réputées faites pour son compte les dépenses exposées directement au profit du candidat et avec l'accord de celui-ci, par les personnes physiques qui lui apportent leur soutien, ainsi que par les partis et groupements politiques qui ont été créés en vue de lui apporter leur soutien ou qui lui apportent leur soutien. Le candidat estime et inclut, en recettes et en dépenses, les avantages directs et indirects, les prestations de services et dons en nature dont il a bénéficié. Le compte de campagne doit être en équilibre ou excédentaire et ne peut présenter un déficit'</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04_annot.xml</text:p>
          </table:table-cell>
          <table:table-cell office:value-type="string" table:style-name="ce7">
            <text:p>6.Financement</text:p>
          </table:table-cell>
          <table:table-cell office:value-type="string" table:style-name="ce7">
            <text:p><text:s/>17. Considérant que le compte de campagne de Madame ROIG a été déposé, conformément aux prescriptions du deuxième alinéa de l'article L. 52-12 du code électoral, dans le délai de deux mois suivant le tour de scrutin où l'élection a été acquise; que les dépenses déclarées, déduction faite de celles qui sont remboursées par l'Etat, s'établissaient à 368 413 F ; que par une décision en date du 21 octobre 1997, la commission nationale des comptes de campagne et des financements politiques a réformé le compte de l'intéressée en l'établissant en recettes à 399 214 F et en dépenses à 382 057 F, et en constatant qu'il en résulte un dépassement du plafond légal des dépenses fixé à 376 984 F ; . En ce qui concerne les réintégrations de dépenses effectuées par la commission nationale des comptes de campagne et des financements politiques</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04_annot.xml</text:p>
          </table:table-cell>
          <table:table-cell office:value-type="string" table:style-name="ce7">
            <text:p>6.Financement</text:p>
          </table:table-cell>
          <table:table-cell office:value-type="string" table:style-name="ce7">
            <text:p><text:s/>18. Considérant que le coût de l'impression du journal de campagne de Madame ROIG s'élevant à 20 116 F ainsi que celui, d'un montant de 522 F, correspondant à une distribution de boisson aux militants et sympathisants de sa permanence électorale doivent figurer dans les dépenses du compte de campagne de la candidate, comme l'a estimé la commission nationale des comptes de campagne et des financements politiques, et comme cela n'est d'ailleurs pas contesté par l'intéressée ; . En ce qui concerne les dépenses dont Madame GUIGOU soutient qu'elles doivent être réintégrées</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04_annot.xml</text:p>
          </table:table-cell>
          <table:table-cell office:value-type="string" table:style-name="ce7">
            <text:p>6.Financement</text:p>
          </table:table-cell>
          <table:table-cell office:value-type="string" table:style-name="ce7">
            <text:p><text:s/>21. Considérant, enfin, qu'il résulte de l'instruction que le coût de la diffusion des lettres de soutien à Madame ROIG évoqué par Madame GUIGOU a été inclus dans le compte de campagne de Madame ROIG ; . En ce qui concerne les dépenses dont Madame ROIG soutient qu'elles doivent être déduites</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04_annot.xml</text:p>
          </table:table-cell>
          <table:table-cell office:value-type="string" table:style-name="ce7">
            <text:p>6.Financement</text:p>
          </table:table-cell>
          <table:table-cell office:value-type="string" table:style-name="ce7">
            <text:p><text:s/>22. Considérant que Madame ROIG a inclus dans son compte de campagne une somme de 5 697 F correspondant à la distribution de repas à des militants les jours des deux tours de scrutin; que cette dépense n'ayant pas fait l'objet d'une réformation par la commission nationale des comptes de campagne et des financements politiques, celle-ci n'avait pas l'obligation de faire porter sur ce point la procédure contradictoire prévue par l'article L. 52-15 du code électoral; que cette dépense, qui constituait une dépense électorale au sens de l'article L. 52-12 du même code, devait figurer dans le compte de campagne</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04_annot.xml</text:p>
          </table:table-cell>
          <table:table-cell office:value-type="string" table:style-name="ce7">
            <text:p>6.Financement</text:p>
          </table:table-cell>
          <table:table-cell office:value-type="string" table:style-name="ce7">
            <text:p><text:s/>23. Considérant en revanche qu'il est constant qu'une somme de 10 803 F incluse par Madame ROIG dans les dépenses de son compte de campagne, correspond à des réunions électorales tenues à Paris et à Lyon; que cette dépense, qui n'a pas été exposée directement au profit de la candidate, doit être retranchée du compte de campagne de celle-ci</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04_annot.xml</text:p>
          </table:table-cell>
          <table:table-cell office:value-type="string" table:style-name="ce7">
            <text:p>6.Financement</text:p>
          </table:table-cell>
          <table:table-cell office:value-type="string" table:style-name="ce7">
            <text:p><text:s/>24. Considérant qu'il résulte de ce qui précède qu'après déduction de la somme de 10 803 F, le compte de campagne de Madame ROIG s'établit en dépenses à 371 254 F; que par suite le plafond des dépenses électorales fixé pour la circonscription à 376 984 F n'est pas dépassé</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07_annot.xml</text:p>
          </table:table-cell>
          <table:table-cell office:value-type="string" table:style-name="ce7">
            <text:p>4.Campagne</text:p>
          </table:table-cell>
          <table:table-cell office:value-type="string" table:style-name="ce7">
            <text:p><text:s/>1. Considérant en premier lieu qu' aux termes du premier alinéa de l'article L. 48 du code électoral ' sont applicables à la propagande les dispositions de la loi du 29 juillet 1881 sur la liberté de la presse, à l'exception de son article 16 »</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07_annot.xml</text:p>
          </table:table-cell>
          <table:table-cell office:value-type="string" table:style-name="ce7">
            <text:p>4.Campagne</text:p>
          </table:table-cell>
          <table:table-cell office:value-type="string" table:style-name="ce7">
            <text:p><text:s/>4. Considérant, par suite, qu'en refusant 'son agrément aux documents électoraux' fournis par Monsieur ORGET aux motifs 'que les termes utilisés constituent une incitation à la discrimination raciale et que l'utilisation du logo peut prêter à confusion avec celui de l'association ' Touche pas à mon pote » dans l'esprit des électeurs', les premiers faits étant prohibés par les dispositions de l'article 24 de la loi du 29 juillet 1881, la commission de propagande a manifestement outrepassé ses compétences</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08_annot.xml</text:p>
          </table:table-cell>
          <table:table-cell office:value-type="string" table:style-name="ce7">
            <text:p>7.Opérations</text:p>
          </table:table-cell>
          <table:table-cell office:value-type="string" table:style-name="ce7">
            <text:p><text:s/>6. Considérant que les incidents rapportés dans les procès-verbaux de deux bureaux ne sont pas de nature à avoir altéré la sincérité du scrutin; qu'il ne résulte pas de l'instruction qu'une électrice ait été admise au vote sans justifier de son identité</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08_annot.xml</text:p>
          </table:table-cell>
          <table:table-cell office:value-type="string" table:style-name="ce7">
            <text:p>6.Financement</text:p>
          </table:table-cell>
          <table:table-cell office:value-type="string" table:style-name="ce7">
            <text:p><text:s/>10. Considérant que, si un fonctionnaire employé par la mairie de Valence s'est indûment livré, pendant ses heures de service, à une activité militante au profit du parti socialiste, cette circonstance n'imposait pas en l'espèce à Mme RIVASI l'obligation de comprendre dans ses dépenses de campagne le montant de la rémunération correspondante, dès lors que ce concours était apporté à une formation politique et non à sa propre campagne ; que, si le requérant soutient que l'association, dont Mme RIVASI avait été la présidente avant de donner sa démission pour mener sa campagne électorale, aurait pris une part aux dépenses de cette campagne, il n'apporte aucun commencement de preuve à l'appui de ces allégations démenties tant par la candidate élue que par l'association; que c'est à bon droit que Mme RIVASI n'a pas inclus dans ses dépenses de campagne le coût d'un film documentaire, conçu et réalisé par une équipe de télévision indépendante qui avait pris pour objet notamment la campagne électorale de la candidate et qui ne l'a jamais diffusé ; qu'il ne résulte pas de l'instruction que Mme RIVASI aurait sous-estimé le coût de fabrication et de diffusion des divers moyens de propagande qu'elle a utilisés ; que, contrairement à ce que prétend le requérant, le montant des dépenses de campagne engagées par Mme RIVASI n'excède pas le plafond légal fixé dans la circonscription en application de l'article L. 52-11 du code électoral; qu'il suit de là que M. LABAUNE n'est pas fondé à demander que Mme RIVASI soit déclarée inéligible pour avoir dépassé le plafond légal des dépenses électorales ; - SUR LE COMPTE DE CAMPAGNE DE M. LABAUNE</text:p>
          </table:table-cell>
          <table:table-cell table:number-columns-repeated="16377" table:style-name="ce2"/>
        </table:table-row>
        <table:table-row table:style-name="ro1">
          <table:table-cell office:value-type="string" table:style-name="ce8">
            <text:p>Non</text:p>
          </table:table-cell>
          <table:table-cell table:number-columns-repeated="2" table:style-name="ce7"/>
          <table:table-cell office:value-type="string" table:style-name="ce7">
            <text:p>5. Campagne : pressions et manœuvres</text:p>
          </table:table-cell>
          <table:table-cell office:value-type="string" table:style-name="ce7">
            <text:p>file:\\\P:\CRJ\RECHERCHE\PROJET_JADE\JADE_COMMUN\Annotation\Annotation_automatique_Maritaud\Technologie_light\Super-catégories-objets_0,8\AN\1997\rejet\CONSTEXT000017666861_annot.xml</text:p>
          </table:table-cell>
          <table:table-cell office:value-type="string" table:style-name="ce7">
            <text:p>4.Campagne</text:p>
          </table:table-cell>
          <table:table-cell office:value-type="string" table:style-name="ce7">
            <text:p><text:s/>2. Considérant en deuxième lieu que Monsieur CHARTOIRE soutient que la diffusion peu avant le premier tour du scrutin, de deux lettres mettant en cause la probité de Monsieur SUAUD aurait privé celui-ci des suffrages lui permettant de prendre la deuxième place à ce tour ; que toutefois son caractère massif n'est pas établi ; qu'il résulte de l'instruction qu'il y a été répondu en temps utile ; qu'au surplus, Monsieur SUAUD, qui remplissait les conditions fixées par l'article L. 162 du code électoral, ne s'est pas maintenu au second tour ; que, dans ces conditions, le grief ne peut qu'être rejeté</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67_annot.xml</text:p>
          </table:table-cell>
          <table:table-cell office:value-type="string" table:style-name="ce7">
            <text:p>4.Campagne</text:p>
          </table:table-cell>
          <table:table-cell office:value-type="string" table:style-name="ce7">
            <text:p><text:s/>2. Considérant, en second lieu, que, conformément aux dispositions de l'article R. 103 du même code, d'une part, ces bulletins imprimés comportaient le nom du candidat et la mention 'suppléant ' suivie du nom du suppléant et, d'autre part, le nom de celui-ci y était imprimé en caractères de moindres dimensions que celui du candidat ; que la circonstance que le nom du suppléant ait été placé, sur la partie droite du bulletin, légèrement plus haut que le nom du candidat, situé sur la partie gauche, n'a pu créer aucune confusion dans l'esprit des électeurs</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67_annot.xml</text:p>
          </table:table-cell>
          <table:table-cell office:value-type="string" table:style-name="ce7">
            <text:p>4.Campagne</text:p>
          </table:table-cell>
          <table:table-cell office:value-type="string" table:style-name="ce7">
            <text:p><text:s/>3. Considérant, enfin, qu'aucune disposition n'impose que le nom d'un candidat ou d'un suppléant soit imprimé en caractères différents de ceux utilisés pour son prénom</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70_annot.xml</text:p>
          </table:table-cell>
          <table:table-cell office:value-type="string" table:style-name="ce7">
            <text:p>4.Campagne</text:p>
          </table:table-cell>
          <table:table-cell office:value-type="string" table:style-name="ce7">
            <text:p><text:s/>3. Considérant, d'une part, que la lettre du 5 mai 1997 comprenait, outre un exposé justifiant la reprise par la municipalité d'Antony des activités de l'association gérant ce centre culturel, une critique implicite de la candidature de Mme ANSQUER ; que toutefois les termes de cette critique ne dépassaient pas les limites admises de la polémique électorale ; qu'à la date à laquelle cette lettre a été diffusée, Mme ANSQUER a disposé du temps nécessaire pour y répondre ; que par ailleurs ladite lettre a été distribuée à un nombre limité d'électeurs ; qu'il s'ensuit que cette lettre n'a pu exercer d'influence déterminante sur les résultats du scrutin</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72_annot.xml</text:p>
          </table:table-cell>
          <table:table-cell office:value-type="string" table:style-name="ce7">
            <text:p>4.Campagne</text:p>
          </table:table-cell>
          <table:table-cell office:value-type="string" table:style-name="ce7">
            <text:p><text:s/>1. Considérant, en premier lieu, que, si la requérante conteste le fait que, sur son affiche électorale, Monsieur Yann GALUT figurait entouré de plusieurs autres personnes, aucune disposition du code électoral n'exige que les affiches d'un candidat le représentent seul</text:p>
          </table:table-cell>
          <table:table-cell table:number-columns-repeated="16377" table:style-name="ce2"/>
        </table:table-row>
        <table:table-row table:style-name="ro1">
          <table:table-cell office:value-type="string" table:style-name="ce8">
            <text:p>Non</text:p>
          </table:table-cell>
          <table:table-cell table:number-columns-repeated="2" table:style-name="ce7"/>
          <table:table-cell office:value-type="string" table:style-name="ce7">
            <text:p>3. Candidatures et 4. Campagne : propagande</text:p>
          </table:table-cell>
          <table:table-cell office:value-type="string" table:style-name="ce7">
            <text:p>file:\\\P:\CRJ\RECHERCHE\PROJET_JADE\JADE_COMMUN\Annotation\Annotation_automatique_Maritaud\Technologie_light\Super-catégories-objets_0,8\AN\1997\rejet\CONSTEXT000017666872_annot.xml</text:p>
          </table:table-cell>
          <table:table-cell office:value-type="string" table:style-name="ce7">
            <text:p>4.Campagne</text:p>
          </table:table-cell>
          <table:table-cell office:value-type="string" table:style-name="ce7">
            <text:p><text:s/>3. Considérant, en troisième lieu, que la circonstance que le candidat se réclamant de la droite indépendante ait figuré, sur son affiche électorale, aux côtés de Monsieur de VILLIERS n'est pas, en tout état de cause, contraire aux dispositions de l'article L. 156 du code électoral prohibant les candidatures multiples</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7\rejet\CONSTEXT000017666873_annot.xml</text:p>
          </table:table-cell>
          <table:table-cell office:value-type="string" table:style-name="ce7">
            <text:p>4.Campagne</text:p>
          </table:table-cell>
          <table:table-cell office:value-type="string" table:style-name="ce7">
            <text:p><text:s/>1. Considérant, en premier lieu, que la fiche d'informations comptables diffusée par le service télématique '3617 Verif', apposée sur les affiches de Monsieur MAZZORANA dans la nuit du mercredi 28 au jeudi 29 mai 1997, ainsi que les tracts diffusés les 30 et 31 mai par Monsieur LANDRAIN, n'ont pas excédé les limites de la polémique admise en période électorale; que Monsieur MAZZORANA a disposé d'un temps suffisant pour répondre utilement aux allégations contenues dans le premier de ces documents ; que les tracts diffusés les 30 et 31 mai, faisant état de ce que Monsieur MAZZORANA avait été le colistier de Monsieur TAPIE aux élections européennes de 1994, n'ont fait que reprendre un argument déjà évoqué pendant la campagne et répondaient à un tract diffusé par Monsieur MAZZORANA, également en contravention avec les dispositions du code électoral; qu'enfin le caractère massif de la distribution de ces tracts n'est pas établi</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8\rejet\CONSTEXT000017666091_annot.xml</text:p>
          </table:table-cell>
          <table:table-cell office:value-type="string" table:style-name="ce7">
            <text:p>7.Opérations</text:p>
          </table:table-cell>
          <table:table-cell office:value-type="string" table:style-name="ce7">
            <text:p><text:s/>16. Considérant qu'aux termes de l'article R. 55 du code électoral : 'Les bulletins de vote déposés par les candidats ou les listes, en application de l'article L. 58, ainsi que ceux adressés au maire par la commission de propagande sont placés dans chaque bureau, à la disposition des électeurs, sous la responsabilité du président du bureau de vote. Les candidats désirant faire assurer ce dépôt par le maire doivent lui remettre les bulletins au plus tard à midi, la veille du scrutin. Les bulletins peuvent être remis directement par les candidats ou par les listes au président du bureau' ; qu'il ne ressort pas des pièces du dossier que l'absence, lors du premier tour du scrutin, des bulletins de vote de certains candidats dans les bureaux de vote ait été imputable aux services de la mairie du cinquième arrondissement ou à la commission de propagande; qu'il résulte au contraire de l'instruction que les candidats en cause, M. RAQUIN et M. BRASILIER, ont omis de fournir à la date limite fixée par les dispositions précitées leurs bulletins de vote à la mairie ; que, par suite, celle-ci était dans l'impossibilité de procéder au dépôt de leurs bulletins dans les bureaux de vote</text:p>
          </table:table-cell>
          <table:table-cell table:number-columns-repeated="16377" table:style-name="ce2"/>
        </table:table-row>
        <table:table-row table:style-name="ro1">
          <table:table-cell office:value-type="string" table:style-name="ce8">
            <text:p>Non</text:p>
          </table:table-cell>
          <table:table-cell table:number-columns-repeated="2" table:style-name="ce7"/>
          <table:table-cell office:value-type="string" table:style-name="ce7">
            <text:p>5. Campagne : pressions et manœuvres</text:p>
          </table:table-cell>
          <table:table-cell office:value-type="string" table:style-name="ce7">
            <text:p>file:\\\P:\CRJ\RECHERCHE\PROJET_JADE\JADE_COMMUN\Annotation\Annotation_automatique_Maritaud\Technologie_light\Super-catégories-objets_0,8\AN\1998\rejet\CONSTEXT000017666091_annot.xml</text:p>
          </table:table-cell>
          <table:table-cell office:value-type="string" table:style-name="ce7">
            <text:p>7.Opérations</text:p>
          </table:table-cell>
          <table:table-cell office:value-type="string" table:style-name="ce7">
            <text:p><text:s/>18. Considérant que, s'il résulte de l'instruction que, lors du second tour du scrutin, l'un des électeurs du bureau de vote n° 9 du cinquième arrondissement a déclaré avoir subi des pressions de la part de collaborateurs du maire de cet arrondissement pour aller voter, un tel incident, qui n'est d'ailleurs pas mentionné au procès-verbal et qui concerne un électeur qui n'a pas pris part au vote, est resté isolé ; que la preuve de l'exercice d'autres pressions sur les électeurs le jour du scrutin n'est pas apportée par la requérante</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8\rejet\CONSTEXT000017666091_annot.xml</text:p>
          </table:table-cell>
          <table:table-cell office:value-type="string" table:style-name="ce7">
            <text:p>7.Opérations</text:p>
          </table:table-cell>
          <table:table-cell office:value-type="string" table:style-name="ce7">
            <text:p><text:s/>19. Considérant qu'aux termes de l'article L. 65 du code électoral : ' Dès la clôture du scrutin, il est procédé au dénombrement des émargements. Ensuite le dépouillement se déroule de la manière suivante : l'urne est ouverte et le nombre des enveloppes est vérifié... Les enveloppes contenant les bulletins sont regroupées par paquets de 100. Ces paquets sont introduits dans des enveloppes spécialement réservées à cet effet. Dès l'introduction d'un paquet de 100 bulletins, l'enveloppe est cachetée et y sont apposées les signatures du président du bureau de vote et d'au moins deux assesseurs représentant, sauf liste ou candidat unique, des listes ou des candidats différents » ; qu'il ressort de l'examen du procès-verbal du bureau de vote n° 21 du sixième arrondissement que ces prescriptions n'y ont pas été respectées ; qu'en particulier, le décompte des émargements et le décompte des bulletins ont été effectués simultanément ; que, toutefois, cette irrégularité est sans incidence sur la sincérité du scrutin, dès lors qu'il n'est pas établi qu'elle aurait eu pour effet de favoriser des fraudes ou des erreurs de calcul ; que, s'il est allégué que, dans ce bureau de vote, la liste d'émargements comporte, en marge du nom d'un même électeur, des signatures présentant des différences qui établiraient que le vote n'a pas été effectué par la même personne aux deux tours du scrutin, il résulte de l'examen de la liste que les différences alléguées ne sont pas probantes</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8\rejet\CONSTEXT000017666091_annot.xml</text:p>
          </table:table-cell>
          <table:table-cell office:value-type="string" table:style-name="ce7">
            <text:p>7.Opérations</text:p>
          </table:table-cell>
          <table:table-cell office:value-type="string" table:style-name="ce7">
            <text:p><text:s/>20. Considérant que le grief tiré de ce que des irrégularités analogues dans les émargements auraient été commises dans d'autres bureaux de vote n'est pas étayé par les pièces du dossier ; qu'au demeurant, aucune réclamation relative aux conditions d'émargement des électeurs n'a été portée sur les procès-verbaux des bureaux de vote en cause ; qu'il n'est pas non plus établi que, dans certains bureaux de vote, des personnes auraient pu voter sans présenter une pièce d'identité, ni que des personnes auraient accompagné dans l'isoloir des électeurs âgés, ni que certains présidents de bureaux de vote se seraient opposés à des inscriptions au procès-verbal</text:p>
          </table:table-cell>
          <table:table-cell table:number-columns-repeated="16377" table:style-name="ce2"/>
        </table:table-row>
        <table:table-row table:style-name="ro1">
          <table:table-cell office:value-type="string" table:style-name="ce8">
            <text:p>Non</text:p>
          </table:table-cell>
          <table:table-cell table:number-columns-repeated="2" table:style-name="ce7"/>
          <table:table-cell office:value-type="string" table:style-name="ce7">
            <text:p>1. Procédure</text:p>
          </table:table-cell>
          <table:table-cell office:value-type="string" table:style-name="ce7">
            <text:p>file:\\\P:\CRJ\RECHERCHE\PROJET_JADE\JADE_COMMUN\Annotation\Annotation_automatique_Maritaud\Technologie_light\Super-catégories-objets_0,8\AN\1998\rejet\CONSTEXT000017666091_annot.xml</text:p>
          </table:table-cell>
          <table:table-cell office:value-type="string" table:style-name="ce7">
            <text:p>7.Opérations</text:p>
          </table:table-cell>
          <table:table-cell office:value-type="string" table:style-name="ce7">
            <text:p><text:s/>28. Considérant qu'il résulte de ce qui précède, et sans qu'il soit besoin de procéder à l'audition demandée, que les requêtes doivent être rejetées ;</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8\rejet\CONSTEXT000017666091_annot.xml</text:p>
          </table:table-cell>
          <table:table-cell office:value-type="string" table:style-name="ce7">
            <text:p>6.Financement</text:p>
          </table:table-cell>
          <table:table-cell office:value-type="string" table:style-name="ce7">
            <text:p><text:s/>22. Considérant qu'aux termes de l'article L. 52-8 du code électoral : ' Les dons consentis par une personne physique dûment identifiée pour le financement de la campagne d'un ou plusieurs candidats lors des mêmes élections ne peuvent excéder 30.000 F. Les personnes morales, à l'exception des partis ou groupements politiques, ne peuvent participer au financement de la campagne électorale d'un candidat, ni en lui consentant des dons sous quelque forme que ce soit, ni en lui fournissant des biens, services ou autres avantages directs ou indirects à des prix inférieurs à ceux qui sont habituellement pratiqués. Tout don de plus de 1.000 F consenti à un candidat en vue de sa campagne doit être versé par chèque» ; qu'aux termes de l'article L. 52-12 du même code : »Chaque candidat ou candidat tête de liste soumis au plafonnement prévu à l'article L. 52-11 est tenu d'établir un compte de campagne retraçant, selon leur origine, l'ensemble des recettes perçues et, selon leur nature, l'ensemble des dépenses engagées ou effectuées en vue de l'élection, hors celle de la campagne officielle, par lui-même ou pour son compte, au cours de la période mentionnée à l'article L. 52-4. Sont réputées faites pour son compte les dépenses exposées directement au profit du candidat et avec l'accord de celui-ci, par les partis et groupements politiques qui ont été créés en vue de lui apporter leur soutien ou qui lui apportent leur soutien. Le candidat estime et inclut, en recettes et en dépenses, les avantages directs ou indirects, les prestations de services et dons en nature dont il a bénéficié. Le compte de campagne doit être en équilibre ou excédentaire et ne peut présenter un déficit »; . En ce qui concerne le compte de campagne de M. TIBERI</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8\rejet\CONSTEXT000017666091_annot.xml</text:p>
          </table:table-cell>
          <table:table-cell office:value-type="string" table:style-name="ce7">
            <text:p>6.Financement</text:p>
          </table:table-cell>
          <table:table-cell office:value-type="string" table:style-name="ce7">
            <text:p><text:s/>23. Considérant que, si Mme COHEN-SOLAL fait valoir que ne figurent pas dans le compte de Monsieur TIBERI, des dépenses relatives aux réunions, réceptions et déplacements intervenus dans le cadre de sa campagne, elle n'apporte aucune précision quant à l'émission de ces dépenses ; que, contrairement à ce qui est allégué, la dépense engagée par le candidat pour mobiliser les électeurs qui s'étaient abstenus au premier tour n'a pas été sous-évaluée ; que des factures téléphoniques d'un montant de 13.809 F ont été réglées par le candidat ; que, par suite, il n'y a pas lieu de modifier le montant des dépenses de campagne de M. TIBERI tel qu'il a été fixé par la Commission nationale des comptes de campagne et des financements politiques ; . En ce qui concerne le compte de Mme COHEN-SOLAL</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8\rejet\CONSTEXT000017666091_annot.xml</text:p>
          </table:table-cell>
          <table:table-cell office:value-type="string" table:style-name="ce7">
            <text:p>6.Financement</text:p>
          </table:table-cell>
          <table:table-cell office:value-type="string" table:style-name="ce7">
            <text:p><text:s/>25. Considérant que, si Mme COHEN-SOLAL, pour acquitter les dépenses engagées pour sa campagne électorale, a contracté un emprunt bancaire d'un montant de 170.000 F, dont le remboursement est prévu au 31 décembre 1998, elle n'a pas, ce faisant, eu égard aux garanties présentées par un emprunt auprès d'un établissement bancaire, mis le juge de l'élection dans l'impossibilité de s'assurer du respect de la législation sur le financement des campagnes électorales, laquelle impose, en particulier, que la somme correspondant au montant de l'emprunt sera effectivement acquittée par la candidate et non par un tiers</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8\rejet\CONSTEXT000017666092_annot.xml</text:p>
          </table:table-cell>
          <table:table-cell office:value-type="string" table:style-name="ce7">
            <text:p>4.Campagne</text:p>
          </table:table-cell>
          <table:table-cell office:value-type="string" table:style-name="ce7">
            <text:p><text:s/>6. Considérant que la commission de propagande a refusé de distribuer les circulaires de M. CONTASSOT pour le premier tour de scrutin au motif que ces documents excédaient les dimensions maximales fixées par l'article R. 29 du code électoral ; que le requérant ne conteste pas que les documents en cause ne respectaient pas le format prescrit; qu'il n'est pas fondé à soutenir qu'il aurait fait l'objet d'une inégalité de traitement du seul fait que la commission de propagande n'a pas été en mesure de relever que d'autres documents présentaient des défauts analogues</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8\rejet\CONSTEXT000017666092_annot.xml</text:p>
          </table:table-cell>
          <table:table-cell office:value-type="string" table:style-name="ce7">
            <text:p>7.Opérations</text:p>
          </table:table-cell>
          <table:table-cell office:value-type="string" table:style-name="ce7">
            <text:p><text:s/>10. Considérant que des bureaux de vote ont été présidés par des électeurs sans que l'empêchement de tous les conseillers de Paris ait été justifié ; qu'ainsi, les dispositions de l'article R. 43 du code électoral ont été méconnues ; que, si Mme BERTINOTTI soutient que cette irrégularité a eu pour objet de porter atteinte à la liberté et à la sincérité du scrutin, elle n'apporte aucun élément de preuve à l'appui de ses allégations</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8\rejet\CONSTEXT000017666092_annot.xml</text:p>
          </table:table-cell>
          <table:table-cell office:value-type="string" table:style-name="ce7">
            <text:p>6.Financement</text:p>
          </table:table-cell>
          <table:table-cell office:value-type="string" table:style-name="ce7">
            <text:p><text:s/>13. Considérant que, contrairement à ce que soutiennent Mme BERTINOTTI et M. FINKELSZTAJN, il ne résulte pas de l'instruction que le compte de campagne déposé par M. DOMINATI et approuvé par la commission nationale des comptes de campagne et des financements politiques ne retracerait pas la totalité des dépenses engagées en vue de l'élection ou sous-estimerait le coût de certaines prestations de telle sorte que le montant réel des dépenses excéderait le plafond légal applicable dans la circonscription ; que le fait qu'une société a consenti au candidat des ' remises exceptionnelles ', conformes aux usages dans cette profession, ne peut être regardé comme une violation des dispositions de l'article L. 52-8 ; que, dès lors, les conclusions tendant à ce que M. DOMINATI soit déclaré inéligible pendant un an doivent être rejetées ; - SUR LES CONCLUSIONS TENDANT AU REMBOURSEMENT DE FRAIS</text:p>
          </table:table-cell>
          <table:table-cell table:number-columns-repeated="16377" table:style-name="ce2"/>
        </table:table-row>
        <table:table-row table:style-name="ro1">
          <table:table-cell office:value-type="string" table:style-name="ce8">
            <text:p>Non</text:p>
          </table:table-cell>
          <table:table-cell office:value-type="string" table:style-name="ce7">
            <text:p>Mauvais découpage</text:p>
          </table:table-cell>
          <table:table-cell table:number-columns-repeated="2" table:style-name="ce7"/>
          <table:table-cell office:value-type="string" table:style-name="ce7">
            <text:p>file:\\\P:\CRJ\RECHERCHE\PROJET_JADE\JADE_COMMUN\Annotation\Annotation_automatique_Maritaud\Technologie_light\Super-catégories-objets_0,8\AN\1998\rejet\CONSTEXT000017666093_annot.xml</text:p>
          </table:table-cell>
          <table:table-cell office:value-type="string" table:style-name="ce7">
            <text:p>4.Campagne</text:p>
          </table:table-cell>
          <table:table-cell office:value-type="string" table:style-name="ce7">
            <text:p><text:s/>7. Considérant que la circonstance qu'une affiche de M. FRUTEAU placée sur un panneau officiel ait été lacérée est restée sans incidence sur les résultats du scrutin ; SUR LES GRIEFS TIRES DE LA MECONNAISSANCE DES DISPOSITIONS DU CODE ELECTORAL RELATIVES AU FINANCEMENT DES CAMPAGNES ELECTORALES</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8\rejet\CONSTEXT000017666094_annot.xml</text:p>
          </table:table-cell>
          <table:table-cell office:value-type="string" table:style-name="ce7">
            <text:p>4.Campagne</text:p>
          </table:table-cell>
          <table:table-cell office:value-type="string" table:style-name="ce7">
            <text:p><text:s/>3. Considérant que la circonstance que M. HOARAU ait fait procédé à des affichages en dehors des panneaux officiels n'a pas été en l'espèce de nature à fausser les résultats du scrutin</text:p>
          </table:table-cell>
          <table:table-cell table:number-columns-repeated="16377" table:style-name="ce2"/>
        </table:table-row>
        <table:table-row table:style-name="ro1">
          <table:table-cell office:value-type="string" table:style-name="ce7">
            <text:p>Oui</text:p>
          </table:table-cell>
          <table:table-cell table:number-columns-repeated="3" table:style-name="ce7"/>
          <table:table-cell office:value-type="string" table:style-name="ce7">
            <text:p>file:\\\P:\CRJ\RECHERCHE\PROJET_JADE\JADE_COMMUN\Annotation\Annotation_automatique_Maritaud\Technologie_light\Super-catégories-objets_0,8\AN\1998\rejet\CONSTEXT000017666094_annot.xml</text:p>
          </table:table-cell>
          <table:table-cell office:value-type="string" table:style-name="ce7">
            <text:p>7.Opérations</text:p>
          </table:table-cell>
          <table:table-cell office:value-type="string" table:style-name="ce7">
            <text:p><text:s/>5. Considérant que la circonstance que 20 000 bulletins au nom du requérant auraient disparu peu avant le scrutin est restée sans incidence sur l'élection, dès lors qu'une nouvelle impression de bulletins a permis de fournir en nombre suffisant et en temps voulu les bureaux de vote</text:p>
          </table:table-cell>
          <table:table-cell table:number-columns-repeated="16377" table:style-name="ce2"/>
        </table:table-row>
        <table:table-row table:style-name="ro1">
          <table:table-cell office:value-type="string" table:style-name="ce7">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1998\rejet\CONSTEXT000017666095_annot.xml</text:p>
          </table:table-cell>
          <table:table-cell office:value-type="string" table:style-name="ce3">
            <text:p>4.Campagne</text:p>
          </table:table-cell>
          <table:table-cell office:value-type="string" table:style-name="ce3">
            <text:p><text:s/>5. Considérant qu'aux termes du premier alinéa de l'article L. 49 du code électoral : 'Il est interdit de distribuer ou de faire distribuer, le jour du scrutin, des bulletins, circulaires et autres documents' ; que l'article L. 165 du même code prohibe, en son troisième alinéa, l'impression et l'utilisation, sous quelque forme que ce soit, de toute circulaire, affiche ou bulletin et de tout tract autres que les circulaires, affiches et bulletins de vote constituant les documents de propagande électorale mentionnés au premier alinéa du même artic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095_annot.xml</text:p>
          </table:table-cell>
          <table:table-cell office:value-type="string" table:style-name="ce3">
            <text:p>4.Campagne</text:p>
          </table:table-cell>
          <table:table-cell office:value-type="string" table:style-name="ce3">
            <text:p><text:s/>7. Considérant, en premier lieu, que, s'il n'est pas contesté que ce document a été distribué dans la journée du 31 mai 1997, M. OURY n'établit pas que cette distribution se soit poursuivie au delà de 0 heure le 1er juin ; qu'ainsi les dispositions du premier alinéa de l'article L. 49 du code électoral n'ont pas été méconnu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095_annot.xml</text:p>
          </table:table-cell>
          <table:table-cell office:value-type="string" table:style-name="ce3">
            <text:p>4.Campagne</text:p>
          </table:table-cell>
          <table:table-cell office:value-type="string" table:style-name="ce3">
            <text:p><text:s/>8. Considérant, en second lieu, que, si le tract diffusé par les partisans de M. HEUCLIN a méconnu les dispositions susmentionnées de l'article L. 165 du code électoral, cette diffusion a été faite en réponse à un tract signé du requérant mettant gravement en cause M. HEUCLIN ; que le contenu de cette réponse n'excédait pas les limites admises de la propagande électorale ; qu'en tout état de cause, la presse locale avait largement commenté ces incidents ; qu'ainsi, la diffusion de ce tract n'a pu exercer d'influence déterminante sur les résultats de la consultation. SUR LES CONCLUSIONS DES REQUETES N° 97-2216 ET 97-2245 RELATIVES AU REFUS DE LA COMMISSION DE PROPAGANDE D'ACHEMINER LES PROFESSIONS DE FOI DE M. FEDOROWSKY ET LES BULLETINS DE VOTE DE M. COLLETTE</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1998\rejet\CONSTEXT000017666095_annot.xml</text:p>
          </table:table-cell>
          <table:table-cell office:value-type="string" table:style-name="ce3">
            <text:p>7.Opérations</text:p>
          </table:table-cell>
          <table:table-cell office:value-type="string" table:style-name="ce3">
            <text:p><text:s/>15. Considérant qu'il résulte de tout ce qui précède que les requêtes de MM. GUILLET, OURY, FEDOROWSKY et COLLETTE doivent être rejetées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096_annot.xml</text:p>
          </table:table-cell>
          <table:table-cell office:value-type="string" table:style-name="ce3">
            <text:p>4.Campagne</text:p>
          </table:table-cell>
          <table:table-cell office:value-type="string" table:style-name="ce3">
            <text:p><text:s/>3. Considérant que la presse écrite est libre de relater la campagne électorale comme elle l'entend</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096_annot.xml</text:p>
          </table:table-cell>
          <table:table-cell office:value-type="string" table:style-name="ce3">
            <text:p>4.Campagne</text:p>
          </table:table-cell>
          <table:table-cell office:value-type="string" table:style-name="ce3">
            <text:p><text:s/>4. Considérant que si Mme LE PEN se plaint de ce que le maire de Mantes-la-Jolie aurait refusé de lui prêter une salle municipale, elle n'allègue pas qu'il ait traité différemment les autres candidats ; que ce refus est dès lors sans influence sur la régula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096_annot.xml</text:p>
          </table:table-cell>
          <table:table-cell office:value-type="string" table:style-name="ce3">
            <text:p>6.Financement</text:p>
          </table:table-cell>
          <table:table-cell office:value-type="string" table:style-name="ce3">
            <text:p><text:s/>9. Considérant que, si Mme PEULVAST-BERGEAL a utilisé une salle appartenant à la commune de Mantes-la-Ville, dont elle est maire, sans en faire figurer le coût dans son compte de campagne, cet avantage n'est ni une dépense de campagne, ni un avantage en nature reçu d'une personne morale, dès lors que les autres candidats n'ont pas été empêchés d'en bénéficier</text:p>
          </table:table-cell>
          <table:table-cell table:number-columns-repeated="16377"/>
        </table:table-row>
        <table:table-row table:style-name="ro1">
          <table:table-cell office:value-type="string" table:style-name="ce7">
            <text:p>Non </text:p>
          </table:table-cell>
          <table:table-cell table:number-columns-repeated="2" table:style-name="ce3"/>
          <table:table-cell office:value-type="string" table:style-name="ce3">
            <text:p>1. procédure<text:s/></text:p>
          </table:table-cell>
          <table:table-cell office:value-type="string" table:style-name="ce3">
            <text:p>file:\\\P:\CRJ\RECHERCHE\PROJET_JADE\JADE_COMMUN\Annotation\Annotation_automatique_Maritaud\Technologie_light\Super-catégories-objets_0,8\AN\1998\rejet\CONSTEXT000017666096_annot.xml</text:p>
          </table:table-cell>
          <table:table-cell office:value-type="string" table:style-name="ce3">
            <text:p>7.Opérations</text:p>
          </table:table-cell>
          <table:table-cell office:value-type="string" table:style-name="ce3">
            <text:p><text:s/>11. Considérant qu'il résulte de tout ce qui précède, sans qu'il soit besoin de procéder à l'audition demandée par Mme PEULVAST-BERGEAL, que les requêtes susvisées doivent être rejeté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098_annot.xml</text:p>
          </table:table-cell>
          <table:table-cell office:value-type="string" table:style-name="ce3">
            <text:p>4.Campagne</text:p>
          </table:table-cell>
          <table:table-cell office:value-type="string" table:style-name="ce3">
            <text:p><text:s/>1. Considérant que, si M. PLANCHOU soutient que M. COVA a fait procéder à un affichage irrégulier et présente à l'appui de ses affirmations un constat d'huissier, il résulte des pièces produites que l'affichage contesté n'a pas présenté de caractère massif ; que l'irrégularité invoquée est restée sans effet sur le résultat du scrutin ; - SUR LES GRIEFS TIRES DE LA DIFFUSION IRREGULIERE DE TRACTS ET AUTRES DOCUMENT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098_annot.xml</text:p>
          </table:table-cell>
          <table:table-cell office:value-type="string" table:style-name="ce3">
            <text:p>4.Campagne</text:p>
          </table:table-cell>
          <table:table-cell office:value-type="string" table:style-name="ce3">
            <text:p><text:s/>2. Considérant que la diffusion de tracts pendant la campagne électorale du premier tour, en méconnaissance des dispositions de l'article L. 165 du code électoral, n'a pas, eu égard à leur contenu, exercé d'influence sur le second tour auquel le requérant a d'ailleurs pu se présenter ; que, si certains de ces documents ont fait l'objet d'une nouvelle diffusion entre les deux tours, leur contenu n'excède pas les limites de la polémique électora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098_annot.xml</text:p>
          </table:table-cell>
          <table:table-cell office:value-type="string" table:style-name="ce3">
            <text:p>6.Financement</text:p>
          </table:table-cell>
          <table:table-cell office:value-type="string" table:style-name="ce3">
            <text:p><text:s/>12. Considérant que le compte de campagne de M. COVA a été déposé, conformément aux prescriptions du deuxième alinéa de l'article L. 52-12 du code électoral, dans le délai de deux mois suivant le tour de scrutin où l'élection a été acquise ; qu'il résulte de l'instruction que c'est à bon droit que, par la décision susvisée du 9 septembre 1997, la Commission nationale des comptes de campagne et des financements politiques a approuvé, après réformation, le compte de l'intéress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099_annot.xml</text:p>
          </table:table-cell>
          <table:table-cell office:value-type="string" table:style-name="ce3">
            <text:p>6.Financement</text:p>
          </table:table-cell>
          <table:table-cell office:value-type="string" table:style-name="ce3">
            <text:p><text:s/>1. Considérant que le contenu des bulletins municipaux diffusés en mars et avril 1997 par la commune de l'Haÿ-les -Roses, dont M. Patrick SEVE est le maire, ne se rattachait pas directement à la campagne électorale de ce dernier aux élections législatives; que le coût de ces bulletins et de leur diffusion ne constituait dès lors pas, comme l'a estimé à bon droit la Commission des comptes de campagne et des financements politiques, une dépense de caractère électoral ayant à figurer dans le compte de campagne du candidat ; que la circonstance que ce coût ait été supporté par la commune ne constitue pas, pour les mêmes motifs, un avantage consenti au candidat au sens des dispositions de l'article L. 52-8</text:p>
          </table:table-cell>
          <table:table-cell table:number-columns-repeated="16377"/>
        </table:table-row>
        <table:table-row table:style-name="ro1">
          <table:table-cell office:value-type="string" table:style-name="ce7">
            <text:p>Oui</text:p>
          </table:table-cell>
          <table:table-cell office:value-type="string" table:style-name="ce3">
            <text:p>Mauvais découpage</text:p>
          </table:table-cell>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1998\rejet\CONSTEXT000017666100_annot.xml</text:p>
          </table:table-cell>
          <table:table-cell office:value-type="string" table:style-name="ce3">
            <text:p>6.Financement</text:p>
          </table:table-cell>
          <table:table-cell office:value-type="string" table:style-name="ce3">
            <text:p><text:s/>12. Considérant qu'aux termes du deuxième alinéa de l'article L. 52-8 du code électoral : 'Les personnes morales, à l'exception des partis ou groupements politiques, ne peuvent participer au financement de la campagne électorale d'un candidat, ni en lui consentant des dons sous quelque forme que ce soit, ni en lui fournissant des biens, services ou autres avantages directs ou indirects à des prix inférieurs à ceux qui sont habituellement pratiqué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01_annot.xml</text:p>
          </table:table-cell>
          <table:table-cell office:value-type="string" table:style-name="ce3">
            <text:p>7.Opérations</text:p>
          </table:table-cell>
          <table:table-cell office:value-type="string" table:style-name="ce3">
            <text:p><text:s/>4. Considérant que les griefs tirés de ce que la composition des bureaux de vote aurait été irrégulière, le secret du vote méconnu, des bulletins de vote annulés à tort et des procurations non conformes aux prescriptions de l'article L. 71 du code électoral ne sont pas assortis de précisions permettant d'en apprécier le bien-fondé</text:p>
          </table:table-cell>
          <table:table-cell table:number-columns-repeated="16377"/>
        </table:table-row>
        <table:table-row table:style-name="ro1">
          <table:table-cell office:value-type="string" table:style-name="ce7">
            <text:p>Oui</text:p>
          </table:table-cell>
          <table:table-cell office:value-type="string" table:style-name="ce3">
            <text:p>Mauvais découpage</text:p>
          </table:table-cell>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1998\rejet\CONSTEXT000017666101_annot.xml</text:p>
          </table:table-cell>
          <table:table-cell office:value-type="string" table:style-name="ce3">
            <text:p>6.Financement</text:p>
          </table:table-cell>
          <table:table-cell office:value-type="string" table:style-name="ce3">
            <text:p><text:s/>7. Considérant qu'aux termes du deuxième alinéa de l'article L. 52-8 du code électoral : 'Les personnes morales, à l'exception des partis ou groupements politiques, ne peuvent participer au financement de la campagne électorale d'un candidat, ni en lui consentant des dons sous quelque forme que ce soit, ni en lui fournissant des biens, services ou autres avantages directs ou indirects à des prix inférieurs à ceux qui sont habituellement pratiqués' ; qu'aux termes du premier alinéa de l'article L. 52-12 du même code : 'Chaque candidat ou candidat tête de liste soumis au plafonnement prévu à l'article L. 52-11 est tenu d'établir un compte de campagne retraçant, selon leur origine, l'ensemble des recettes perçues et, selon leur nature, l'ensemble des dépenses engagées ou effectuées en vue de l'élection, hors celles de la campagne officielle, par lui-même ou pour son compte, au cours de la période mentionnée à l'article L. 52-4. Sont réputées faites pour son compte les dépenses exposées directement au profit du candidat et avec l'accord de celui-ci, par les personnes physiques qui lui apportent leur soutien, ainsi que par les partis et groupements politiques qui ont été créés en vue de lui apporter leur soutien ou qui lui apportent leur soutien. Le candidat estime et inclut, en recettes et en dépenses, les avantages directs ou indirects, les prestations de services et dons en nature dont il a bénéfici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01_annot.xml</text:p>
          </table:table-cell>
          <table:table-cell office:value-type="string" table:style-name="ce3">
            <text:p>6.Financement</text:p>
          </table:table-cell>
          <table:table-cell office:value-type="string" table:style-name="ce3">
            <text:p><text:s/>9. Considérant qu'il résulte de l'instruction que M. MARTIN-LALANDE a inclus dans son compte de campagne les montants facturés par une société commerciale pour la mise à sa disposition d'une machine à affranchir ; qu'il n'est établi ni que ces factures auraient été minorées, ni que la société l'aurait fait bénéficier de prestations qu'elle ne lui aurait pas facturées ; que le requérant n'est dès lors pas fondé à soutenir que M. MARTIN-LALANDE aurait bénéficié, de la part de cette société, d'avantages en nature prohibés par les dispositions précitées du deuxième alinéa de l'article L. 52-8 du même code ; que, dès lors, les sommes correspondantes n'avaient pas à être intégrées dans son compte de campagne en application des dispositions précitées du premier alinéa de l'article L. 52-12 du même cod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01_annot.xml</text:p>
          </table:table-cell>
          <table:table-cell office:value-type="string" table:style-name="ce3">
            <text:p>6.Financement</text:p>
          </table:table-cell>
          <table:table-cell office:value-type="string" table:style-name="ce3">
            <text:p><text:s/>11. Considérant que le grief tiré de ce que d'autres postes de dépenses auraient été minorés dans le compte de campagne de M. MARTIN-LALANDE n'est pas assorti de précisions permettant d'en apprécier le bien-fond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01_annot.xml</text:p>
          </table:table-cell>
          <table:table-cell office:value-type="string" table:style-name="ce3">
            <text:p>6.Financement</text:p>
          </table:table-cell>
          <table:table-cell office:value-type="string" table:style-name="ce3">
            <text:p><text:s/>12. Considérant, enfin, qu'à supposer même que la Commission nationale des comptes de campagne et des financements politiques aurait dû retirer du compte de campagne de M. MARTIN-LALANDE plus de dépenses qu'elle ne l'a fait, une telle soustraction aurait été de nature non à entraîner le rejet du compte de campagne mais seulement une réformation plus importante ; que le moyen ainsi soulevé par le requérant est dès lors inopéra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03_annot.xml</text:p>
          </table:table-cell>
          <table:table-cell office:value-type="string" table:style-name="ce3">
            <text:p>4.Campagne</text:p>
          </table:table-cell>
          <table:table-cell office:value-type="string" table:style-name="ce3">
            <text:p><text:s/>4. Considérant, en deuxième lieu, que le requérant expose que les moyens de communication audiovisuelle et la presse écrite auraient largement fait référence à la candidature du candidat élu, secrétaire national du parti communiste français, dans la cinquième circonscription du Val-d'Oise ; qu'il en aurait résulté pour lui une inégalité de traiteme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03_annot.xml</text:p>
          </table:table-cell>
          <table:table-cell office:value-type="string" table:style-name="ce3">
            <text:p>7.Opérations</text:p>
          </table:table-cell>
          <table:table-cell office:value-type="string" table:style-name="ce3">
            <text:p><text:s/>10. Considérant, en troisième lieu, que les modalités d'attribution des présidences de bureaux de vote ne font pas apparaître de manoeuvres ; qu'en tout état de cause, les faits allégués sur ce point ne concernent pas le second tour de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03_annot.xml</text:p>
          </table:table-cell>
          <table:table-cell office:value-type="string" table:style-name="ce3">
            <text:p>7.Opérations</text:p>
          </table:table-cell>
          <table:table-cell office:value-type="string" table:style-name="ce3">
            <text:p><text:s/>11. Considérant, en quatrième lieu, que l'inachèvement de la composition du bureau lors de l'ouverture des opérations de vote dans le dixième bureau de la commune de Bezons, allégué par un des délégués, est contredit par les assesseurs ; que le fait que le nom des membres du bureau n'ait pas été porté sur le procès-verbal des opérations électorales au moment de l'ouverture du scrutin ne contrevient à aucune disposition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03_annot.xml</text:p>
          </table:table-cell>
          <table:table-cell office:value-type="string" table:style-name="ce3">
            <text:p>7.Opérations</text:p>
          </table:table-cell>
          <table:table-cell office:value-type="string" table:style-name="ce3">
            <text:p><text:s/>13. Considérant, en sixième lieu, que l'affirmation selon laquelle l'ordre des piles de bulletins de vote des deux candidats présentées aux électeurs dans le septième bureau de vote de la commune de Bezons n'aurait pas été conforme aux dispositions du code électoral est dépourvue de fondement, aucune disposition du code électoral n'imposant un ordre particulie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03_annot.xml</text:p>
          </table:table-cell>
          <table:table-cell office:value-type="string" table:style-name="ce3">
            <text:p>7.Opérations</text:p>
          </table:table-cell>
          <table:table-cell office:value-type="string" table:style-name="ce3">
            <text:p><text:s/>14. Considérant, en septième lieu, que, s'il est mentionné sur le procès-verbal des opérations électorales du troisième bureau de vote de la commune de Bezons, qu'un électeur aurait voté sans présenter de pièce d'identité, cette unique irrégularité ne saurait modifier le résultat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03_annot.xml</text:p>
          </table:table-cell>
          <table:table-cell office:value-type="string" table:style-name="ce3">
            <text:p>7.Opérations</text:p>
          </table:table-cell>
          <table:table-cell office:value-type="string" table:style-name="ce3">
            <text:p><text:s/>21. Considérant, en quatorzième lieu, qu'il n'est pas établi que, dans les septième et dixième bureaux de vote de la commune de Bezons, les délégués du candidat non élu aient été empêchés de remplir leurs fonctions de surveillance des opération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03_annot.xml</text:p>
          </table:table-cell>
          <table:table-cell office:value-type="string" table:style-name="ce3">
            <text:p>6.Financement</text:p>
          </table:table-cell>
          <table:table-cell office:value-type="string" table:style-name="ce3">
            <text:p><text:s/>30. Considérant, en premier lieu, que le grief selon lequel l'hebdomadaire du parti communiste français dans le Val-d'Oise aurait publié des appels au soutien financier du candidat élu, sans reproduire, conformément aux dispositions de l'article L. 52-9 du code électoral, le texte de l'article L. 52-8 du même code, est dépourvu de portée, les dispositions de l'article L. 52-9 ne s'imposant qu'aux publications émanant du mandataire financie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04_annot.xml</text:p>
          </table:table-cell>
          <table:table-cell office:value-type="string" table:style-name="ce3">
            <text:p>6.Financement</text:p>
          </table:table-cell>
          <table:table-cell office:value-type="string" table:style-name="ce3">
            <text:p><text:s/>1. Considérant que, pour soutenir que le candidat élu a dépassé le plafond de dépenses autorisé pour la circonscription concernée en application de l'article L. 52-11 du code électoral, le requérant demande l'inclusion dans les dépenses de l'intéressé de deux numéros d'un journal intitulé ' la lettre de Thierry MARIANI ' publiés en janvier et février 1997</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04_annot.xml</text:p>
          </table:table-cell>
          <table:table-cell office:value-type="string" table:style-name="ce3">
            <text:p>4.Campagne</text:p>
          </table:table-cell>
          <table:table-cell office:value-type="string" table:style-name="ce3">
            <text:p><text:s/>7. Considérant que le troisième alinéa de l'article L. 165 du code électoral prohibe l'impression et l'utilisation, sous quelque forme que ce soit, de toute circulaire, affiche ou bulletin et de tout tract autres que les affiches et la circulaire prévues par le premier alinéa du même article ; qu'il résulte tant de l'instruction que des propres productions du candidat élu que celui-ci n'a pas respecté ces dispositions ; qu'il est cependant établi que les autres candidats, et notamment ceux présents au second tour de scrutin, les ont également méconnues ; qu'au surplus, eu égard à l'écart des voix, l'abus de propagande reproché est resté sans influence sur le résultat du scrutin ; que, par suite, le grief ne peut être accueilli</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06_annot.xml</text:p>
          </table:table-cell>
          <table:table-cell office:value-type="string" table:style-name="ce3">
            <text:p>4.Campagne</text:p>
          </table:table-cell>
          <table:table-cell office:value-type="string" table:style-name="ce3">
            <text:p><text:s/>1. Considérant qu'aux termes du premier alinéa de l'article L. 52-1 du code électoral : ' Pendant les trois mois précédant le premier jour du mois d'une élection et jusqu'à la date du tour du scrutin où celle-ci est acquise, l'utilisation à des fins de propagande électorale de tout procédé de publicité commerciale par la voie de la presse ou par tout moyen de communication audiovisuelle est interdite ' ; que le bulletin de l'association ' Pévèle 2000 ', association locale regroupant des associations, des entreprises et des collectivités locales, ne peut, eu égard tant à son contenu, composé exclusivement d'annonces, qu'à sa diffusion, restreinte aux seuls membres de l'association, et à son mode de diffusion, être regardé comme un organe de presse ; que, par suite, l'annonce d'une réunion électorale avec M. LAZARO et M. SARKOZY dans l'un des numéros de cette lettre ne saurait constituer un moyen de publicité commerciale par voie de presse au sens des dispositions précitées de l'article L. 52-1 du code électoral</text:p>
          </table:table-cell>
          <table:table-cell table:number-columns-repeated="16377"/>
        </table:table-row>
        <table:table-row table:style-name="ro1">
          <table:table-cell office:value-type="string" table:style-name="ce7">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1998\rejet\CONSTEXT000017666106_annot.xml</text:p>
          </table:table-cell>
          <table:table-cell office:value-type="string" table:style-name="ce3">
            <text:p>6.Financement</text:p>
          </table:table-cell>
          <table:table-cell office:value-type="string" table:style-name="ce3">
            <text:p><text:s/>10. Considérant qu'aux termes de l'article L. 52-8 du code électoral : ' Les personnes morales, à l'exception des partis politiques, ne peuvent participer au financement de la campagne électorale d'un candidat, ni en lui consentant des dons sous quelque forme que ce soit, ni en lui fournissant des biens, services ou autres avantages directs ou indirects à des prix inférieurs à ceux qui sont habituellement pratiqués ' ; qu'aux termes de l'article L. 52-12 du code : ' Chaque candidat ou candidat tête de liste soumis au plafonnement prévu à l'article L. 52-11 est tenu d'établir un compte de campagne retraçant, selon leur origine, l'ensemble des recettes perçues et, selon leur nature, l'ensemble des dépenses engagées ou effectuées en vue de l'élection, hors celle de la campagne officielle, par lui-même ou pour son compte, au cours de la période mentionnée à l'article L. 52-4. Sont réputées faites pour son compte les dépenses exposées directement au profit du candidat et avec l'accord de celui-ci, par les partis et groupements politiques qui ont été créés en vue de lui apporter leur soutien ou qui lui apportent leur soutien. Le candidat estime et inclut, en recettes et en dépenses, les avantages directs ou indirects, les prestations de services et dons en nature dont il a bénéficié. Le compte de campagne doit être en équilibre ou excédentaire et ne peut présenter un déficit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07_annot.xml</text:p>
          </table:table-cell>
          <table:table-cell office:value-type="string" table:style-name="ce3">
            <text:p>4.Campagne</text:p>
          </table:table-cell>
          <table:table-cell office:value-type="string" table:style-name="ce3">
            <text:p><text:s/>2. Considérant qu'aux termes de l'article L. 52-1, deuxième alinéa, du code électoral : ' ...aucune campagne de promotion publicitaire des réalisations ou de la gestion d'une collectivité ne peut être organisée sur le territoire des collectivités intéressées par le scrutin ' ; que la circonstance que M. TAMAYA ait évoqué, durant sa campagne électorale, les réalisations de la commune de Saint-Denis, dont il est le maire, ne constitue pas, à elle seule, une campagne de promotion publicitaire au sens des dispositions précitées ; que, si la commune a inauguré, postérieurement à l'élection, un centre culturel, les circonstances que, avant le scrutin, la commune ait constitué un dossier de presse, que les journaux et une radio aient présenté ce centre et que des invitations à l'inauguration aient été adressées aux conseillers municipaux ne constituent pas, en l'espèce, une violation de ces disposition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07_annot.xml</text:p>
          </table:table-cell>
          <table:table-cell office:value-type="string" table:style-name="ce3">
            <text:p>6.Financement</text:p>
          </table:table-cell>
          <table:table-cell office:value-type="string" table:style-name="ce3">
            <text:p><text:s/>5. Considérant que le coût de ces repas ne se rattachait pas directement à l'organisation de la campagne électorale ; qu'il n'avait dès lors pas à figurer dans le compte de campagne de M. TAMAYA et ne constituait pas un avantage accordé par une personne morale au sens des dispositions du deuxième alinéa de l'article L. 52-8 du code électoral ; qu'il n'est dès lors pas établi, devant le juge de l'élection, que c'est à tort que la Commission nationale des comptes de campagne et des financements politiques a approuvé le compte de M. TAMAYA</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08_annot.xml</text:p>
          </table:table-cell>
          <table:table-cell office:value-type="string" table:style-name="ce3">
            <text:p>6.Financement</text:p>
          </table:table-cell>
          <table:table-cell office:value-type="string" table:style-name="ce3">
            <text:p><text:s/>4. Considérant que le numéro 16 du journal 'Longjumeau renouveau', diffusé par l'association du même nom le 15 mai 1997, est entièrement consacré à la vie municipale de la commune de Longjumeau et ne concerne pas la campagne pour les élections législatives dans la 4ème circonscription de l'Essonne; que son coût n'avait donc pas à figurer dans le compte de M. WILTZE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09_annot.xml</text:p>
          </table:table-cell>
          <table:table-cell office:value-type="string" table:style-name="ce3">
            <text:p>4.Campagne</text:p>
          </table:table-cell>
          <table:table-cell office:value-type="string" table:style-name="ce3">
            <text:p><text:s/>2. Considérant, en premier lieu, qu'il n'est pas contesté que la diffusion de cette circulaire a concerné la quasi totalité des électeurs de la circonscription, en méconnaissance des dispositions de l'article L. 165 du code électoral ; que, toutefois, il résulte de l'instruction qu'aux mêmes dates le requérant, en méconnaissance des mêmes dispositions, faisait distribuer tout aussi massivement des tracts appelant à voter pour lui ; que les termes de la circulaire en cause n'excédaient pas les limites admises de la propagande électorale ; que, compte tenu des dates auxquelles cette circulaire a été diffusée, le requérant a disposé du temps nécessaire pour y répondre ; qu'ainsi, le grief tiré de la rupture d'égalité entre les candidats n'est pas fond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10_annot.xml</text:p>
          </table:table-cell>
          <table:table-cell office:value-type="string" table:style-name="ce3">
            <text:p>4.Campagne</text:p>
          </table:table-cell>
          <table:table-cell office:value-type="string" table:style-name="ce3">
            <text:p><text:s/>3. Considérant qu'il résulte de l'instruction que le tract anonyme appelant, dans des termes outranciers, à l'abstention, a fait l'objet d'une diffusion limitée ; que dès lors, aussi condamnable que soit le contenu de ce tract, sa distribution ne peut être regardée comme ayant exercé une influence de nature à avoir altéré la sincérité du résultat du premier tour de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11_annot.xml</text:p>
          </table:table-cell>
          <table:table-cell office:value-type="string" table:style-name="ce3">
            <text:p>4.Campagne</text:p>
          </table:table-cell>
          <table:table-cell office:value-type="string" table:style-name="ce3">
            <text:p><text:s/>3. Considérant, en troisième lieu, que l'insertion, dans un site Internet créé par une personne privée, d'informations mettant en cause l'action de M. FOURGOUS n'a pas, dans les circonstances de l'espèce et notamment eu égard à la consultation très restreinte dudit site, altéré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12_annot.xml</text:p>
          </table:table-cell>
          <table:table-cell office:value-type="string" table:style-name="ce3">
            <text:p>7.Opérations</text:p>
          </table:table-cell>
          <table:table-cell office:value-type="string" table:style-name="ce3">
            <text:p><text:s/>2. Considérant que, si le requérant soutient que quelques procurations n'ont pas été signées par le mandant, ou ne mentionnent pas le nom de l'autorité qui les a établies, ou n'émanent pas d'une autorité citée à l'article R. 72 du code électoral, ou ont été reçues, par les délégués mentionnés au deuxième alinéa du même article, de personnes n'étant ni malades, ni gravement infirmes, les irrégularités ainsi alléguées affecteraient, en tout état de cause, un nombre de procurations très inférieur à celui des suffrages séparant les deux candidat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12_annot.xml</text:p>
          </table:table-cell>
          <table:table-cell office:value-type="string" table:style-name="ce3">
            <text:p>7.Opérations</text:p>
          </table:table-cell>
          <table:table-cell office:value-type="string" table:style-name="ce3">
            <text:p><text:s/>3. Considérant que, pour un nombre supérieur à celui de l'écart de voix séparant les deux candidats, des électeurs ont voté au second tour de scrutin en utilisant des procurations établies par des délégués figurant sur la liste agréée par le président du tribunal d'instance de Juvisy-sur-Orge, en application des dispositions du troisième alinéa de l'article R. 72 du code électoral ; que, si les délégués ne sont compétents que pour se déplacer, afin de recueillir les mandats des personnes malades ou infirmes visées par le deuxième alinéa de l'article R. 72, l'irrégularité commise n'est pas de nature, dans les circonstances de l'espèce, à entraîner le retranchement des suffrages correspondants ; qu'il n'y a donc pas lieu de prononcer, de ce chef, l'annulation de l'élection contesté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13_annot.xml</text:p>
          </table:table-cell>
          <table:table-cell office:value-type="string" table:style-name="ce3">
            <text:p>6.Financement</text:p>
          </table:table-cell>
          <table:table-cell office:value-type="string" table:style-name="ce3">
            <text:p><text:s/>2. Considérant qu'il résulte de l'instruction que le coût de la location des deux permanences électorales de M. LASBORDES a été intégré dans le compte de campagne ; que, contrairement à ce qui est allégué, M. LASBORDES n'a pas utilisé pour sa campagne le véhicule de fonction mis à sa disposition par le conseil régional d'Ile-de-France, mais a loué un véhicule dont les frais de location figurent dans son compte ; que des frais d'essence d'un montant de 3 715 F ont été pris en compte, sous la rubrique ' frais de transport et de déplacement ' ; que le chauffeur de M. LASBORDES étant en congé, sa participation à la campagne n'avait pas à être prise en compte dans les dépenses engagées au profit du candidat ; que les dépenses relatives à la réunion de soutien avec MM. FILLON et MADELIN, organisée le 22 mai 1997, ont été intégrées dans le compte de campagne, sous la forme de frais de téléphone et de courrier ; que les frais correspondant aux tracts diffusés dans les communes de Verrières-le-Buisson, Orsay, Gif-sur-Yvette, Bièvres, Saclay, Vauhallan et Saint-Aubin ont tous été pris en compte ; SUR LES GRIEFS RELATIFS A LA CAMPAGNE ELECTORALE</text:p>
          </table:table-cell>
          <table:table-cell table:number-columns-repeated="16377"/>
        </table:table-row>
        <table:table-row table:style-name="ro1">
          <table:table-cell office:value-type="string" table:style-name="ce3">
            <text:p>Oui</text:p>
          </table:table-cell>
          <table:table-cell table:style-name="ce3"/>
          <table:table-cell office:value-type="string" table:style-name="ce3">
            <text:p>Pas d’éléments de fait</text:p>
          </table:table-cell>
          <table:table-cell table:style-name="ce3"/>
          <table:table-cell office:value-type="string" table:style-name="ce3">
            <text:p>file:\\\P:\CRJ\RECHERCHE\PROJET_JADE\JADE_COMMUN\Annotation\Annotation_automatique_Maritaud\Technologie_light\Super-catégories-objets_0,8\AN\1998\rejet\CONSTEXT000017666113_annot.xml</text:p>
          </table:table-cell>
          <table:table-cell office:value-type="string" table:style-name="ce3">
            <text:p>4.Campagne</text:p>
          </table:table-cell>
          <table:table-cell office:value-type="string" table:style-name="ce3">
            <text:p><text:s/>4. Considérant que, si le premier alinéa de l'article L. 52-1 du code électoral prohibe l'utilisation à des fins de propagande électorale de tout procédé de publicité commerciale par voie de presse ou tout moyen de communication audiovisuelle pendant les trois mois précédant le premier jour du mois d'une élection, le démarchage téléphonique, dès lors qu'il ne repose pas sur un support commercial, ne rentre pas dans le champ de l'article L. 52-1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13_annot.xml</text:p>
          </table:table-cell>
          <table:table-cell office:value-type="string" table:style-name="ce3">
            <text:p>7.Opérations</text:p>
          </table:table-cell>
          <table:table-cell office:value-type="string" table:style-name="ce3">
            <text:p><text:s/>11. Considérant, en deuxième lieu, qu'il est allégué que dans la commune de Vauhallan, le nom du mandataire ne figure pas aux côtés du nom du mandant, contrairement à ce qu'exige l'article R. 76-1 du code électoral ; que, toutefois, l'absence sur les listes d'émargement des mentions obligatoires en matière de vote par procuration ne doit pas conduire à l'invalidation d'un nombre équivalent de suffrages, dès lors qu'il ne résulte pas de l'instruction, et qu'il n'est d'ailleurs pas allégué, que ces insuffisances ou omissions auraient été à l'origine de votes irréguliers</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1998\rejet\CONSTEXT000017666115_annot.xml</text:p>
          </table:table-cell>
          <table:table-cell office:value-type="string" table:style-name="ce3">
            <text:p>4.Campagne</text:p>
          </table:table-cell>
          <table:table-cell office:value-type="string" table:style-name="ce3">
            <text:p><text:s/>4. Considérant que, même en retranchant les douze et seize suffrages susmentionnés, M. BRIAL conserverait un avantage de voix sur le candidat arrivé en seconde position ; - SUR LE GRIEF TIRÉ DE PRESSIONS SUR LES ELECTEUR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16_annot.xml</text:p>
          </table:table-cell>
          <table:table-cell office:value-type="string" table:style-name="ce3">
            <text:p>7.Opérations</text:p>
          </table:table-cell>
          <table:table-cell office:value-type="string" table:style-name="ce3">
            <text:p><text:s/>2. Considérant, en deuxième lieu, que M. GUELLEC n'est fondé à contester ni l'annulation par les bureaux de vote de certains bulletins irrégulièrement déchirés ou comportant une mention manuscrite, ni les modalités de décompte des suffrages adoptés dans des bureaux de vote qui, à supposer qu'elles aient été contraires aux dispositions de l'article L. 65 du code électoral, sont restées sans incidence sur les résultats obtenus</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Pas d’éléments de fait</text:p>
          </table:table-cell>
          <table:table-cell table:style-name="ce3"/>
          <table:table-cell office:value-type="string" table:style-name="ce3">
            <text:p>file:\\\P:\CRJ\RECHERCHE\PROJET_JADE\JADE_COMMUN\Annotation\Annotation_automatique_Maritaud\Technologie_light\Super-catégories-objets_0,8\AN\1998\rejet\CONSTEXT000017666116_annot.xml</text:p>
          </table:table-cell>
          <table:table-cell office:value-type="string" table:style-name="ce3">
            <text:p>4.Campagne</text:p>
          </table:table-cell>
          <table:table-cell office:value-type="string" table:style-name="ce3">
            <text:p><text:s/>6. - SUR LA CAMPAGNE ELECTORA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17_annot.xml</text:p>
          </table:table-cell>
          <table:table-cell office:value-type="string" table:style-name="ce3">
            <text:p>4.Campagne</text:p>
          </table:table-cell>
          <table:table-cell office:value-type="string" table:style-name="ce3">
            <text:p><text:s/>2. Considérant, en premier lieu, qu'aux termes de l'article R. 29 du code électoral : 'Chaque candidat ou liste de candidats ne peut faire imprimer ou envoyer aux électeurs, avant chaque tour de scrutin, qu'une seule circulaire, sur un feuillet qui ne peut pas dépasser le format 210 millimètres sur 297 millimètres' ; qu'il résulte de ces dispositions que le texte de la profession de foi envoyée par les candidats doit être uniforme pour l'ensemble du territoire de la circonscription ; que, par suite, la circonstance que Mme ISAAC-SIBILLE ait envoyé aux électeurs de la circonscription une circulaire dont une partie du contenu variait selon l'arrondissement de Lyon dans lequel ils résidaient a méconnu les dispositions de l'article R. 29 du code électoral ; que, toutefois, cette irrégularité de propagande n'a pu altérer la sincérité du scrutin, en l'absence de tout élément nouveau apporté par ces circulaires dans la polémique électorale ou de tout propos diffamatoire tenu à l'égard de M. COLLOMB</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17_annot.xml</text:p>
          </table:table-cell>
          <table:table-cell office:value-type="string" table:style-name="ce3">
            <text:p>4.Campagne</text:p>
          </table:table-cell>
          <table:table-cell office:value-type="string" table:style-name="ce3">
            <text:p><text:s/>5. Considérant, en quatrième lieu, que le tract distribué dans les boîtes aux lettres entre les deux tours, présentant Mme ISAAC-SIBILLE comme 'député renouvelable', ne comportait aucune mention de nature à induire les électeurs en erreur ; que ce tract répondait lui-même à des tracts diffusés par M. COLLOMB et que le caractère massif de sa distribution n'est pas établi</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18_annot.xml</text:p>
          </table:table-cell>
          <table:table-cell office:value-type="string" table:style-name="ce3">
            <text:p>4.Campagne</text:p>
          </table:table-cell>
          <table:table-cell office:value-type="string" table:style-name="ce3">
            <text:p><text:s/>3. Considérant qu'aux termes du deuxième alinéa de l'article L 52-1 du code électoral : ' A compter du premier jour du sixième mois précédant le mois au cours duquel il doit être procédé à des élections générales, aucune campagne de promotion publicitaire des réalisations ou de la gestion d'une collectivité ne peut être organisée sur le territoire des collectivités intéressées par le scrutin ' ; qu'il résulte de l'instruction que ni les tracts diffusés par l'association ' Pour Lyon ', ni la plaquette intitulée ' Rassembler pour réussir Lyon ' diffusée par M. CHABERT n'ont un caractère de promotion publicitaire au sens des dispositions précitées de l'article L. 52-1 du code électoral</text:p>
          </table:table-cell>
          <table:table-cell table:number-columns-repeated="16377"/>
        </table:table-row>
        <table:table-row table:style-name="ro1">
          <table:table-cell office:value-type="string" table:style-name="ce7">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1998\rejet\CONSTEXT000017666118_annot.xml</text:p>
          </table:table-cell>
          <table:table-cell office:value-type="string" table:style-name="ce3">
            <text:p>6.Financement</text:p>
          </table:table-cell>
          <table:table-cell office:value-type="string" table:style-name="ce3">
            <text:p><text:s/>12. Considérant qu'aux termes du deuxième alinéa de l'article L. 52-8 du code électoral dans sa rédaction résultant de la loi du 19 janvier 1995 : ' Les personnes morales, à l'exception des partis ou groupements politiques, ne peuvent participer au financement de la campagne électorale d'un candidat ni en lui consentant des dons sous quelque forme que ce soit, ni en lui fournissant des biens, services ou autres avantages directs ou indirects à des prix inférieurs à ceux qui sont habituellement pratiqués ' ; qu'aux termes du premier alinéa de l'article L. 52-12 du même code : ' Chaque candidat ou candidat tête de liste soumis au plafonnement prévu à l'article L. 52-11 est tenu d'établir un compte de campagne retraçant, selon leur origine, l'ensemble des recettes perçues et, selon leur nature, l'ensemble des dépenses engagées ou effectuées en vue de l'élection, hors celles de la campagne officielle, par lui-même ou pour son compte, au cours de la période mentionnée à l'article L. 52-4. Sont réputées faites pour son compte les dépenses exposées directement au profit du candidat et avec l'accord de celui-ci, par les personnes physiques qui lui apportent leur soutien, ainsi que par les partis et groupements politiques qui ont été créés en vue de lui apporter leur soutien ou qui lui apportent leur soutien. Le candidat estime et inclut, en recettes et en dépenses, les avantages directs et indirects, les prestations de services et dons en nature dont il a bénéficié. Le compte de campagne doit être en équilibre ou excédentaire et ne peut présenter un déficit '</text:p>
          </table:table-cell>
          <table:table-cell table:number-columns-repeated="16377"/>
        </table:table-row>
        <table:table-row table:style-name="ro1">
          <table:table-cell office:value-type="string" table:style-name="ce7">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1998\rejet\CONSTEXT000017666119_annot.xml</text:p>
          </table:table-cell>
          <table:table-cell office:value-type="string" table:style-name="ce3">
            <text:p>4.Campagne</text:p>
          </table:table-cell>
          <table:table-cell office:value-type="string" table:style-name="ce3">
            <text:p><text:s/>3. Considérant qu'aux termes du premier alinéa de l'article L. 52-1 du code électoral : 'Pendant les trois mois précédant le premier jour du mois d'une élection et jusqu'à la date du tour de scrutin où celle-ci est acquise, l'utilisation à des fins de propagande électorale de tout procédé de publicité commerciale par la voie de la presse ou par tout moyen de communication audiovisuelle est interdite' ; que ces dispositions prenaient effet, en l'espèce, à compter de la dissolution de l'Assemblée nationa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19_annot.xml</text:p>
          </table:table-cell>
          <table:table-cell office:value-type="string" table:style-name="ce3">
            <text:p>4.Campagne</text:p>
          </table:table-cell>
          <table:table-cell office:value-type="string" table:style-name="ce3">
            <text:p><text:s/>4. Considérant que la plaquette 'La lettre de Pierre Terrier', qui a été diffusée par le Front national, est un numéro spécial du bimensuel du Front national, spécialement réalisé et diffusé par M. TERRIER, et ne constitue dès lors pas un procédé de publicité commerciale par la voie de presse ; que, d'ailleurs, il n'est ni établi ni même allégué, que ladite diffusion ait pu avoir une influence sur le résultat du scrutin ; SUR LE COMPTE DE CAMPAGNE DE M. TERRIE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21_annot.xml</text:p>
          </table:table-cell>
          <table:table-cell office:value-type="string" table:style-name="ce3">
            <text:p>7.Opérations</text:p>
          </table:table-cell>
          <table:table-cell office:value-type="string" table:style-name="ce3">
            <text:p><text:s/>8. Considérant que, s'il résulte des observations consignées sur le procès-verbal du bureau de vote de Néry que le président de ce bureau de vote a été remplacé entre 13 heures et 15 h 30, il n'est ni établi, ni même allégué, que ce remplacement n'aurait pas été effectué dans les conditions prévues par les dispositions de l'article R. 43 du code électoral</text:p>
          </table:table-cell>
          <table:table-cell table:number-columns-repeated="16377"/>
        </table:table-row>
        <table:table-row table:style-name="ro1">
          <table:table-cell office:value-type="string" table:style-name="ce7">
            <text:p>Non</text:p>
          </table:table-cell>
          <table:table-cell table:number-columns-repeated="2"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1998\rejet\CONSTEXT000017666123_annot.xml</text:p>
          </table:table-cell>
          <table:table-cell office:value-type="string" table:style-name="ce3">
            <text:p>4.Campagne</text:p>
          </table:table-cell>
          <table:table-cell office:value-type="string" table:style-name="ce3">
            <text:p><text:s/>2. Considérant que le grief tiré de ce que la déclaration de candidature de Mme TRAUTMANN ne serait pas conforme aux dispositions de l'article R. 98 du code électoral est dépourvu de toute précision permettant d'en apprécier le bien-fondé ; SUR LES GRIEFS RELATIFS A LA PROPAGANDE ELECTORA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23_annot.xml</text:p>
          </table:table-cell>
          <table:table-cell office:value-type="string" table:style-name="ce3">
            <text:p>4.Campagne</text:p>
          </table:table-cell>
          <table:table-cell office:value-type="string" table:style-name="ce3">
            <text:p><text:s/>3. Considérant que le tract intitulé 'Chers Strasbourgeois', diffusé du mercredi 28 mai au vendredi 30 mai 1997, n'apportait aucun élément nouveau au débat électoral; qu'il ne saurait ainsi être regardé comme une manoeuvre ayant altéré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24_annot.xml</text:p>
          </table:table-cell>
          <table:table-cell office:value-type="string" table:style-name="ce3">
            <text:p>4.Campagne</text:p>
          </table:table-cell>
          <table:table-cell office:value-type="string" table:style-name="ce3">
            <text:p>; 2. Considérant que les requérants soutiennent qu'en faisant diffuser un tract, les 30 et 31 mai 1997, dans les communes d'Albert et de Méaulte, M. AUDINOT se serait livré à une manoeuvre qui aurait rompu l'égalité entre les candidats, ses adversaires n'ayant pas eu le temps de préparer une réponse ; qu'il est constant que ce tract constituait lui-même la réponse à un tract auquel les requérants n'étaient pas étrangers ; que son contenu n'excédait pas les limites admises en matière de propagande électorale ; que les requérants ont disposé du temps nécessaire pour y répondre ; qu'enfin, eu égard à la zone géographique limitée dans laquelle il a été diffusé, ce tract n'a pu, en tout état de cause, avoir une incidence déterminante sur l'issue du scrutin ; qu'ainsi ce moyen ne peut qu'être écar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24_annot.xml</text:p>
          </table:table-cell>
          <table:table-cell office:value-type="string" table:style-name="ce3">
            <text:p>4.Campagne</text:p>
          </table:table-cell>
          <table:table-cell office:value-type="string" table:style-name="ce3">
            <text:p>; 3. Considérant que, si les requérants soutiennent que la presse locale aurait traité de façon inéquitable les différentes candidatures, les organes de presse sont libres de rendre compte de la campagne électorale comme ils l'entende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24_annot.xml</text:p>
          </table:table-cell>
          <table:table-cell office:value-type="string" table:style-name="ce3">
            <text:p>7.Opérations</text:p>
          </table:table-cell>
          <table:table-cell office:value-type="string" table:style-name="ce3">
            <text:p>; 8. Considérant que, s'il est constant que le bureau de vote de la commune de Beaucourt-sur-l'Ancre a été composé en méconnaissance des dispositions des articles R. 42 et R. 44 du code électoral, cette irrégularité n'est pas de nature, en l'absence de manoeuvre, à justifier l'annulation des suffrages exprimés dans cette commune ; qu'il en va de même de l'irrégularité, à la supposer établie, de la composition du bureau de vote de la commune de Flers ; - Sur les opérations de dépouillement : . En ce qui concerne la différence entre le nombre d'émargements et le nombre de bulletins trouvés dans les urn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24_annot.xml</text:p>
          </table:table-cell>
          <table:table-cell office:value-type="string" table:style-name="ce3">
            <text:p>7.Opérations</text:p>
          </table:table-cell>
          <table:table-cell office:value-type="string" table:style-name="ce3">
            <text:p>; 12. Considérant que les requérants se bornent à constater l'absence de feuille de pointage jointe au procès-verbal des opérations de vote de la commune de Thiepval, contrairement aux prescriptions de l'article R. 68 du code électoral ; qu'ils ne soutiennent pas que le décompte des suffrages dudit procès-verbal serait entaché d'erreurs ; qu'au surplus, aucune réclamation n'a été mentionnée dans ce procès-verbal ; qu'ainsi ce moyen ne saurait être accueilli ; . En ce qui concerne les votes par procuratio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24_annot.xml</text:p>
          </table:table-cell>
          <table:table-cell office:value-type="string" table:style-name="ce3">
            <text:p>7.Opérations</text:p>
          </table:table-cell>
          <table:table-cell office:value-type="string" table:style-name="ce3">
            <text:p>: 13. Considérant que, si dans les communes de Thiepval et de Toutencourt, l'inscription sur les listes d'émargement des mentions relatives aux votes par procuration n'a pas satisfait aux dispositions du deuxième alinéa de l'article R. 76 du code électoral, il ne résulte pas de l'instruction que les insuffisances ou omissions constatées, qui ne méconnaissent aucune formalité substantielle, aient été à l'origine de votes irréguliers ; qu'en outre, aucune réclamation relative aux votes par procuration n'a été portée sur le procès-verbal des opérations électorales de ces communes ; que, dans ces conditions, il n'est pas établi que les irrégularités commises dans la tenue des documents électoraux aient permis des fraudes de nature à altérer le résultat de l'élection ; . En ce qui concerne les bulletins annulé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24_annot.xml</text:p>
          </table:table-cell>
          <table:table-cell office:value-type="string" table:style-name="ce3">
            <text:p>7.Opérations</text:p>
          </table:table-cell>
          <table:table-cell office:value-type="string" table:style-name="ce3">
            <text:p>: 14. Considérant que les requérants allèguent que, sur l'ensemble de la circonscription, 157 bulletins annulés n'auraient pas été signés par les scrutateurs et que 41 bulletins mentionnés comme annulés dans les procès-verbaux des opérations électorales n'auraient pas été joints auxdits procès-verbaux en méconnaissance de l'article L. 66 du code électoral ; qu'en outre, un certain nombre de suffrages exprimés en faveur de Mme DESTENAY auraient été annulés à tort, s'agissant de bulletins à son nom trouvés en deux exemplaires dans une même enveloppe électora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24_annot.xml</text:p>
          </table:table-cell>
          <table:table-cell office:value-type="string" table:style-name="ce3">
            <text:p>7.Opérations</text:p>
          </table:table-cell>
          <table:table-cell office:value-type="string" table:style-name="ce3">
            <text:p>; 17. Considérant, en troisième lieu, qu'ont été annexés au procès-verbal des opérations de vote du 3ème bureau de la ville d'Albert, deux bulletins de vote en faveur de Mme DESTENAY trouvés dans une même enveloppe, ainsi qu'un bulletin en faveur de la requérante mentionné dans la feuille annexe récapitulative des suffrages annulés, comme relevant d'une enveloppe sans bulle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24_annot.xml</text:p>
          </table:table-cell>
          <table:table-cell office:value-type="string" table:style-name="ce3">
            <text:p>7.Opérations</text:p>
          </table:table-cell>
          <table:table-cell office:value-type="string" table:style-name="ce3">
            <text:p>; 23. Considérant, en premier lieu, que, sous réserve des rectifications mineures auxquelles il est procédé dans la présente décision, les résultats de l'élection proclamés par la commission de recensement des votes correspondent exactement à la somme des résultats figurant sur chacun des procès-verbaux et procès-verbaux centralisateurs des 195 communes de la circonscription ; qu'il n'est ni établi, ni même allégué, que ces procès-verbaux auraient été falsifié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47_annot.xml</text:p>
          </table:table-cell>
          <table:table-cell office:value-type="string" table:style-name="ce3">
            <text:p>4.Campagne</text:p>
          </table:table-cell>
          <table:table-cell office:value-type="string" table:style-name="ce3">
            <text:p><text:s/>7. Considérant que le requérant soutient que M. HERBILLON aurait, à des fins électorales, fait état des liens de M. GRIOTTERAY avec des personnalités du Front national; que les articles de presse produits au dossier faisant état de ces liens ne sauraient être imputés à M. HERBILLON ; que, si ce dernier a, au cours d'une réunion publique, repris cet argument, cette circonstance n'a pas, compte tenu notamment des démentis publics qu'avait pu apporter M. GRIOTTERAY sur ce point, été de nature à affecter les résultats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47_annot.xml</text:p>
          </table:table-cell>
          <table:table-cell office:value-type="string" table:style-name="ce3">
            <text:p>4.Campagne</text:p>
          </table:table-cell>
          <table:table-cell office:value-type="string" table:style-name="ce3">
            <text:p><text:s/>10. Considérant que le numéro du bulletin municipal incriminé ne peut être regardé, par son contenu, comme constituant une campagne de promotion publicitaire des réalisations ou de la gestion de la commune au sens de l'article L. 52-1, deuxième alinéa, du code électoral ; que le grief tiré de la violation de ces dispositions doit dès lors être écarté ; - SUR LA REQUETE DE Mme FANARTZIS</text:p>
          </table:table-cell>
          <table:table-cell table:number-columns-repeated="16377"/>
        </table:table-row>
        <table:table-row table:style-name="ro1">
          <table:table-cell office:value-type="string" table:style-name="ce7">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1998\rejet\CONSTEXT000017666147_annot.xml</text:p>
          </table:table-cell>
          <table:table-cell office:value-type="string" table:style-name="ce3">
            <text:p>6.Financement</text:p>
          </table:table-cell>
          <table:table-cell office:value-type="string" table:style-name="ce3">
            <text:p><text:s/>8. Considérant qu'aux termes de l'article L. 52-8, deuxième alinéa, du code électoral : 'Les personnes morales, à l'exception des partis politiques ou groupements politiques, ne peuvent participer au financement de la campagne électorale d'un candidat, ni en lui consentant des dons sous quelque forme que ce soit ni en lui fournissant des biens, services ou autres avantages directs ou indirects à des prix inférieurs à ceux qui sont habituellement pratiqués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47_annot.xml</text:p>
          </table:table-cell>
          <table:table-cell office:value-type="string" table:style-name="ce3">
            <text:p>6.Financement</text:p>
          </table:table-cell>
          <table:table-cell office:value-type="string" table:style-name="ce3">
            <text:p><text:s/>9. Considérant que l'utilisation occasionnelle, pour les besoins de la campagne électorale de M. HERBILLON, du chauffeur et de la voiture de la mairie de Maisons-Alfort, de même que le salaire d'une employée municipale qui avait été placée en position de disponibilité pour assister le candidat, ont été facturés et mentionnés dans le compte de campagne de l'intéressé à leur coût normal et ont fait l'objet d'un paiement effectif dans les conditions prévues à l'article L. 52-4 du code électoral; que ni l'utilisation des préaux d'école pour l'organisation de réunions de quartiers, ni la diffusion du bulletin municipal d'avril 1997, dont le contenu n'avait pas un caractère électoral, ne constituaient des avantages au sens de l'article L. 52-8 et n'avaient à être comptabilisés dans les dépenses de campagne du candidat ; que c'est dès lors à bon droit que la Commission nationale des comptes de campagne et des financements politiques a approuvé le compte de campagne de M. HERBILLON</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1998\rejet\CONSTEXT000017666147_annot.xml</text:p>
          </table:table-cell>
          <table:table-cell office:value-type="string" table:style-name="ce3">
            <text:p>7.Opérations</text:p>
          </table:table-cell>
          <table:table-cell office:value-type="string" table:style-name="ce3">
            <text:p><text:s/>13. Considérant qu'il résulte de ce qui précède que les requêtes susvisées doivent être rejeté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64_annot.xml</text:p>
          </table:table-cell>
          <table:table-cell office:value-type="string" table:style-name="ce3">
            <text:p>4.Campagne</text:p>
          </table:table-cell>
          <table:table-cell office:value-type="string" table:style-name="ce3">
            <text:p><text:s/>1. Considérant que le requérant fait valoir que la publication de sondages d'opinion entre les deux tours a été de nature à influencer les électeurs de la 12ème circonscription de la Seine-Saint-Deni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64_annot.xml</text:p>
          </table:table-cell>
          <table:table-cell office:value-type="string" table:style-name="ce3">
            <text:p>4.Campagne</text:p>
          </table:table-cell>
          <table:table-cell office:value-type="string" table:style-name="ce3">
            <text:p><text:s/>3. Considérant que le grief tiré de la diffusion irrégulière du tract signé ' des jeunes du RPR ' n'est assorti d'aucune précision permettant d'en apprécier le bien-fondé ; SUR LE GRIEF TIRE DE MANOEUVRES TENDANT A SUGGERER L'ABSENCE DU REQUERANT AU SECOND TOU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1998\rejet\CONSTEXT000017666164_annot.xml</text:p>
          </table:table-cell>
          <table:table-cell office:value-type="string" table:style-name="ce3">
            <text:p>4.Campagne</text:p>
          </table:table-cell>
          <table:table-cell office:value-type="string" table:style-name="ce3">
            <text:p><text:s/>5. Considérant, en second lieu, que si, la veille du second tour, un tract, diffusé par le Front national, était intitulé en gros caractères ' RAOULT est battu ', il était sous-titré : ' C'est arithmétique et il le sait ' ; que, par suite, le grief tiré de ce que ce tract aurait donné à penser que M. RAOULT n'était pas candidat au second tour ne peut être accueilli,</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1\rejet\CONSTEXT000017664376_annot.xml</text:p>
          </table:table-cell>
          <table:table-cell office:value-type="string" table:style-name="ce3">
            <text:p>4.Campagne</text:p>
          </table:table-cell>
          <table:table-cell office:value-type="string" table:style-name="ce3">
            <text:p><text:s/>2. Considérant que, si le requérant conteste les mentions de la circulaire de l'un des candidats qui a été adressée aux électeurs, le contenu de cette circulaire n'excède pas les limites de la polémique électora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1\rejet\CONSTEXT000017664376_annot.xml</text:p>
          </table:table-cell>
          <table:table-cell office:value-type="string" table:style-name="ce3">
            <text:p>4.Campagne</text:p>
          </table:table-cell>
          <table:table-cell office:value-type="string" table:style-name="ce3">
            <text:p><text:s/>3. Considérant que la presse écrite a le droit de rendre librement compte d'une campagne électorale ; que doit être ainsi rejeté le grief tiré de ce que la presse écrite aurait insuffisamment évoqué la campagne de certains candidat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1\rejet\CONSTEXT000017664376_annot.xml</text:p>
          </table:table-cell>
          <table:table-cell office:value-type="string" table:style-name="ce3">
            <text:p>4.Campagne</text:p>
          </table:table-cell>
          <table:table-cell office:value-type="string" table:style-name="ce3">
            <text:p><text:s/>5. Considérant que le grief tiré de ce que des irrégularités auraient affecté l'affichage sur les panneaux électoraux n'est assorti d'aucun élément de preuv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29_annot.xml</text:p>
          </table:table-cell>
          <table:table-cell office:value-type="string" table:style-name="ce3">
            <text:p>7.Opérations</text:p>
          </table:table-cell>
          <table:table-cell office:value-type="string" table:style-name="ce3">
            <text:p><text:s/>3. Considérant que l'établissement d'attestations d'inscription à l'extérieur des bureaux de vote n'est ni prohibé par le code électoral, ni en lui-même de nature à influencer le résultat du scrutin ; qu'en l'espèce, il n'est pas établi que cette pratique ait eu un autre objet ; qu'aucun des deux témoignages produits par le requérant n'établit, ni même n'allègue, que les listes mises à la disposition des employés municipaux à l'extérieur des bureaux de vote aient été utilisées pour faire pression sur des électeurs ; que, dès lors, la requête de M. BENARD doit être rejetée, - SUR LA REQUETE DE MME GATELLIE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31_annot.xml</text:p>
          </table:table-cell>
          <table:table-cell office:value-type="string" table:style-name="ce3">
            <text:p>7.Opérations</text:p>
          </table:table-cell>
          <table:table-cell office:value-type="string" table:style-name="ce3">
            <text:p><text:s/>2. Considérant qu'à l'appui de sa requête, M. BARBE, qui a obtenu 136 voix lors du premier tour de l'élection contestée, allègue que les bulletins de deux candidats, qui ont recueilli respectivement 86 et 218 voix, n'auraient pas été conformes aux prescriptions réglementaires ; que l'heure de clôture du scrutin n'aurait pas été respectée dans quelques bureaux de vote ; que les présidents des bureaux de vote concernés l'auraient empêché de mentionner ces dépassements d'horaire sur les procès-verbaux des opérations de vote ; qu'il n'aurait pas obtenu l'autorisation de tenir une réunion sur le territoire de la commune de Morne Rouge ; que quatorze procurations seraient irrégulières</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02\rejet\CONSTEXT000017664431_annot.xml</text:p>
          </table:table-cell>
          <table:table-cell office:value-type="string" table:style-name="ce3">
            <text:p>4.Campagne</text:p>
          </table:table-cell>
          <table:table-cell office:value-type="string" table:style-name="ce3">
            <text:p><text:s/>3. Considérant qu'eu égard au nombre de voix obtenues par chacun des candidats, les faits allégués, à les supposer établis, n'ont pu manifestement avoir une influence sur l'issue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34_annot.xml</text:p>
          </table:table-cell>
          <table:table-cell office:value-type="string" table:style-name="ce3">
            <text:p>6.Financement</text:p>
          </table:table-cell>
          <table:table-cell office:value-type="string" table:style-name="ce3">
            <text:p><text:s/>2. Considérant que, si l'envoi des documents précités a été pris en charge par les services de l'Assemblée nationale, il résulte de ce qui précède que les frais d'expédition correspondants ne peuvent être regardés comme ayant contribué au financement de la campagne de M. GUILLET ; que ces frais ne constituent donc pas des dons illégalement consentis par une personne morale, au sens du deuxième alinéa de l'article L. 52-8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34_annot.xml</text:p>
          </table:table-cell>
          <table:table-cell office:value-type="string" table:style-name="ce3">
            <text:p>6.Financement</text:p>
          </table:table-cell>
          <table:table-cell office:value-type="string" table:style-name="ce3">
            <text:p><text:s/>3. Considérant qu'il ne résulte pas de l'instruction que l'association intitulée ' Comité de soutien à Jean-Jacques GUILLET ' aurait collecté des fonds ayant directement financé la campagne du candidat ; qu'ainsi, M. GIORDANO n'est pas fondé à soutenir que les dispositions de l'article L. 52-4 du code électoral ont été méconnu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34_annot.xml</text:p>
          </table:table-cell>
          <table:table-cell office:value-type="string" table:style-name="ce3">
            <text:p>6.Financement</text:p>
          </table:table-cell>
          <table:table-cell office:value-type="string" table:style-name="ce3">
            <text:p><text:s/>4. Considérant que le grief tiré de ce que M. GUILLET n'aurait pas fait figurer le coût de fonctionnement de son site Internet dans le montant des dépenses de son compte de campagne manque en fait ; - SUR LES CONCLUSIONS TENDANT À L'ANNULATION DES OPÉRATIONS ÉLECTORAL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34_annot.xml</text:p>
          </table:table-cell>
          <table:table-cell office:value-type="string" table:style-name="ce3">
            <text:p>4.Campagne</text:p>
          </table:table-cell>
          <table:table-cell office:value-type="string" table:style-name="ce3">
            <text:p><text:s/>5. Considérant qu'aux termes du deuxième alinéa de l'article L. 49 du code électoral : ' A partir de la veille du scrutin à zéro heure, il est interdit de diffuser ou de faire diffuser par tout moyen de communication audiovisuelle tout message ayant le caractère de propagande électorale ' ; que, M. GUILLET ayant fermé l'accès au contenu de son site Internet entre le vendredi 7 juin 2002 à minuit et l'heure de clôture du scrutin de premier tour, ainsi qu'entre le vendredi 14 juin à minuit et l'heure de clôture du scrutin de second tour, M. GIORDANO n'est, pas fondé, en tout état de cause, à soutenir que l'existence de ce site Internet a violé les dispositions précitées de l'article L. 49 du code électoral</text:p>
          </table:table-cell>
          <table:table-cell table:number-columns-repeated="16377"/>
        </table:table-row>
        <table:table-row table:style-name="ro1">
          <table:table-cell office:value-type="string" table:style-name="ce7">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02\rejet\CONSTEXT000017664436_annot.xml</text:p>
          </table:table-cell>
          <table:table-cell office:value-type="string" table:style-name="ce3">
            <text:p>4.Campagne</text:p>
          </table:table-cell>
          <table:table-cell office:value-type="string" table:style-name="ce3">
            <text:p><text:s/>1. Considérant qu'aux termes du second alinéa de l'article L. 52-1 du code électoral : ' A compter du premier jour du sixième mois précédant le mois au cours duquel il doit être procédé à des élections générales, aucune campagne de promotion publicitaire des réalisations ou de la gestion d'une collectivité ne peut être organisée sur le territoire des collectivités intéressées par le scrutin...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36_annot.xml</text:p>
          </table:table-cell>
          <table:table-cell office:value-type="string" table:style-name="ce3">
            <text:p>4.Campagne</text:p>
          </table:table-cell>
          <table:table-cell office:value-type="string" table:style-name="ce3">
            <text:p><text:s/>2. Considérant qu'il résulte de l'instruction que le bulletin départemental intitulé ' Info n° 1 ' et portant sur des travaux réalisés par le conseil général de Seine-Maritime en matière de voirie ne peut être regardé, par son contenu, comme constituant une ' campagne de promotion publicitaire ' des réalisations ou de la gestion de ce département, au sens des dispositions précitées du second alinéa de l'article L. 52-1 du code électoral ; - SUR LES AUTRES GRIEFS RELATIFS AU DÉROULEMENT DE LA CAMPAGNE ÉLECTORA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36_annot.xml</text:p>
          </table:table-cell>
          <table:table-cell office:value-type="string" table:style-name="ce3">
            <text:p>4.Campagne</text:p>
          </table:table-cell>
          <table:table-cell office:value-type="string" table:style-name="ce3">
            <text:p><text:s/>3. Considérant que, si M. JEANNE soutient que M. FIDELIN a distribué des tracts et divers documents en violation de l'article L. 165 du code électoral, il résulte de l'instruction que le requérant a usé des mêmes pratiques ; qu'au demeurant, ces tracts et documents ne comportaient pas d'éléments nouveaux de polémique électorale auxquels M. JEANNE n'aurait pas eu le temps de répondr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36_annot.xml</text:p>
          </table:table-cell>
          <table:table-cell office:value-type="string" table:style-name="ce3">
            <text:p>6.Financement</text:p>
          </table:table-cell>
          <table:table-cell office:value-type="string" table:style-name="ce3">
            <text:p><text:s/>6. Considérant que ni la distribution du bulletin susmentionné relatif à la voirie départementale, ni l'utilisation dans la plaquette de communication de M. FIDELIN de la photographie d'un panneau publicitaire du conseil général, ni la lettre de soutien de M. REVET, sénateur, dont le coût a été pris en charge par le compte de campagne, ne peuvent être regardés comme constituant des dons d'une personne morale prohibés par l'article L. 52-8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36_annot.xml</text:p>
          </table:table-cell>
          <table:table-cell office:value-type="string" table:style-name="ce3">
            <text:p>6.Financement</text:p>
          </table:table-cell>
          <table:table-cell office:value-type="string" table:style-name="ce3">
            <text:p><text:s/>7. Considérant, en second lieu, que M. JEANNE soutient qu'en imputant au compte de campagne de M. FIDELIN toutes les dépenses engagées, selon le requérant, en vue de l'élection du candidat élu, le total des dépenses dépasserait le plafond fixé en application de l'article L. 52-11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36_annot.xml</text:p>
          </table:table-cell>
          <table:table-cell office:value-type="string" table:style-name="ce3">
            <text:p>6.Financement</text:p>
          </table:table-cell>
          <table:table-cell office:value-type="string" table:style-name="ce3">
            <text:p><text:s/>8. Considérant que, comme il a été dit ci-dessus, les dépenses engagées par le département pour faire connaître ses activités et qui n'ont pas revêtu un caractère électoral n'ont pas à figurer au compte de campagne ; que, s'agissant de l'ensemble des dépenses engagées ou effectuées par M. FIDELIN ou pour son compte en vue de son élection, hors celles de la campagne officielle, il ne résulte pas de l'instruction, et notamment de la décision de la Commission nationale des comptes de campagne et des financements politiques, qu'elles n'aient pas été retracées dans le compte de campagn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39_annot.xml</text:p>
          </table:table-cell>
          <table:table-cell office:value-type="string" table:style-name="ce3">
            <text:p>6.Financement</text:p>
          </table:table-cell>
          <table:table-cell office:value-type="string" table:style-name="ce3">
            <text:p><text:s/>3. Considérant, en deuxième lieu, que les frais d'envoi des deux lettres ci-dessus mentionnées ont été pris en charge par le compte de campagne ; qu'il ne résulte pas de l'instruction que des dépenses d'affichage et de permanence exposées pour le compte du candidat élu auraient été omises ; que celles concernant la réunion électorale organisée au Temple-sur-Lot par ' l'Union pour la majorité présidentielle ' en faveur des trois candidats qu'elle avait investis dans le département ont été retenues pour le tiers de leur montant ; que l'utilisation gratuite de moyens collectifs de transport à l'occasion de cette réunion n'est pas établi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39_annot.xml</text:p>
          </table:table-cell>
          <table:table-cell office:value-type="string" table:style-name="ce3">
            <text:p>4.Campagne</text:p>
          </table:table-cell>
          <table:table-cell office:value-type="string" table:style-name="ce3">
            <text:p><text:s/>5. Considérant que les lettres mentionnées ci-dessus n'ont introduit dans la campagne électorale aucun élément nouveau auquel M. CAHUZAC n'aurait pas eu le temps de répondr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41_annot.xml</text:p>
          </table:table-cell>
          <table:table-cell office:value-type="string" table:style-name="ce3">
            <text:p>7.Opérations</text:p>
          </table:table-cell>
          <table:table-cell office:value-type="string" table:style-name="ce3">
            <text:p><text:s/>5. Considérant, en premier lieu, qu'aucune prescription législative ou réglementaire n'impose d'annexer au procès-verbal des opérations électorales les enveloppes réglementaires trouvées vides dans l'urne ; que, en deuxième lieu, l'examen des procès-verbaux et des pièces annexées, auquel il a été procédé, n'a pas révélé d'anomalie dans le décompte des bulletins déclarés nuls ; que, en troisième lieu, si un certain nombre de bulletins blancs et nuls annexés aux procès-verbaux de plusieurs bureaux de vote n'ont pas été paraphés par les membres de ces bureaux de vote et si la mention de la cause de leur annexion a été omise, ces bulletins correspondent aux indications chiffrées relatives aux suffrages tenus pour nuls figurant dans les procès-verbaux examinés, lesquels ne portent la mention d'aucune réclamation ; qu'enfin, il ne résulte pas de l'instruction que ces omissions de contreseing et de mention de la cause de l'annexion aient eu pour objet ou pour effet de porter atteinte à la sincérité du scrutin ; qu'ainsi, sans qu'il soit besoin de procéder au supplément d'instruction demandé par le requérant, le grief tiré d'irrégularités commises dans l'annulation de bulletins doit être écarté</text:p>
          </table:table-cell>
          <table:table-cell table:number-columns-repeated="16377"/>
        </table:table-row>
        <table:table-row table:style-name="ro1">
          <table:table-cell office:value-type="string" table:style-name="ce7">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02\rejet\CONSTEXT000017664442_annot.xml</text:p>
          </table:table-cell>
          <table:table-cell office:value-type="string" table:style-name="ce3">
            <text:p>6.Financement</text:p>
          </table:table-cell>
          <table:table-cell office:value-type="string" table:style-name="ce3">
            <text:p><text:s/>3. Considérant qu'aux termes du deuxième alinéa de l'article L. 52-8 du code électoral : ' Les personnes morales, à l'exception des partis et groupements politiques, ne peuvent participer au financement de la campagne électorale d'un candidat, ni en lui consentant des dons sous quelque forme que ce soit, ni en lui fournissant des biens, services ou autres avantages indirects à des prix inférieurs à ceux qui sont habituellement pratiqués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42_annot.xml</text:p>
          </table:table-cell>
          <table:table-cell office:value-type="string" table:style-name="ce3">
            <text:p>6.Financement</text:p>
          </table:table-cell>
          <table:table-cell office:value-type="string" table:style-name="ce3">
            <text:p><text:s/>4. Considérant que les panneaux susmentionnés ne comportent aucune référence à l'élection ni aucune mention de soutien à la candidature de M. JACQUE ; que celui-ci nie toute participation directe ou indirecte à leur mise en place ; qu'il ne résulte pas non plus de l'instruction que les panneaux aient été implantés avec son accord ; que, dès lors, il ne peut être regardé comme ayant bénéficié d'un don d'une personne morale, prohibé par l'article L. 52-8 du code électoral ; qu'il n'avait pas non plus à inscrire les dépenses correspondantes dans son compte de campagn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43_annot.xml</text:p>
          </table:table-cell>
          <table:table-cell office:value-type="string" table:style-name="ce3">
            <text:p>4.Campagne</text:p>
          </table:table-cell>
          <table:table-cell office:value-type="string" table:style-name="ce3">
            <text:p><text:s/>1. Considérant que le grief selon lequel M. RAOULT aurait fait procéder à la pose d'affiches en dehors des emplacements prévus par les dispositions de l'article L. 51 du code électoral n'est assorti d'aucune précision ni d'aucune justification permettant au Conseil constitutionnel d'en apprécier la porté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47_annot.xml</text:p>
          </table:table-cell>
          <table:table-cell office:value-type="string" table:style-name="ce3">
            <text:p>7.Opérations</text:p>
          </table:table-cell>
          <table:table-cell office:value-type="string" table:style-name="ce3">
            <text:p><text:s/>3. Considérant que, dans plusieurs bureaux de vote de la commune de Sainte-Marie, le scrutin n'a pu s'ouvrir à huit heures, en violation des dispositions de l'article R. 41 du code électoral ; que, toutefois, il résulte de l'instruction que ces retards dans l'ouverture de bureaux de vote qui n'ont le plus souvent pas atteint une heure, auraient effectivement empêché certains électeurs de participer au vote ou altéré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47_annot.xml</text:p>
          </table:table-cell>
          <table:table-cell office:value-type="string" table:style-name="ce3">
            <text:p>7.Opérations</text:p>
          </table:table-cell>
          <table:table-cell office:value-type="string" table:style-name="ce3">
            <text:p><text:s/>4. Considérant que la circonstance qu'un bureau de vote a ouvert avec retard ne saurait, par elle-même, justifier une fermeture de ce bureau au-delà de l'heure légale de clôture du scrutin ; qu'ainsi, M. TURINAY ne peut utilement soutenir que les bureaux de vote de Sainte-Marie auraient dû fermer après dix-huit heures en raison de leur ouverture tardiv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47_annot.xml</text:p>
          </table:table-cell>
          <table:table-cell office:value-type="string" table:style-name="ce3">
            <text:p>7.Opérations</text:p>
          </table:table-cell>
          <table:table-cell office:value-type="string" table:style-name="ce3">
            <text:p><text:s/>5. Considérant que, si M. TURINAY fait état de 'pressions' effectuées par des personnes, installées à l'extérieur des bureaux de vote, qui incitaient les électeurs de Sainte-Marie à ne pas aller voter, et s'il produit des témoignages en ce sens, ces dires ne sont corroborés, ni par les rapports des délégués de la commission de contrôle des opérations de vote, ni par les constats opérés par les patrouilles de gendarmerie présentes sur les lieux ; qu'il suit de là que les faits allégués, à les supposer établis, ne peuvent être regardés comme ayant altéré la sincérité du scrutin ; qu'il en est de même des prétendus 'incidents graves' dont il est fait état, sans aucune précision, dans les bureaux de vote de Pain de Sucre et de Bezaud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47_annot.xml</text:p>
          </table:table-cell>
          <table:table-cell office:value-type="string" table:style-name="ce3">
            <text:p>7.Opérations</text:p>
          </table:table-cell>
          <table:table-cell office:value-type="string" table:style-name="ce3">
            <text:p><text:s/>6. Considérant que la circonstance, à la supposer établie, que tous les bureaux de vote de Sainte-Marie n'auraient pas eu quatre assesseurs, et que, en raison de l'absence momentanée de certains d'entre eux, les opérations de vote se seraient parfois déroulées en présence de moins de trois membres du bureau, n'est pas de nature à altérer la sincérité du scrutin, dès lors qu'il ne résulte pas de l'instruction, et n'est d'ailleurs pas allégué, que de telles absences auraient eu pour but ou pour effet de favoriser des fraudes ; qu'il en est notamment ainsi, quelque regrettable qu'elle soit, de l'absence délibérée pendant toute la journée de M. LORDINOT, maire de Sainte-Marie et président du bureau de vote n°1 ; SUR LES GRIEFS RELATIFS AUX OPÉRATIONS DU SECOND TOUR DANS LA COMMUNE DE TRINI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47_annot.xml</text:p>
          </table:table-cell>
          <table:table-cell office:value-type="string" table:style-name="ce3">
            <text:p>7.Opérations</text:p>
          </table:table-cell>
          <table:table-cell office:value-type="string" table:style-name="ce3">
            <text:p><text:s/>8. Considérant que, si M. TURINAY relève des discordances, dans certains bureaux de vote, entre le nombre de suffrages exprimés mentionné dans les procès-verbaux et le nombre qui figure sur les feuilles de pointage jointes aux procès-verbaux, il résulte de l'instruction que le pointage s'est effectué, lors du dépouillement, sur d'autres documents que ceux qui sont joints aux procès-verbaux ; que cette méconnaissance des dispositions de l'article R. 68 du code électoral, pour regrettable qu'elle soit, ne saurait toutefois être regardée comme ayant altéré la sincérité du scrutin, dès lors qu'il ne résulte pas de l'instruction, et n'est d'ailleurs pas soutenu, que le nombre de suffrages figurant au procès-verbal serait erron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47_annot.xml</text:p>
          </table:table-cell>
          <table:table-cell office:value-type="string" table:style-name="ce3">
            <text:p>7.Opérations</text:p>
          </table:table-cell>
          <table:table-cell office:value-type="string" table:style-name="ce3">
            <text:p><text:s/>9. Considérant que M. TURINAY soutient que le nombre d'émargements, tel qu'il a été arrêté sur les listes de plusieurs bureaux de vote, ne correspond pas au nombre effectif des émargements ; que cette circonstance est cependant sans incidence sur la régularité du scrutin, dès lors qu'il n'est ni établi, ni même soutenu, que le nombre d'émargements portés aux procès-verbaux de ces bureaux ne correspondrait pas aux émargements effectifs, ou que le nombre de ces derniers différerait du nombre de bulletins trouvés dans l'urn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47_annot.xml</text:p>
          </table:table-cell>
          <table:table-cell office:value-type="string" table:style-name="ce3">
            <text:p>7.Opérations</text:p>
          </table:table-cell>
          <table:table-cell office:value-type="string" table:style-name="ce3">
            <text:p><text:s/>11. Considérant que le requérant se borne à soutenir que les listes d'émargement n'auraient pas été 'arrêtées, en lettres et en chiffres', après la clôture du scrutin, dans plusieurs bureaux de vote desdites communes ; qu'il ne soutient toutefois ni que ces listes n'auraient pas été signées par les membres des bureaux conformément aux dispositions de l'article R. 62 du code électoral, ni que les nombres d'émargements figurant aux procès-verbaux seraient entachés d'erreurs, ni que ces nombres différeraient des nombres de bulletins trouvés dans l'urne ; que le grief doit, dès lors, être écarté ; SUR LES GRIEFS RELATIFS AUX OPÉRATIONS DU SECOND TOUR DANS LA COMMUNE DE MACOUBA</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49_annot.xml</text:p>
          </table:table-cell>
          <table:table-cell office:value-type="string" table:style-name="ce3">
            <text:p>4.Campagne</text:p>
          </table:table-cell>
          <table:table-cell office:value-type="string" table:style-name="ce3">
            <text:p><text:s/>2. Considérant toutefois que la presse écrite a le droit de rendre compte librement d'une campagne électorale ; qu'au demeurant, les documents produits n'établissent en rien les affirmations du requérant ; que le grief doit, dès lors, être écar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49_annot.xml</text:p>
          </table:table-cell>
          <table:table-cell office:value-type="string" table:style-name="ce3">
            <text:p>4.Campagne</text:p>
          </table:table-cell>
          <table:table-cell office:value-type="string" table:style-name="ce3">
            <text:p><text:s/>4. Considérant que, si le requérant allègue, en troisième lieu, que des panneaux apposés par le conseil régional, autour de chantiers dont il avait la maîtrise d'ouvrage, auraient favorisé l'un des deux candidats présents au second tour de scrutin, les documents qu'il produit au soutien de cette affirmation montrent que ces emplacements n'ont servi de support que pour des affiches du candidat battu ; que le grief doit, dès lors, être écar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51_annot.xml</text:p>
          </table:table-cell>
          <table:table-cell office:value-type="string" table:style-name="ce3">
            <text:p>7.Opérations</text:p>
          </table:table-cell>
          <table:table-cell office:value-type="string" table:style-name="ce3">
            <text:p><text:s/>2. Considérant qu'aucune disposition législative ou réglementaire applicable à l'élection des députés n'interdit l'impression de mentions en plusieurs couleurs sur les bulletins de vote ; que, par suite, le requérant n'est pas fondé à soutenir que les bulletins de vote de M. Jean-Claude FLORY auraient dû être considérés comme nul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61_annot.xml</text:p>
          </table:table-cell>
          <table:table-cell office:value-type="string" table:style-name="ce3">
            <text:p>4.Campagne</text:p>
          </table:table-cell>
          <table:table-cell office:value-type="string" table:style-name="ce3">
            <text:p><text:s/>2. Considérant que, si le requérant reproche au candidat élu d'avoir fait apposer des affiches comportant une combinaison des couleurs bleu, blanc, rouge en violation de l'article R. 27 du code électoral, l'utilisation de ces couleurs parmi d'autres n'a pas conféré un caractère officiel à la candidature de l'intéressé ; que, dès lors, le grief manque en fai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61_annot.xml</text:p>
          </table:table-cell>
          <table:table-cell office:value-type="string" table:style-name="ce3">
            <text:p>4.Campagne</text:p>
          </table:table-cell>
          <table:table-cell office:value-type="string" table:style-name="ce3">
            <text:p><text:s/>4. Considérant que la presse écrite a le droit de rendre compte librement d'une campagne électorale ; que doit être ainsi rejeté le grief tiré de ce que celle-ci aurait insuffisamment évoqué la campagne du requéra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61_annot.xml</text:p>
          </table:table-cell>
          <table:table-cell office:value-type="string" table:style-name="ce3">
            <text:p>4.Campagne</text:p>
          </table:table-cell>
          <table:table-cell office:value-type="string" table:style-name="ce3">
            <text:p><text:s/>5. Considérant qu'à le supposer établi, le refus par les stations de radio et de télévision de rendre compte de sa candidature, n'a pu, au regard du très faible nombre de voix obtenues par M. MOITRY, altérer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61_annot.xml</text:p>
          </table:table-cell>
          <table:table-cell office:value-type="string" table:style-name="ce3">
            <text:p>4.Campagne</text:p>
          </table:table-cell>
          <table:table-cell office:value-type="string" table:style-name="ce3">
            <text:p><text:s/>6. Considérant, enfin, que le grief tiré d'irrégularités qui auraient été commises par les autorités municipales dans l'installation des panneaux d'affichage mis à la disposition des candidats n'est pas assorti des précisions permettant d'en apprécier la porté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62_annot.xml</text:p>
          </table:table-cell>
          <table:table-cell office:value-type="string" table:style-name="ce3">
            <text:p>4.Campagne</text:p>
          </table:table-cell>
          <table:table-cell office:value-type="string" table:style-name="ce3">
            <text:p><text:s/>4. Considérant que la circonstance, invoquée par Mme LUCILLY, que le candidat élu anime ses campagnes électorales par un accompagnement musical ne contrevient à aucune disposition du code électoral, dès lors que la dépense correspondante figure au compte de campagn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62_annot.xml</text:p>
          </table:table-cell>
          <table:table-cell office:value-type="string" table:style-name="ce3">
            <text:p>4.Campagne</text:p>
          </table:table-cell>
          <table:table-cell office:value-type="string" table:style-name="ce3">
            <text:p><text:s/>6. Considérant que ces deux requérants affirment qu'un courrier électoral de Mme LUCILLY aurait été falsifié, puis envoyé à de nombreux électeurs, pour faire croire qu'elle sollicitait un ' soutien moral ' et une contribution financière de 300 euros ; que ce fait, à le supposer établi, n'aurait pu modifier l'issue du scrutin en raison du nombre de voix obtenues par les différents candidat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65_annot.xml</text:p>
          </table:table-cell>
          <table:table-cell office:value-type="string" table:style-name="ce3">
            <text:p>4.Campagne</text:p>
          </table:table-cell>
          <table:table-cell office:value-type="string" table:style-name="ce3">
            <text:p><text:s/>3. Considérant, en second lieu, que M. LACROIX soutient qu'il n'a pu participer à des débats organisés par la station régionale du 'Réseau France-Outre Mer' à La Réunion, alors que des représentants de différents partis politiques y avaient été conviés ; qu'il aurait été ainsi victime, selon lui, d'une irrégularité et que cette dernière aurait faussé les résultats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68_annot.xml</text:p>
          </table:table-cell>
          <table:table-cell office:value-type="string" table:style-name="ce3">
            <text:p>6.Financement</text:p>
          </table:table-cell>
          <table:table-cell office:value-type="string" table:style-name="ce3">
            <text:p><text:s/>2. Considérant que le compte de campagne de M. de ROCCA-SERRA a été arrêté en dépenses par la Commission nationale des comptes de campagne et des financements politiques à un montant de à 48 431 euros ; que ce montant ne dépasse pas le plafond des dépenses électorales tel qu'il résulte de l'article L. 52-12 du code électoral ; que, si les requérants allèguent que certaines dépenses auraient été omises, ils n'apportent pas d'éléments établissant une telle omission qui n'a pas été relevée par la Commission et qui ne résulte pas de l'instruction ; que, dès lors, le grief tiré de la violation de l'article L. 52-12 doit être écarté ; - SUR LES CONCLUSIONS TENDANT À L'ANNULATION DES OPÉRATIONS ÉLECTORAL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68_annot.xml</text:p>
          </table:table-cell>
          <table:table-cell office:value-type="string" table:style-name="ce3">
            <text:p>7.Opérations</text:p>
          </table:table-cell>
          <table:table-cell office:value-type="string" table:style-name="ce3">
            <text:p><text:s/>8. Considérant que, si, à un moment donné, les bulletins de vote de M. FRANCISCI ont été recouverts par ceux d'un autre candidat dans le bureau de vote de Bastelica, il ne résulte pas de l'instruction que cette situation, qui n'a été constatée que par un seul électeur, ait été de nature à altérer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68_annot.xml</text:p>
          </table:table-cell>
          <table:table-cell office:value-type="string" table:style-name="ce3">
            <text:p>7.Opérations</text:p>
          </table:table-cell>
          <table:table-cell office:value-type="string" table:style-name="ce3">
            <text:p><text:s/>9. Considérant que la liste d'émargement du bureau de vote de la commune de Guarguale comporte, inscrits à l'encre rouge, les noms des mandataires d'électeurs ayant donné procuration de vote ; qu'ainsi le grief tiré d'une méconnaissance des prescriptions de l'article R. 76 du code électoral manque en fai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68_annot.xml</text:p>
          </table:table-cell>
          <table:table-cell office:value-type="string" table:style-name="ce3">
            <text:p>7.Opérations</text:p>
          </table:table-cell>
          <table:table-cell office:value-type="string" table:style-name="ce3">
            <text:p><text:s/>10. Considérant que les allégations des requérants relatives à l'irrégularité du vote par procuration d'électeurs non désignés de Porto-Vecchio ne sont pas assorties des précisions permettant d'en apprécier le bien-fond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68_annot.xml</text:p>
          </table:table-cell>
          <table:table-cell office:value-type="string" table:style-name="ce3">
            <text:p>7.Opérations</text:p>
          </table:table-cell>
          <table:table-cell office:value-type="string" table:style-name="ce3">
            <text:p><text:s/>11. Considérant que cinq listes d'émargement comportent, chacune, une trace d'effacement recouverte par une signature ; qu'il ne résulte pas de l'instruction que ces corrections ponctuelles, qui n'ont pas donné lieu à observations sur les procès-verbaux, constituent des irrégularités entachant la validité des cinq votes ou qu'elles révèlent l'organisation d'une fraud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68_annot.xml</text:p>
          </table:table-cell>
          <table:table-cell office:value-type="string" table:style-name="ce3">
            <text:p>7.Opérations</text:p>
          </table:table-cell>
          <table:table-cell office:value-type="string" table:style-name="ce3">
            <text:p><text:s/>14. Considérant qu'il résulte de l'instruction que les signatures apposées par dix-neuf électeurs lors du premier tour de scrutin sur les listes d'émargement des bureaux de vote d'Aullène, Porto-Vecchio (bureaux n°s 2, 3, 4), Ajaccio (bureaux n°s 36 et 38) et Olivèse différaient de celles apposées lors du second tour sans que cette différence puisse être expliquée par le recours au vote par procuration ; que ces suffrages ne peuvent être tenus pour régulièrement exprimé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68_annot.xml</text:p>
          </table:table-cell>
          <table:table-cell office:value-type="string" table:style-name="ce3">
            <text:p>7.Opérations</text:p>
          </table:table-cell>
          <table:table-cell office:value-type="string" table:style-name="ce3">
            <text:p><text:s/>16. Considérant que, si la liste d'émargement du bureau de vote de la commune de Casalabriva ne comporte pas les signatures des membres du bureau de vote ni l'indication du nombre de votants, en méconnaissance des prescriptions de l'article R. 62 du code électoral, il résulte de l'instruction que le nombre de 103 votants porté sur le procès-verbal, qui est signé par les membres du bureau de vote, correspond au nombre d'électeurs ayant signé la liste d'émargement ; qu'ainsi, il n'est pas établi que les négligences commises dans la tenue de cette liste par les membres du bureau de vote ont entraîné un décompte inexact des suffrag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68_annot.xml</text:p>
          </table:table-cell>
          <table:table-cell office:value-type="string" table:style-name="ce3">
            <text:p>7.Opérations</text:p>
          </table:table-cell>
          <table:table-cell office:value-type="string" table:style-name="ce3">
            <text:p><text:s/>18. Considérant que, si les procès-verbaux de quelques bureaux de vote ne mentionnent pas le nombre de votants d'après la liste d'émargement, il n'est pas établi, en l'absence de discordance signalée entre, d'une part, le nombre d'enveloppes et de bulletins sans enveloppe trouvés dans l'urne et, d'autre part, le nombre de signatures figurant sur la liste d'émargement, que les omissions relevées par les requérants aient pu favoriser des erreurs ou des fraudes ; . En ce qui concerne les conséquences de l'ensemble des irrégularités relevées ci-dessus</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décision du juge</text:p>
          </table:table-cell>
          <table:table-cell office:value-type="string" table:style-name="ce3">
            <text:p>file:\\\P:\CRJ\RECHERCHE\PROJET_JADE\JADE_COMMUN\Annotation\Annotation_automatique_Maritaud\Technologie_light\Super-catégories-objets_0,8\AN\2002\rejet\CONSTEXT000017664468_annot.xml</text:p>
          </table:table-cell>
          <table:table-cell office:value-type="string" table:style-name="ce3">
            <text:p>7.Opérations</text:p>
          </table:table-cell>
          <table:table-cell office:value-type="string" table:style-name="ce3">
            <text:p><text:s/>20. Considérant qu'il résulte de tout ce qui précède que les requêtes de MM. FRANCISCI et SIMONGIOVANNI doivent être rejeté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73_annot.xml</text:p>
          </table:table-cell>
          <table:table-cell office:value-type="string" table:style-name="ce3">
            <text:p>4.Campagne</text:p>
          </table:table-cell>
          <table:table-cell office:value-type="string" table:style-name="ce3">
            <text:p><text:s/>6. Considérant, en troisième lieu, que ni les éditoriaux, ni les autres articles des numéros de janvier, mars et mai 2002 de la revue bimestrielle de la communauté d'agglomération d'Hénin-Carvin, alors même qu'ils émaneraient de personnalités proches de M. FACON, ne peuvent être regardés, par leur contenu, comme constituant, au sens du deuxième alinéa de l'article L 52-1 du code électoral, une 'campagne de promotion publicitaire' des réalisations ou de la gestion de cet établissement public de coopération intercommunale ; qu'est de ce fait sans incidence la circonstance que la présentation et la périodicité de cette revue seraient différentes de celles du bulletin publié antérieurement par le district avant que celui-ci ne se transforme en communauté d'agglomération ; que le grief tiré par MM. GILSON et VERGNAUD de la violation des dispositions susmentionnées doit dès lors être écarté ; SUR LA REQUÊTE N° 2002-2630</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73_annot.xml</text:p>
          </table:table-cell>
          <table:table-cell office:value-type="string" table:style-name="ce3">
            <text:p>4.Campagne</text:p>
          </table:table-cell>
          <table:table-cell office:value-type="string" table:style-name="ce3">
            <text:p><text:s/>7. Considérant, en premier lieu, que, si M. MONKA soutient que M. DALONGEVILLE, candidat au premier tour, a procédé à un affichage en dehors des emplacements qui lui étaient réservés, cette irrégularité, qui n'est établie que pour une affiche, n'a pu avoir d'influence sur les résultats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73_annot.xml</text:p>
          </table:table-cell>
          <table:table-cell office:value-type="string" table:style-name="ce3">
            <text:p>4.Campagne</text:p>
          </table:table-cell>
          <table:table-cell office:value-type="string" table:style-name="ce3">
            <text:p><text:s/>8. Considérant, en deuxième lieu, que, si le requérant fait valoir que les documents de propagande électorale qui lui ont été adressés ne contenaient pas le bulletin de vote ou la profession de foi de deux autres candidats, il n'est ni établi, ni même allégué par lui que d'autres électeurs n'auraient pas reçu les documents électoraux de l'ensemble des candidats</text:p>
          </table:table-cell>
          <table:table-cell table:number-columns-repeated="16377"/>
        </table:table-row>
        <table:table-row table:style-name="ro1">
          <table:table-cell office:value-type="string" table:style-name="ce7">
            <text:p>Non </text:p>
          </table:table-cell>
          <table:table-cell table:number-columns-repeated="2"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2002\rejet\CONSTEXT000017664473_annot.xml</text:p>
          </table:table-cell>
          <table:table-cell office:value-type="string" table:style-name="ce3">
            <text:p>4.Campagne</text:p>
          </table:table-cell>
          <table:table-cell office:value-type="string" table:style-name="ce3">
            <text:p><text:s/>10. Considérant, en quatrième lieu, qu'aux termes de l'article R. 30 du code électoral : 'Les bulletins ne peuvent dépasser les formats définis ci-après : ... 105 mm x 148 mm pour les bulletins comportant deux noms' ; que le dépôt de bulletins ayant une dimension inférieure à ce format n'est pas interdit par ces dispositions ; que le grief tiré par M. MONKA de ce que certains bulletins de vote présentaient une dimension inférieure à ce format n'est dès lors pas fondé</text:p>
          </table:table-cell>
          <table:table-cell table:number-columns-repeated="16377"/>
        </table:table-row>
        <table:table-row table:style-name="ro1">
          <table:table-cell office:value-type="string" table:style-name="ce7">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76_annot.xml</text:p>
          </table:table-cell>
          <table:table-cell office:value-type="string" table:style-name="ce3">
            <text:p>4.Campagne</text:p>
          </table:table-cell>
          <table:table-cell office:value-type="string" table:style-name="ce3">
            <text:p><text:s/>2. Considérant, en deuxième lieu, que, si l'article L. 49 du code électoral ' interdit de distribuer ou faire distribuer, le jour du scrutin, des bulletins, circulaires et autres documents ', cette interdiction ne s'applique pas la veille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76_annot.xml</text:p>
          </table:table-cell>
          <table:table-cell office:value-type="string" table:style-name="ce3">
            <text:p>4.Campagne</text:p>
          </table:table-cell>
          <table:table-cell office:value-type="string" table:style-name="ce3">
            <text:p><text:s/>3. Considérant, en troisième lieu, que le requérant, qui a obtenu 88 voix au premier tour de l'élection contestée, reproche aux deux candidats arrivés en tête au premier tour d'avoir fait apposer des affiches comportant une combinaison des couleurs bleu, blanc, rouge en violation de l'article R. 27 du code électoral ; qu'il soutient qu'il n'a pas bénéficié, pour sa propre campagne électorale, d'une couverture médiatique comparable à celle de ces deux candidats tant par la presse écrite que télévisée ; qu'il fait grief à un maire de lui avoir refusé le prêt d'une salle de réunion ; que ces faits, à les supposer établis, n'ont pu avoir une influence sur l'issue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82_annot.xml</text:p>
          </table:table-cell>
          <table:table-cell office:value-type="string" table:style-name="ce3">
            <text:p>4.Campagne</text:p>
          </table:table-cell>
          <table:table-cell office:value-type="string" table:style-name="ce3">
            <text:p><text:s/>2. Considérant que les affiches et les professions de foi des candidats élus dans les deux circonscriptions de la Polynésie française étaient les mêmes et comportaient leurs photographies ainsi que celles de leurs suppléants ; que, toutefois, dans les circonstances de l'espèce, ces faits n'ont pas constitué une manoeuvre de nature à induire en erreur les électeurs sur les candidats briguant respectivement leurs suffrages dans chacune des deux circonscription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83_annot.xml</text:p>
          </table:table-cell>
          <table:table-cell office:value-type="string" table:style-name="ce3">
            <text:p>4.Campagne</text:p>
          </table:table-cell>
          <table:table-cell office:value-type="string" table:style-name="ce3">
            <text:p><text:s/>3. Considérant qu'il résulte de l'instruction que, malgré leur tonalité particulièrement polémique, le contenu de ces deux tracts faisait état de faits dont la presse tant locale que nationale s'était largement fait l'écho et n'introduisaient dans le débat électoral aucun élément nouveau ou inexact ; que Mme HERMANVILLE avait la possibilité d'y répliquer préalablement au second tour de scrutin ; que, dans ces conditions, et compte tenu de l'important écart de voix entre les deux candidats du second tour, la diffusion de ces tracts ne peut être regardée comme ayant altéré les résultats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85_annot.xml</text:p>
          </table:table-cell>
          <table:table-cell office:value-type="string" table:style-name="ce3">
            <text:p>4.Campagne</text:p>
          </table:table-cell>
          <table:table-cell office:value-type="string" table:style-name="ce3">
            <text:p><text:s/>1. Considérant qu'au second tour du scrutin qui s'est déroulé le 16 juin 2002 dans la 2ème circonscription des Hautes-Alpes, M. GIRAUD a été élu avec 493 voix d'avance sur M. DUSSERRE ; que M. DUSSERRE impute ce résultat à la diffusion à 12 000 exemplaires, les 14 et 15 juin, d'un tract dont il estime le contenu injurieux à son égard</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86_annot.xml</text:p>
          </table:table-cell>
          <table:table-cell office:value-type="string" table:style-name="ce3">
            <text:p>4.Campagne</text:p>
          </table:table-cell>
          <table:table-cell office:value-type="string" table:style-name="ce3">
            <text:p><text:s/>1. Considérant que, si M. DELBREUF fait grief au candidat élu d'avoir organisé une diffusion massive de divers tracts en méconnaissance des dispositions de l'article L. 165 du code électoral, il n'allègue pas que ces documents aient contenu des propos excédant les limites de la polémique électorale, ni introduit d'élément nouveau dans la campagne électora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86_annot.xml</text:p>
          </table:table-cell>
          <table:table-cell office:value-type="string" table:style-name="ce3">
            <text:p>4.Campagne</text:p>
          </table:table-cell>
          <table:table-cell office:value-type="string" table:style-name="ce3">
            <text:p><text:s/>3. Considérant qu'aucune disposition législative ou réglementaire relative aux documents de propagande ne prescrit l'apposition de la mention ' vu le candidat ' ni n'interdit la reproduction de photographies représentant des bâtiments publics ; que l'absence de mention du nom et du domicile de l'imprimeur sur les documents de propagande établis au nom de M. JANQUIN, en méconnaissance de l'article 2 de la loi du 29 juillet 1881 sur la liberté de la presse, lequel est applicable à la propagande électorale en vertu de l'article L. 48 du code électoral, est restée sans influence sur le résultat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86_annot.xml</text:p>
          </table:table-cell>
          <table:table-cell office:value-type="string" table:style-name="ce3">
            <text:p>6.Financement</text:p>
          </table:table-cell>
          <table:table-cell office:value-type="string" table:style-name="ce3">
            <text:p><text:s/>2. Considérant que, s'il est soutenu qu'une partie du coût de confection et de distribution de ces tracts n'aurait pas été portée au compte de campagne de M. JANQUIN, l'omission dénoncée, qui n'a pas été relevée par la Commission nationale des comptes de campagne et des financements politiques, ne résulte pas de l'instruction</text:p>
          </table:table-cell>
          <table:table-cell table:number-columns-repeated="16377"/>
        </table:table-row>
        <table:table-row table:style-name="ro1">
          <table:table-cell office:value-type="string" table:style-name="ce7">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02\rejet\CONSTEXT000017664487_annot.xml</text:p>
          </table:table-cell>
          <table:table-cell office:value-type="string" table:style-name="ce3">
            <text:p>4.Campagne</text:p>
          </table:table-cell>
          <table:table-cell office:value-type="string" table:style-name="ce3">
            <text:p><text:s/>1. Considérant qu'aux termes du deuxième alinéa de l'article L. 52-1 du code électoral : 'A compter du premier jour du sixième mois précédant le mois au cours duquel il doit être procédé à des élections générales, aucune campagne de promotion publicitaire des réalisations ou de la gestion d'une collectivité ne peut être organisée sur le territoire des collectivités intéressées par le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89_annot.xml</text:p>
          </table:table-cell>
          <table:table-cell office:value-type="string" table:style-name="ce3">
            <text:p>4.Campagne</text:p>
          </table:table-cell>
          <table:table-cell office:value-type="string" table:style-name="ce3">
            <text:p><text:s/>2. Considérant que le grief soulevé par M. RAUCH, tiré de ce que ' des tracts ' auraient été distribués à Boulogne-sur-Mer le samedi 6 juin, est dépourvu des précisions permettant d'en apprécier la portée ; qu'il ne peut dès lors qu'être écar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89_annot.xml</text:p>
          </table:table-cell>
          <table:table-cell office:value-type="string" table:style-name="ce3">
            <text:p>4.Campagne</text:p>
          </table:table-cell>
          <table:table-cell office:value-type="string" table:style-name="ce3">
            <text:p><text:s/>3. Considérant que les deux tracts intitulés ' Porteloises, Portelois ' et ' Attention aux contrefaçons ', distribués dans la nuit du vendredi 14 au samedi 15 juin 2002, n'apportaient aucun élément nouveau aux débats de la campagne et n'excédaient pas, par leur contenu, les limites de la polémique électorale ; qu'ainsi, leur diffusion, même tardive, n'a pu être de nature à altérer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89_annot.xml</text:p>
          </table:table-cell>
          <table:table-cell office:value-type="string" table:style-name="ce3">
            <text:p>4.Campagne</text:p>
          </table:table-cell>
          <table:table-cell office:value-type="string" table:style-name="ce3">
            <text:p><text:s/>5. Considérant qu'aucune disposition législative ou réglementaire ne fait obstacle à ce qu'une circulaire électorale soit imprimée sur un fond bleu, et comporte la signature de personnalités qui apportent leur soutien au candidat ; que M. RAUCH ne peut ainsi utilement soutenir que la circulaire de M. LENGAGNE serait, pour ces motifs, entachée d'irrégularité ; qu'il ne résulte pas de l'instruction que l'envoi de cette circulaire aux électeurs de la circonscription aurait méconnu les dispositions de l'article R. 34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90_annot.xml</text:p>
          </table:table-cell>
          <table:table-cell office:value-type="string" table:style-name="ce3">
            <text:p>4.Campagne</text:p>
          </table:table-cell>
          <table:table-cell office:value-type="string" table:style-name="ce3">
            <text:p><text:s/>3. Considérant que M. GALIZI se borne à faire état d'une diffusion de tracts la veille du second tour de scrutin ; qu'il ne résulte pas de l'instruction, et n'est même pas allégué, que ces documents auraient contenu des propos excédant les limites de la polémique électorale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90_annot.xml</text:p>
          </table:table-cell>
          <table:table-cell office:value-type="string" table:style-name="ce3">
            <text:p>4.Campagne</text:p>
          </table:table-cell>
          <table:table-cell office:value-type="string" table:style-name="ce3">
            <text:p><text:s/>6. Considérant, en second lieu, que le tract critiqué reproduit un article publié le 15 juin 2002 dans le journal ' La Marseillaise ' ; que le contenu de ce texte, qui n'a ni apporté d'élément nouveau dans le débat électoral, ni outrepassé les limites de la polémique électorale, n'a pu altérer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92_annot.xml</text:p>
          </table:table-cell>
          <table:table-cell office:value-type="string" table:style-name="ce3">
            <text:p>7.Opérations</text:p>
          </table:table-cell>
          <table:table-cell office:value-type="string" table:style-name="ce3">
            <text:p><text:s/>9. Considérant que la situation résultant du décalage horaire, critiquée par Mme FÉLER, si regrettables qu'en soient les inconvénients, n'a porté atteinte, ni à la sincérité de l'élection, ni à l'égalité devant le suffrage ; que, par suite, sa requête ne peut qu'être rejeté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93_annot.xml</text:p>
          </table:table-cell>
          <table:table-cell office:value-type="string" table:style-name="ce3">
            <text:p>4.Campagne</text:p>
          </table:table-cell>
          <table:table-cell office:value-type="string" table:style-name="ce3">
            <text:p><text:s/>2. Considérant, en premier lieu, que le tract distribué par M. DOMERGUE au cours de la dernière semaine du mois de mai 2002 se borne à reprendre des thèmes évoqués au plan national pendant la campagne électorale ; qu'eu égard à la date de sa diffusion, les autres candidats ont été en mesure d'y répondre en temps uti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93_annot.xml</text:p>
          </table:table-cell>
          <table:table-cell office:value-type="string" table:style-name="ce3">
            <text:p>4.Campagne</text:p>
          </table:table-cell>
          <table:table-cell office:value-type="string" table:style-name="ce3">
            <text:p><text:s/>3. Considérant, en deuxième lieu, que, si l'article L. 49 du code électoral ' interdit de distribuer ou faire distribuer, le jour du scrutin, des bulletins, circulaires et autres documents', cette interdiction ne s'applique pas aux distributions effectuées pendant les jours qui précèdent celui du scrutin ; que, par suite, M. TAOUMI n'est pas fondé à soutenir que M. DOMERGUE aurait commis une irrégularité en diffusant le 7 juin 2002, soit deux jours avant le scrutin, un document dont il n'est pas contesté qu'il s'agissait de sa profession de foi</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93_annot.xml</text:p>
          </table:table-cell>
          <table:table-cell office:value-type="string" table:style-name="ce3">
            <text:p>6.Financement</text:p>
          </table:table-cell>
          <table:table-cell office:value-type="string" table:style-name="ce3">
            <text:p><text:s/>10. Considérant, en premier lieu, que la lettre-circulaire précitée a été expédiée par le centre hospitalier universitaire de Montpellier au sein duquel M. DOMERGUE exerce son activité professionnelle ; que, si ce candidat a ainsi utilisé certains des moyens matériels de cet établissement public, il résulte de l'instruction qu'étant autorisé à exercer au sein de l'hôpital des activités privées, il lui verse des redevances en contrepartie de la faculté qui lui est reconnue de recourir, le cas échéant, à titre personnel, aux moyens de secrétariat mis à sa disposition ; que, par suite, la dépense exposée pour l'expédition de trois cent cinq lettres à des médecins, laquelle peut être, en l'espèce, imputée à ses frais de secrétariat privé, ne peut être regardée comme ayant été supportée par une personne morale ; que, dès lors, le grief tiré de la violation de l'article L. 52-8 du code électoral doit être écar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93_annot.xml</text:p>
          </table:table-cell>
          <table:table-cell office:value-type="string" table:style-name="ce3">
            <text:p>6.Financement</text:p>
          </table:table-cell>
          <table:table-cell office:value-type="string" table:style-name="ce3">
            <text:p><text:s/>11. Considérant, en deuxième lieu, qu'ainsi qu'il a été dit ci-dessus, la lettre-circulaire envoyée par M. DOMERGUE présente un caractère électoral ; que, si M. TAOUMI soutient qu'en n'inscrivant pas à son compte le montant de la dépense ainsi exposée, ce candidat aurait méconnu les dispositions de l'article L. 52-12 du code électoral, il résulte de l'instruction que la Commission a réformé pour ce motif le compte de campagne déposé par le candidat ; qu'à cet effet, elle a ajouté aux dépenses déclarées une somme représentative du coût de l'opération et aux recettes une somme de même montant, qualifiée par elle de concours en nature apporté par l'intéressé ; que c'est à bon droit que le compte a été ainsi réformé par la Commission ; que, par suite, le grief doit être écar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94_annot.xml</text:p>
          </table:table-cell>
          <table:table-cell office:value-type="string" table:style-name="ce3">
            <text:p>4.Campagne</text:p>
          </table:table-cell>
          <table:table-cell office:value-type="string" table:style-name="ce3">
            <text:p><text:s/>1. Considérant que le tract, diffusé par M. LONCLE auprès des électeurs de la circonscription le vendredi précédant le scrutin du second tour, intervenait en réponse aux déclarations par lesquelles M. REBOLI s'était prévalu du soutien de l'un des candidats du premier tour ; que ce tract contestait l'effectivité de ce soutien ; qu'il résulte de l'instruction que ledit tract ne contenait aucune affirmation mensongère et n'excédait pas, par son contenu, les limites de la polémique électorale ; qu'ainsi, il n'a pas altéré la sincérité du scrutin</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02\rejet\CONSTEXT000017664494_annot.xml</text:p>
          </table:table-cell>
          <table:table-cell office:value-type="string" table:style-name="ce3">
            <text:p>4.Campagne</text:p>
          </table:table-cell>
          <table:table-cell office:value-type="string" table:style-name="ce3">
            <text:p><text:s/>3. Considérant qu'il résulte de tout ce qui précède que la requête de M. REBOLI doit être rejeté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94_annot.xml</text:p>
          </table:table-cell>
          <table:table-cell office:value-type="string" table:style-name="ce3">
            <text:p>7.Opérations</text:p>
          </table:table-cell>
          <table:table-cell office:value-type="string" table:style-name="ce3">
            <text:p><text:s/>2. Considérant qu'aux termes de l'article L. 65 du code électoral : 'Dès la clôture du scrutin, il est procédé au dénombrement des émargements. Ensuite, le dépouillement se déroule de la manière suivante : l'urne est ouverte et le nombre des enveloppes est vérifié (. . .)' ; que si, dans l'un des bureaux de vote de la circonscription, l'urne a été déverrouillée alors que le dénombrement des émargements n'était pas achevé, cette irrégularité est restée sans incidence sur la sincérité du scrutin, dès lors qu'il n'est ni établi, ni même allégué, qu'elle aurait eu pour effet de favoriser des fraudes ou des erreurs de calcu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95_annot.xml</text:p>
          </table:table-cell>
          <table:table-cell office:value-type="string" table:style-name="ce3">
            <text:p>4.Campagne</text:p>
          </table:table-cell>
          <table:table-cell office:value-type="string" table:style-name="ce3">
            <text:p><text:s/>6. Considérant, dès lors, qu'il y a lieu en tout état de cause de rejeter les conclusions de M. DOMINATI tendant à ce que, par application de l'article L.O. 186 du code électoral, le Conseil constitutionnel le proclame élu à la place de M. GANTIER après avoir annulé les bulletins utilisés par celui-ci au second tour du scrutin ; - SUR LES CONCLUSIONS DE M. DOMINATI TENDANT A L'ANNULATION DES OPERATIONS ELECTORALES ET SUR LA SAISINE DE LA COMMISSION NATIONALE DES COMPTES DE CAMPAGNE ET DES FINANCEMENTS POLITIQUES : . En ce qui concerne les griefs relatifs au compte de campagne de M. GANTIE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95_annot.xml</text:p>
          </table:table-cell>
          <table:table-cell office:value-type="string" table:style-name="ce3">
            <text:p>6.Financement</text:p>
          </table:table-cell>
          <table:table-cell office:value-type="string" table:style-name="ce3">
            <text:p><text:s/>8. Considérant que, par décision du 9 octobre 2002, la Commission nationale des comptes de campagne et des financements politiques a rejeté le compte de campagne du candidat élu en raison, d'une part, de ce que ce compte n'aurait pas compris le coût de tous les passages de caractère électoral parus dans les divers numéros de la publication précitée et, d'autre part, de ce que ladite publication est financée, pour une part importante, par des recettes publicitair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95_annot.xml</text:p>
          </table:table-cell>
          <table:table-cell office:value-type="string" table:style-name="ce3">
            <text:p>6.Financement</text:p>
          </table:table-cell>
          <table:table-cell office:value-type="string" table:style-name="ce3">
            <text:p><text:s/>9. Considérant que M. DOMINATI soutient que tous les numéros de ' Paris 16e ' parus entre septembre 2001 et avril 2002 ont assuré la promotion personnelle de son adversaire et que, par suite, la totalité de leur coût aurait dû figurer au compte de campagne de M. GANTIER ; que, dès lors, le montant de dépenses excéderait le plafond autorisé pour cette circonscription par l'article L. 52-11 du code électoral ; qu'en outre, les dispositions de l'article L. 52-8 du même code auraient été méconnues ; que le rejet de ce compte devrait entraîner l'inéligibilité de M. GANTIE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95_annot.xml</text:p>
          </table:table-cell>
          <table:table-cell office:value-type="string" table:style-name="ce3">
            <text:p>6.Financement</text:p>
          </table:table-cell>
          <table:table-cell office:value-type="string" table:style-name="ce3">
            <text:p><text:s/>15. Considérant qu'il résulte de l'instruction que le coût moyen de la page du périodique publié par M. GANTIER s'élève à 1 479,64 EUR ; que l'insertion de l'article intitulé : ' Nos 24 engagements pour un quinquennat de progrès ' occupe deux pleines pages ; que son coût s'établit ainsi à 2 959,28 EUR ; que cette dépense doit être incluse dans celles que visent les dispositions du premier alinéa de l'article L. 52-12 du code électoral et figurer dans le compte de campagne de M. GANTIER ; qu'après réintégration de cette somme, ce compte doit être arrêté en dépenses à un montant de 50 065,28 EUR ; qu'elles restent inférieures au plafond de 55 740 EUR fixé, pour la circonscription, conformément à l'article L. 52-11 du code électoral ; qu'ainsi, le grief tiré de la violation de cet article doit être reje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96_annot.xml</text:p>
          </table:table-cell>
          <table:table-cell office:value-type="string" table:style-name="ce3">
            <text:p>4.Campagne</text:p>
          </table:table-cell>
          <table:table-cell office:value-type="string" table:style-name="ce3">
            <text:p><text:s/>4. Considérant que le requérant n'établit pas que les partisans de M. LAGARDE auraient procédé, le matin du jour du second tour de scrutin, à une distribution massive de tracts en faveur de celui-ci, ni que d'autres tracts, distribués par les partisans de M. BIRSINGER, auraient été systématiquement enlevés des boîtes à lettres dans lesquelles ils avaient été déposé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96_annot.xml</text:p>
          </table:table-cell>
          <table:table-cell office:value-type="string" table:style-name="ce3">
            <text:p>7.Opérations</text:p>
          </table:table-cell>
          <table:table-cell office:value-type="string" table:style-name="ce3">
            <text:p><text:s/>11. Considérant qu'il ne résulte pas de l'instruction que le fait qu'une même personne ait siégé aux bureaux de vote n° 16 et 28 de Drancy ait permis une fraud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96_annot.xml</text:p>
          </table:table-cell>
          <table:table-cell office:value-type="string" table:style-name="ce3">
            <text:p>7.Opérations</text:p>
          </table:table-cell>
          <table:table-cell office:value-type="string" table:style-name="ce3">
            <text:p><text:s/>12. Considérant que M. BIRSINGER soutient que M. LAGARDE a été surpris, devant un bureau de vote, le jour du second tour de scrutin, en train de proférer des injures à son égard ; que, toutefois, il ressort de l'attestation produite par le requérant que M. LAGARDE ne s'adressait alors qu'à deux personnes ; que ce comportement n'a donc pu avoir d'influence sur l'issue du scrutin ; . En ce qui concerne les griefs relatifs au dépouilleme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96_annot.xml</text:p>
          </table:table-cell>
          <table:table-cell office:value-type="string" table:style-name="ce3">
            <text:p>7.Opérations</text:p>
          </table:table-cell>
          <table:table-cell office:value-type="string" table:style-name="ce3">
            <text:p><text:s/>14. Considérant qu'aucune disposition législative ou réglementaire n'interdit d'utiliser, pour le second tour, des bulletins imprimés au nom du candidat pour le premier ; que c'est par suite à bon droit que, dans le bureau de vote n° 30 de Drancy, un bulletin imprimé pour le premier tour au nom de M. LAGARDE a été considéré comme un suffrage valablement exprimé au second tour ; que c'est en revanche à tort que, dans les bureaux de vote n° 1 et n° 19 de Bobigny, deux bulletins du premier tour au nom de M. LAGARDE utilisés pour le second tour ont été déclarés nuls ; qu'il y a lieu, par suite, de majorer de deux voix tant le nombre de suffrages exprimés que le nombre des suffrages obtenus par M. LAGARD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96_annot.xml</text:p>
          </table:table-cell>
          <table:table-cell office:value-type="string" table:style-name="ce3">
            <text:p>7.Opérations</text:p>
          </table:table-cell>
          <table:table-cell office:value-type="string" table:style-name="ce3">
            <text:p><text:s/>15. Considérant qu'il résulte de l'examen des procès-verbaux des opérations électorales des bureaux de vote n° 2, 6, 13 et 17 de Drancy que le nombre des bulletins et enveloppes trouvés dans les urnes ne correspond pas à celui des émargements ; qu'en pareil cas, il convient de retenir le moins élevé de ces deux nombres ; qu'ainsi il y a lieu de déduire hypothétiquement sept suffrages tant du nombre des suffrages exprimés que du nombre de voix obtenues par M. LAGARD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97_annot.xml</text:p>
          </table:table-cell>
          <table:table-cell office:value-type="string" table:style-name="ce3">
            <text:p>7.Opérations</text:p>
          </table:table-cell>
          <table:table-cell office:value-type="string" table:style-name="ce3">
            <text:p><text:s/>7. Considérant que Mme KESTEMAN fait observer que les résultats mentionnés sur le procès-verbal des opérations électorales du premier tour de scrutin du bureau 1-4 ont fait l'objet de rectifications, le nombre des suffrages exprimés étant ramené de 413 à 403 et celui des suffrages regardés comme non exprimés étant porté de 4 à 14 ; qu'il résulte toutefois de l'instruction que ces rectifications étaient destinées à réparer des erreurs matérielles ; que, si les dix enveloppes trouvées vides dans l'urne selon le procès-verbal et comptabilisées avec les suffrages non exprimés n'ont pas été annexées audit procès-verbal, la requérante n'établit pas, alors qu'aucune disposition législative ou réglementaire ne prescrit l'annexion au procès-verbal des enveloppes réglementaires trouvées vides dans l'urne, que cette omission ait eu pour but ou pour effet de porter atteinte à la sincérité du scrutin</text:p>
          </table:table-cell>
          <table:table-cell table:number-columns-repeated="16377"/>
        </table:table-row>
        <table:table-row table:style-name="ro1">
          <table:table-cell office:value-type="string" table:style-name="ce7">
            <text:p>Non</text:p>
          </table:table-cell>
          <table:table-cell table:style-name="ce3"/>
          <table:table-cell office:value-type="string" table:style-name="ce3">
            <text:p>Pas d’éléments de fait<text:s/></text:p>
          </table:table-cell>
          <table:table-cell office:value-type="string" table:style-name="ce3">
            <text:p>6. Financement</text:p>
          </table:table-cell>
          <table:table-cell office:value-type="string" table:style-name="ce3">
            <text:p>file:\\\P:\CRJ\RECHERCHE\PROJET_JADE\JADE_COMMUN\Annotation\Annotation_automatique_Maritaud\Technologie_light\Super-catégories-objets_0,8\AN\2002\rejet\CONSTEXT000017664498_annot.xml</text:p>
          </table:table-cell>
          <table:table-cell office:value-type="string" table:style-name="ce3">
            <text:p>4.Campagne</text:p>
          </table:table-cell>
          <table:table-cell office:value-type="string" table:style-name="ce3">
            <text:p><text:s/>1. - SUR LES GRIEFS RELATIFS AU FINANCEMENT DE LA CAMPAGNE DE M. AESCHLIMANN : .- En ce qui concerne la participation de personnes morales au financement de la campagne électora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98_annot.xml</text:p>
          </table:table-cell>
          <table:table-cell office:value-type="string" table:style-name="ce3">
            <text:p>6.Financement</text:p>
          </table:table-cell>
          <table:table-cell office:value-type="string" table:style-name="ce3">
            <text:p><text:s/>3. Considérant, en second lieu, que l'invitation de M. AESCHLIMANN à un dîner organisé le 28 janvier 2002 par une association, à l'occasion d'un gala de bienfaisance, ne saurait être regardée, même si cette association est subventionnée par la commune, comme une action de propagande électorale ; .- En ce qui concerne le dépassement du plafond des dépenses de la campagne électora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498_annot.xml</text:p>
          </table:table-cell>
          <table:table-cell office:value-type="string" table:style-name="ce3">
            <text:p>6.Financement</text:p>
          </table:table-cell>
          <table:table-cell office:value-type="string" table:style-name="ce3">
            <text:p><text:s/>4. Considérant que M. CASARI soutient que, si l'on intègre dans le compte de campagne de M. AESCHLIMANN toutes les dépenses qui ont été engagées en vue de son élection, ces dépenses dépassent le plafond fixé en application de l'article L. 52-11 du code électoral</text:p>
          </table:table-cell>
          <table:table-cell table:number-columns-repeated="16377"/>
        </table:table-row>
        <table:table-row table:style-name="ro1">
          <table:table-cell office:value-type="string" table:style-name="ce7">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02\rejet\CONSTEXT000017664503_annot.xml</text:p>
          </table:table-cell>
          <table:table-cell office:value-type="string" table:style-name="ce3">
            <text:p>4.Campagne</text:p>
          </table:table-cell>
          <table:table-cell office:value-type="string" table:style-name="ce3">
            <text:p><text:s/>1. Considérant qu'aux termes du second alinéa de l'article L. 52-1 du code électoral : ' A compter du premier jour du sixième mois précédant le mois au cours duquel il doit être procédé à des élections générales, aucune campagne de promotion publicitaire des réalisations ou de la gestion d'une collectivité ne peut être organisée sur le territoire des collectivités intéressées par le scrutin...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03_annot.xml</text:p>
          </table:table-cell>
          <table:table-cell office:value-type="string" table:style-name="ce3">
            <text:p>4.Campagne</text:p>
          </table:table-cell>
          <table:table-cell office:value-type="string" table:style-name="ce3">
            <text:p><text:s/>2. Considérant qu'il résulte de l'instruction que la lettre de soutien à la candidature de M. GERIN, adressée le 30 mai 2002 par un conseiller municipal de la commune de Vénissieux aux responsables des associations locales, ne peut être regardée, par son contenu, comme participant, au sens des dispositions précitées, d'une ' campagne de promotion publicitaire ' des réalisations ou de la gestion de cette commune ; que, par suite, le grief invoqué doit être écarté ; - SUR LES AUTRES GRIEFS RELATIFS À LA PROPAGANDE ÉLECTORALE</text:p>
          </table:table-cell>
          <table:table-cell table:number-columns-repeated="16377"/>
        </table:table-row>
        <table:table-row table:style-name="ro1">
          <table:table-cell office:value-type="string" table:style-name="ce7">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02\rejet\CONSTEXT000017664503_annot.xml</text:p>
          </table:table-cell>
          <table:table-cell office:value-type="string" table:style-name="ce3">
            <text:p>6.Financement</text:p>
          </table:table-cell>
          <table:table-cell office:value-type="string" table:style-name="ce3">
            <text:p><text:s/>7. Considérant, en premier lieu, qu'aux termes du deuxième alinéa de l'article L. 52-8 du code électoral : ' Les personnes morales, à l'exception des partis et groupements politiques, ne peuvent participer au financement de la campagne électorale d'un candidat, ni en lui consentant des dons sous quelque forme que ce soit, ni en lui fournissant des biens, services ou autres avantages indirects à des prix inférieurs à ceux qui sont habituellement pratiqués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03_annot.xml</text:p>
          </table:table-cell>
          <table:table-cell office:value-type="string" table:style-name="ce3">
            <text:p>6.Financement</text:p>
          </table:table-cell>
          <table:table-cell office:value-type="string" table:style-name="ce3">
            <text:p><text:s/>8. Considérant que M. SARDAT fait valoir que la commune de Vénissieux a pris en charge le coût de l'expédition, en 120 exemplaires, de la lettre précitée de soutien à la candidature de M. GERIN adressée par un conseiller municipal de la commune aux responsables des associations locales ; qu'il résulte de l'instruction que cet envoi a été décidé sans l'accord de M. GERIN ; qu'au demeurant, son coût, évalué à 64,20 euros, a été remboursé par celui-ci et figure au nombre des dépenses inscrites à son compte de campagne ; que, dans ces conditions, le grief tiré de la violation de l'article L. 52-8 du code électoral ne peut être accueilli</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05_annot.xml</text:p>
          </table:table-cell>
          <table:table-cell office:value-type="string" table:style-name="ce3">
            <text:p>4.Campagne</text:p>
          </table:table-cell>
          <table:table-cell office:value-type="string" table:style-name="ce3">
            <text:p><text:s/>3. Considérant que le requérant n'apporte aucun commencement de preuve quant au caractère massif de la diffusion du tract incriminé, ni quant à la date à laquelle celle-ci serait intervenue ; qu'au demeurant, eu égard aux termes utilisés à l'encontre de M. ROCCA-SERRA dans la propre profession de foi de M. PERSIA, le contenu de ce tract n'a pas excédé les limites de la polémique électorale ; que, par suite, sa diffusion n'a pu altérer la sincérité du scrutin</text:p>
          </table:table-cell>
          <table:table-cell table:number-columns-repeated="16377"/>
        </table:table-row>
        <table:table-row table:style-name="ro1">
          <table:table-cell office:value-type="string" table:style-name="ce7">
            <text:p>Non</text:p>
          </table:table-cell>
          <table:table-cell office:value-type="string" table:style-name="ce3">
            <text:p>Mauvais découpage</text:p>
          </table:table-cell>
          <table:table-cell office:value-type="string" table:style-name="ce3">
            <text:p>Pas d’éléments de fait</text:p>
          </table:table-cell>
          <table:table-cell table:style-name="ce3"/>
          <table:table-cell office:value-type="string" table:style-name="ce3">
            <text:p>file:\\\P:\CRJ\RECHERCHE\PROJET_JADE\JADE_COMMUN\Annotation\Annotation_automatique_Maritaud\Technologie_light\Super-catégories-objets_0,8\AN\2002\rejet\CONSTEXT000017664505_annot.xml</text:p>
          </table:table-cell>
          <table:table-cell office:value-type="string" table:style-name="ce3">
            <text:p>4.Campagne</text:p>
          </table:table-cell>
          <table:table-cell office:value-type="string" table:style-name="ce3">
            <text:p><text:s/>5. Considérant qu'il résulte de ce qui précède que la requête de M. PERSIA ne peut qu'être rejetée ; SUR LA REQUÊTE N° 2002-2758</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07_annot.xml</text:p>
          </table:table-cell>
          <table:table-cell office:value-type="string" table:style-name="ce3">
            <text:p>4.Campagne</text:p>
          </table:table-cell>
          <table:table-cell office:value-type="string" table:style-name="ce3">
            <text:p><text:s/>1. Considérant que l'édition du mois de mai 2002 du bulletin d'informations de la ville de Saint-Saulve, dont Mme Cécile GALLEZ, remplaçante de M. BORLOO, est maire, comporte un article signé par Mme GALLEZ, qui présente en les commentant les principaux éléments du budget voté par la commune ; que deux autres articles exposent les conséquences tirées par la municipalité de nouvelles dispositions législatives sur le barème de la taxe locale d'équipement et sur le plan local d'urbanisme ; que ces documents ne peuvent être regardés, par leur contenu, comme constituant une ' campagne de promotion publicitaire ' des réalisations ou de la gestion de la commune au sens du second alinéa de l'article L. 52-1 du code électoral ; que le premier grief, tiré de la violation de ces dispositions, doit dès lors être écarté</text:p>
          </table:table-cell>
          <table:table-cell table:number-columns-repeated="16377"/>
        </table:table-row>
        <table:table-row table:style-name="ro1">
          <table:table-cell office:value-type="string" table:style-name="ce7">
            <text:p>Non</text:p>
          </table:table-cell>
          <table:table-cell office:value-type="string" table:style-name="ce3">
            <text:p>Mauvais découpage</text:p>
          </table:table-cell>
          <table:table-cell office:value-type="string" table:style-name="ce3">
            <text:p>Pas d’éléments de fait</text:p>
          </table:table-cell>
          <table:table-cell table:style-name="ce3"/>
          <table:table-cell office:value-type="string" table:style-name="ce3">
            <text:p>file:\\\P:\CRJ\RECHERCHE\PROJET_JADE\JADE_COMMUN\Annotation\Annotation_automatique_Maritaud\Technologie_light\Super-catégories-objets_0,8\AN\2002\rejet\CONSTEXT000017664507_annot.xml</text:p>
          </table:table-cell>
          <table:table-cell office:value-type="string" table:style-name="ce3">
            <text:p>4.Campagne</text:p>
          </table:table-cell>
          <table:table-cell office:value-type="string" table:style-name="ce3">
            <text:p><text:s/>4. Considérant qu'il résulte de tout ce qui précède que la requête de M. SLABOLEPSZY doit être rejeté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07_annot.xml</text:p>
          </table:table-cell>
          <table:table-cell office:value-type="string" table:style-name="ce3">
            <text:p>6.Financement</text:p>
          </table:table-cell>
          <table:table-cell office:value-type="string" table:style-name="ce3">
            <text:p><text:s/>2. Considérant que, selon le deuxième grief, le coût de divers documents diffusés par M. BORLOO en vue de l'élection n'aurait pas été intégralement porté à son compte de campagne ; que, cependant, une telle omission, qui n'a pas été relevée par la Commission nationale des comptes de campagne et des financements politiques, ne résulte pas de l'instructio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07_annot.xml</text:p>
          </table:table-cell>
          <table:table-cell office:value-type="string" table:style-name="ce3">
            <text:p>6.Financement</text:p>
          </table:table-cell>
          <table:table-cell office:value-type="string" table:style-name="ce3">
            <text:p><text:s/>3. Considérant, enfin, qu'il ne résulte pas de l'instruction que des dépenses relatives à l'organisation de réunions électorales auraient été omises dans le compte de campagne de M. BORLOO</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09_annot.xml</text:p>
          </table:table-cell>
          <table:table-cell office:value-type="string" table:style-name="ce3">
            <text:p>4.Campagne</text:p>
          </table:table-cell>
          <table:table-cell office:value-type="string" table:style-name="ce3">
            <text:p><text:s/>1. Considérant, en premier lieu, que, si un tract distribué l'avant-veille et la veille du second tour comportait à l'encontre de M. DASSAULT des imputations diffamatoires, il contenait aussi des mentions défavorables à la candidature du candidat proclamé élu dont la responsabilité dans la diffusion de ce tract n'est pas établie ; que, dès lors, cette distribution n'a pu être de nature à altérer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09_annot.xml</text:p>
          </table:table-cell>
          <table:table-cell office:value-type="string" table:style-name="ce3">
            <text:p>4.Campagne</text:p>
          </table:table-cell>
          <table:table-cell office:value-type="string" table:style-name="ce3">
            <text:p><text:s/>2. Considérant, en deuxième lieu, que, dans un autre tract distribué aux mêmes dates, figuraient les deux passages suivants : 'Avions, bombes, électronique militaire vendus par BLOCH-DASSAULT à Israël, massacrent à Djenin et partout en Palestine' et 'NON À DASSAULT - NON AU SIONISME' ; que, par ces mentions, ce tract, dont il n'est pas établi que M. VALLS soit l'auteur, outrepasse de façon inacceptable les limites de la polémique électorale ; que, cependant, un écart de 2 038 voix, soit 5,94 % des suffrages exprimés, sépare M. DASSAULT du candidat proclamé élu ; qu'en raison de l'importance de l'écart des voix, la sincérité du scrutin n'a pu être altérée, nonobstant le contenu dudit tract ainsi que le caractère massif et tardif de sa distribution ; qu'il appartiendra à la juridiction pénale, saisie par M. DASSAULT, de qualifier et, le cas échéant, de sanctionner ces fait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09_annot.xml</text:p>
          </table:table-cell>
          <table:table-cell office:value-type="string" table:style-name="ce3">
            <text:p>4.Campagne</text:p>
          </table:table-cell>
          <table:table-cell office:value-type="string" table:style-name="ce3">
            <text:p><text:s/>3. Considérant, enfin, que, si M. DASSAULT soutient que M. VALLS a méconnu les dispositions de l'article R. 26 du code électoral en faisant apposer sur le panneau qui lui était réservé des affiches excédant les dimensions prescrites par ce texte, cette irrégularité, qui n'est établie que pour l'affiche apposée sur un seul panneau, n'a pu avoir d'influence sur les résultats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12_annot.xml</text:p>
          </table:table-cell>
          <table:table-cell office:value-type="string" table:style-name="ce3">
            <text:p>6.Financement</text:p>
          </table:table-cell>
          <table:table-cell office:value-type="string" table:style-name="ce3">
            <text:p><text:s/>2. Considérant que la requête susvisée n'a pas pour objet de demander l'annulation d'une élection, mais tend à faire vérifier par le Conseil constitutionnel 'si la location du foyer et de la salle, le coût de la sonorisation, le coût du tract, le coût de la brochure de 6 pages et sa distribution, le coût des repas, figurent dans les dépenses électorales' engagées par M. Augustin BONREPAUX, député élu le 16 juin 2002 dans la 1ère circonscription du département de l'Ariège ; qu'elle est dès lors irrecevab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15_annot.xml</text:p>
          </table:table-cell>
          <table:table-cell office:value-type="string" table:style-name="ce3">
            <text:p>7.Opérations</text:p>
          </table:table-cell>
          <table:table-cell office:value-type="string" table:style-name="ce3">
            <text:p><text:s/>11. Considérant que la circonstance que certains membres de bureaux de vote auraient rempli la fonction de scrutateur sans qu'il ait été préalablement fait appel aux électeurs présents, n'a pu par elle-même porter atteinte à la sincérité du scrutin, dès lors qu'il n'est pas établi qu'elle ait eu pour objet ou pour effet de permettre des fraudes</text:p>
          </table:table-cell>
          <table:table-cell table:number-columns-repeated="16377"/>
        </table:table-row>
        <table:table-row table:style-name="ro1">
          <table:table-cell office:value-type="string" table:style-name="ce7">
            <text:p>Non</text:p>
          </table:table-cell>
          <table:table-cell office:value-type="string" table:style-name="ce3">
            <text:p>Mauvais découpage</text:p>
          </table:table-cell>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02\rejet\CONSTEXT000017664515_annot.xml</text:p>
          </table:table-cell>
          <table:table-cell office:value-type="string" table:style-name="ce3">
            <text:p>7.Opérations</text:p>
          </table:table-cell>
          <table:table-cell office:value-type="string" table:style-name="ce3">
            <text:p><text:s/>14. Considérant qu'il résulte de tout ce qui précède que les conclusions des requêtes de MM. ANDY, FÉLER et LAGUERRE doivent être rejetées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16_annot.xml</text:p>
          </table:table-cell>
          <table:table-cell office:value-type="string" table:style-name="ce3">
            <text:p>4.Campagne</text:p>
          </table:table-cell>
          <table:table-cell office:value-type="string" table:style-name="ce3">
            <text:p><text:s/>2. Considérant que le tract intitulé ' Les Bourbonnais prennent la parole ', qui critiquait M. COLCOMBET, a fait l'objet d'une première distribution dans la ville de Moulins le 15 mai 2002, soit trois semaines avant le premier tour des élections contestées ; qu'ainsi, et nonobstant la circonstance que ce tract aurait été de nouveau distribué entre les deux tours de l'élection, M. COLCOMBET a disposé du temps nécessaire pour y répondre ; que MM. COLCOMBET et FEUILLEBOIS ne sont dès lors pas fondés à soutenir que ce tract, dont le contenu restait au demeurant dans les limites de la polémique électorale, a altéré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16_annot.xml</text:p>
          </table:table-cell>
          <table:table-cell office:value-type="string" table:style-name="ce3">
            <text:p>4.Campagne</text:p>
          </table:table-cell>
          <table:table-cell office:value-type="string" table:style-name="ce3">
            <text:p><text:s/>8. Considérant enfin que la circonstance, à la supposer établie, que certaines affiches de M. FEUILLEBOIS auraient été lacérées ou recouvertes est, en l'espèce, sans incidence sur les résultats du scrutin ; - SUR LES GRIEFS RELATIFS AUX BULLETINS DE VOTE DE M. PERISSO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16_annot.xml</text:p>
          </table:table-cell>
          <table:table-cell office:value-type="string" table:style-name="ce3">
            <text:p>7.Opérations</text:p>
          </table:table-cell>
          <table:table-cell office:value-type="string" table:style-name="ce3">
            <text:p><text:s/>11. Considérant, en deuxième lieu, que le grief tiré de ce que cinquante-cinq procurations auraient été établies par deux déléguées n'ayant pas fait l'objet de l'agrément prévu à l'article R. 72 du code électoral manque en fai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16_annot.xml</text:p>
          </table:table-cell>
          <table:table-cell office:value-type="string" table:style-name="ce3">
            <text:p>7.Opérations</text:p>
          </table:table-cell>
          <table:table-cell office:value-type="string" table:style-name="ce3">
            <text:p><text:s/>13. Considérant que les griefs tirés de ce que le nombre de bulletins trouvés dans les urnes différerait du nombre d'émargements, ou que certains bulletins au nom de M. COLCOMBET auraient été annulés à tort, ne sont assortis d'aucune précision permettant d'en apprécier le bien-fondé ; que la circonstance que, dans certains bureaux de vote, les bulletins qui auraient dû être détruits en présence des électeurs ont été joints au procès-verbal et transmis par erreur au bureau centralisateur, en méconnaissance des dispositions de l'article R. 68 du code électoral, n'a pas altéré la sincérité du scrutin, dès lors qu'il n'est pas établi qu'elle aurait eu pour objet ou pour effet de favoriser des fraudes ; - SUR LES GRIEFS RELATIFS AU COMPTE DE CAMPAGNE DE M. PERISSOL</text:p>
          </table:table-cell>
          <table:table-cell table:number-columns-repeated="16377"/>
        </table:table-row>
        <table:table-row table:style-name="ro1">
          <table:table-cell office:value-type="string" table:style-name="ce7">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02\rejet\CONSTEXT000017664517_annot.xml</text:p>
          </table:table-cell>
          <table:table-cell office:value-type="string" table:style-name="ce3">
            <text:p>4.Campagne</text:p>
          </table:table-cell>
          <table:table-cell office:value-type="string" table:style-name="ce3">
            <text:p><text:s/>2. Considérant qu'aux termes du second alinéa de l'article L. 52-1 du code électoral : ' A compter du premier jour du sixième mois précédant le mois au cours duquel il doit être procédé à des élections générales, aucune campagne de promotion publicitaire des réalisations ou de la gestion d'une collectivité ne peut être organisée sur le territoire des collectivités intéressées par le scrutin...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17_annot.xml</text:p>
          </table:table-cell>
          <table:table-cell office:value-type="string" table:style-name="ce3">
            <text:p>4.Campagne</text:p>
          </table:table-cell>
          <table:table-cell office:value-type="string" table:style-name="ce3">
            <text:p><text:s/>3. Considérant qu'il n'est pas contesté que le document de quatre pages intitulé ' Lettre de Philippe PEMEZEC, conseiller général ' a été diffusé en octobre 2001 ; qu'ainsi, et en tout état de cause, la diffusion de ce document n'a pu méconnaître l'interdiction précitée ; - SUR LES AUTRES GRIEFS RELATIFS AU DEROULEMENT DE LA CAMPAGNE ÉLECTORA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17_annot.xml</text:p>
          </table:table-cell>
          <table:table-cell office:value-type="string" table:style-name="ce3">
            <text:p>4.Campagne</text:p>
          </table:table-cell>
          <table:table-cell office:value-type="string" table:style-name="ce3">
            <text:p><text:s/>6. Considérant que, si les requérants allèguent que les ' documents de propagande officielle de Mme BAVAY apposés sur les espaces réservés à cet effet par l'article L. 51 du code électoral ont fait l'objet de lacérations ou d'altérations systématiques ', il ne ressort pas de la seule photographie qu'ils produisent que ces incidents aient revêtu un caractère massif</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17_annot.xml</text:p>
          </table:table-cell>
          <table:table-cell office:value-type="string" table:style-name="ce3">
            <text:p>4.Campagne</text:p>
          </table:table-cell>
          <table:table-cell office:value-type="string" table:style-name="ce3">
            <text:p><text:s/>9. Considérant que les propos attribués à M. PEMEZEC par un article de ' France Soir ' daté du samedi 15 juin 2002 n'ont pu exercer une influence de nature à modifier l'issue du scrutin ; - SUR LES GRIEFS RELATIFS AU FINANCEMENT DE LA CAMPAGNE DE M. PEMEZEC</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17_annot.xml</text:p>
          </table:table-cell>
          <table:table-cell office:value-type="string" table:style-name="ce3">
            <text:p>6.Financement</text:p>
          </table:table-cell>
          <table:table-cell office:value-type="string" table:style-name="ce3">
            <text:p><text:s/>11. Considérant que, comme il a été dit ci-dessus, les exemplaires en cause du mensuel municipal de la commune du Plessis-Robinson sont entièrement consacrés à la vie municipale de cette commune et ne concernent pas directement la campagne pour l'élection législative dans la 12ème circonscription du département des Hauts-de-Seine ; que leur coût n'avait donc pas à figurer dans le compte de M. PEMEZEC</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office:value-type="string" table:style-name="ce3">
            <text:p>1. Procédure</text:p>
          </table:table-cell>
          <table:table-cell office:value-type="string" table:style-name="ce3">
            <text:p>file:\\\P:\CRJ\RECHERCHE\PROJET_JADE\JADE_COMMUN\Annotation\Annotation_automatique_Maritaud\Technologie_light\Super-catégories-objets_0,8\AN\2002\rejet\CONSTEXT000017664517_annot.xml</text:p>
          </table:table-cell>
          <table:table-cell office:value-type="string" table:style-name="ce3">
            <text:p>7.Opérations</text:p>
          </table:table-cell>
          <table:table-cell office:value-type="string" table:style-name="ce3">
            <text:p><text:s/>14. Considérant qu'il résulte de ce qui précède, sans qu'il soit utile de procéder aux auditions demandées, que les requêtes susvisées doivent être rejetées,</text:p>
          </table:table-cell>
          <table:table-cell table:number-columns-repeated="16377"/>
        </table:table-row>
        <table:table-row table:style-name="ro1">
          <table:table-cell office:value-type="string" table:style-name="ce3">
            <text:p>Non</text:p>
          </table:table-cell>
          <table:table-cell office:value-type="string" table:style-name="ce3">
            <text:p>Mauvais découpage</text:p>
          </table:table-cell>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02\rejet\CONSTEXT000017664518_annot.xml</text:p>
          </table:table-cell>
          <table:table-cell office:value-type="string" table:style-name="ce3">
            <text:p>4.Campagne</text:p>
          </table:table-cell>
          <table:table-cell office:value-type="string" table:style-name="ce3">
            <text:p><text:s/>2. Considérant qu'il résulte de ce qui précède que la requête de M. VASPART ne peut être que rejeté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19_annot.xml</text:p>
          </table:table-cell>
          <table:table-cell office:value-type="string" table:style-name="ce3">
            <text:p>7.Opérations</text:p>
          </table:table-cell>
          <table:table-cell office:value-type="string" table:style-name="ce3">
            <text:p><text:s/>3. Considérant qu'il n'est pas établi qu'un bulletin ait été introduit frauduleusement dans l'urne du bureau de vote n° 16</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20_annot.xml</text:p>
          </table:table-cell>
          <table:table-cell office:value-type="string" table:style-name="ce3">
            <text:p>4.Campagne</text:p>
          </table:table-cell>
          <table:table-cell office:value-type="string" table:style-name="ce3">
            <text:p><text:s/>2. Considérant qu'il est fait grief à M. VIGNOBLE d'avoir utilisé au profit de sa campagne électorale tant le journal municipal 'Le Wasquehalien' que la presse locale, en violation de l'article L. 52-1 du code électoral aux termes duquel : 'Pendant les trois mois précédant le premier jour du mois d'une élection et jusqu'à la date du tour de scrutin où celle-ci est acquise, l'utilisation à des fins de propagande électorale de tout procédé de publicité commerciale par la voix de la presse ou par tout moyen de communication audiovisuelle est interdite. - A compter du premier jour du sixième mois précédant le mois au cours duquel il doit être procédé à des élections générales, aucune campagne de promotion publicitaire des réalisations ou de la gestion d'une collectivité ne peut être organisée sur le territoire des collectivités intéressées par le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20_annot.xml</text:p>
          </table:table-cell>
          <table:table-cell office:value-type="string" table:style-name="ce3">
            <text:p>6.Financement</text:p>
          </table:table-cell>
          <table:table-cell office:value-type="string" table:style-name="ce3">
            <text:p><text:s/>6. Considérant qu'il résulte de ce qui précède qu'il n'y a lieu de réintégrer dans les dépenses de campagne du candidat élu ni le coût de la publication du journal municipal 'Le Wasquehalien', ni celui des manifestations municipales précitées ; que, par voie de conséquence, le grief tiré du dépassement du plafond de dépenses fixé par l'article L. 52-11 du code électoral manque en fai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20_annot.xml</text:p>
          </table:table-cell>
          <table:table-cell office:value-type="string" table:style-name="ce3">
            <text:p>7.Opérations</text:p>
          </table:table-cell>
          <table:table-cell office:value-type="string" table:style-name="ce3">
            <text:p><text:s/>7. Considérant que les opérations de dépouillement du 5ème bureau de vote de la commune de Wasquehal ont été effectuées en méconnaissance des dispositions de l'article L. 65 du code électoral qui prescrivent le regroupement par paquets de cent, dans une grande enveloppe, des enveloppes contenant les bulletins de vote ; que cette irrégularité n'a pas été, en l'espèce, de nature à altérer la sincérité du scrutin, dès lors qu'il n'est pas établi qu'elle ait eu pour objet ou pour effet de permettre des fraudes ou de provoquer des erreurs dans le calcul des suffrag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21_annot.xml</text:p>
          </table:table-cell>
          <table:table-cell office:value-type="string" table:style-name="ce3">
            <text:p>4.Campagne</text:p>
          </table:table-cell>
          <table:table-cell office:value-type="string" table:style-name="ce3">
            <text:p><text:s/>2. Considérant qu'il n'est pas contesté que les circulaires des deux candidats présents au second tour ont été adressées aux électeurs dans les conditions prévues par le code électoral ; que les faits allégués ne présentent pas le caractère d'une manoeuvre ; que, dès lors, la sincérité du scrutin n'a pas été altéré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21_annot.xml</text:p>
          </table:table-cell>
          <table:table-cell office:value-type="string" table:style-name="ce3">
            <text:p>7.Opérations</text:p>
          </table:table-cell>
          <table:table-cell office:value-type="string" table:style-name="ce3">
            <text:p><text:s/>5. Considérant, enfin, que la circonstance que la proportion de bulletins blancs et nuls ait été plus élevée, au second tour de scrutin, que lors d'élections antérieures, n'est pas, à elle seule, de nature à établir que des erreurs ou des fraudes aient été commises lors du dépouilleme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23_annot.xml</text:p>
          </table:table-cell>
          <table:table-cell office:value-type="string" table:style-name="ce3">
            <text:p>7.Opérations</text:p>
          </table:table-cell>
          <table:table-cell office:value-type="string" table:style-name="ce3">
            <text:p><text:s/>1. Considérant que, si le requérant produit un témoignage écrit d'un électeur, relatant que l'urne placée dans la salle abritant l'unique bureau de vote de Saint-Jean-de-Côle était sans surveillance lorsqu'il s'est présenté pour voter, il ressort des attestations émanant des membres du bureau de vote que ces derniers s'étaient retirés un moment dans une pièce attenante à la salle où se trouvait l'urne, la porte de communication restant ouverte, et qu'ils ont immédiatement repris leur place aussitôt après l'arrivée de l'électeur susmentionné ; qu'il n'est pas soutenu que ces faits, qui n'ont fait l'objet d'aucune mention au procès-verbal, auraient eu pour but ou pour effet de permettre une fraude ; que, dans ces conditions, le moyen doit être écarté ; - SUR LES GRIEFS RELATIFS AU DEPOUILLEMENT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23_annot.xml</text:p>
          </table:table-cell>
          <table:table-cell office:value-type="string" table:style-name="ce3">
            <text:p>7.Opérations</text:p>
          </table:table-cell>
          <table:table-cell office:value-type="string" table:style-name="ce3">
            <text:p><text:s/>4. Considérant qu'il ne ressort des procès-verbaux dressés par les bureaux de vote de La Chapelle-Montabourlet et Villetoureix ni des pièces qui leur sont annexées aucune anomalie dans le décompte des bulletins déclarés nuls ; qu'en ce qui concerne la commune de Lisle, les quatorze bulletins déclarés nuls en raison de la présence dans sept enveloppes de deux bulletins établis au nom de candidats différents sont annexés au procès-verbal et paraphés par les membres du bureau de vote ; que le moyen tiré d'irrégularités qui entacheraient les opérations de dépouillement du scrutin dans les communes de La Chapelle- Montabourlet, Villetoureix et, sur ce point, de Lisle, manque en fai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23_annot.xml</text:p>
          </table:table-cell>
          <table:table-cell office:value-type="string" table:style-name="ce3">
            <text:p>7.Opérations</text:p>
          </table:table-cell>
          <table:table-cell office:value-type="string" table:style-name="ce3">
            <text:p><text:s/>5. Considérant qu'aucune prescription législative ou réglementaire n'impose d'annexer au procès-verbal des opérations électorales les enveloppes réglementaires trouvées vides dans l'urne ; que, par suite, sont inopérants les griefs tirés, d'une part, de ce que de telles enveloppes n'ont pas été annexées aux procès-verbaux des bureaux de vote de Champagnac-de-Belair, Coulaures, Coutures, Creyssac, La Rochebeaucourt-et-Argentine, Lisle et Saint-Mesmin et, d'autre part, de ce que d'autres enveloppes vides, qui ont été annexées aux procès-verbaux des bureaux de vote d'Agonac, Antonne-et-Trigonant, Biras, Chapdeuil, Chassaignes, Clermont-d'Excideuil, Douchapt, Saint-Méard-de- Drône, Saint-Pardoux-la-Rivière, Saint-Vincent-Jalmoutiers, Salagnac, Sarlande, Sarliac-sur-l'Isle, Savignac-de-Nontron, Sceau-Saint-Angel, Servanches et Tocane-sur-Apre, n'ont pas été contresignées par les membres des bureaux de vot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23_annot.xml</text:p>
          </table:table-cell>
          <table:table-cell office:value-type="string" table:style-name="ce3">
            <text:p>7.Opérations</text:p>
          </table:table-cell>
          <table:table-cell office:value-type="string" table:style-name="ce3">
            <text:p><text:s/>6. Considérant que les bulletins blancs et nuls annexés aux procès-verbaux des bureaux de vote de Chenaud, Coulaures, Champniers-et-Reilhac, La Rochebeaucourt-et-Argentine, Lisle, Mialet et Valeuil n'ont pas été paraphés par les membres de ces bureaux de vote ; qu'en outre, les bulletins blancs et nuls annexés aux procès-verbaux des bureaux de vote de Nontron (3ème bureau), Saint-Front-sur-Nizonne et Saint-Vincent-sur-l'Isle ne comportent, chacun, qu'une seule signature ; que, toutefois, les documents joints à ces procès-verbaux, qui ne portent la mention d'aucune réclamation concernant la validité des votes déclarés nuls, correspondent à la description qui en est faite ; que, dans ces conditions, le décompte des bulletins blancs et nuls ne peut être remis en caus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23_annot.xml</text:p>
          </table:table-cell>
          <table:table-cell office:value-type="string" table:style-name="ce3">
            <text:p>7.Opérations</text:p>
          </table:table-cell>
          <table:table-cell office:value-type="string" table:style-name="ce3">
            <text:p><text:s/>7. Considérant que, si des bulletins déclarés nuls ont été annexés sans leurs enveloppes aux procès-verbaux des bureaux de vote d'Allemans, Dussac, Saint-Germain-des-Prés et Sorges, cette circonstance n'a pas constitué une irrégularité dès lors que les dispositions précitées de l'article L 66 du code électoral imposent l'annexion au procès-verbal des bulletins nuls et non celle des enveloppes qui les contenaient ; qu'en outre, bien que huit bulletins soient annexés au procès-verbal du bureau de vote d'Allemans, les membres de ce bureau n'ont commis aucune erreur matérielle en procédant à l'annulation de six votes dès lors qu'il ressort de l'examen de ces documents, d'une part, que deux enveloppes contenaient chacune deux bulletins établis au nom de candidats différents et, d'autre part, que les quatre autres votes annulés correspondaient à des bulletins irrégulier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23_annot.xml</text:p>
          </table:table-cell>
          <table:table-cell office:value-type="string" table:style-name="ce3">
            <text:p>7.Opérations</text:p>
          </table:table-cell>
          <table:table-cell office:value-type="string" table:style-name="ce3">
            <text:p><text:s/>8. Considérant que, si, dans les communes de Bourg-du-Bost et Sorges, des bulletins déclarés nuls n'ont pas été annexés aux procès-verbaux, cette omission est sans influence sur la régularité du scrutin, dès lors qu'il ne résulte pas de l'instruction qu'elle ait eu pour objet ou pour effet de porter atteinte à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23_annot.xml</text:p>
          </table:table-cell>
          <table:table-cell office:value-type="string" table:style-name="ce3">
            <text:p>7.Opérations</text:p>
          </table:table-cell>
          <table:table-cell office:value-type="string" table:style-name="ce3">
            <text:p><text:s/>10. Considérant, enfin, que le requérant relève que le procès-verbal du deuxième bureau de Nontron fait état de l'annulation de vingt-quatre votes, alors que quinze bulletins seulement ont été annexés à ce procès-verbal, et soutient que quatre suffrages auraient été attribués irrégulièrement à M. de SAINT SERNIN par le bureau de vote de Saint-Martial-Viveyrol ; que, toutefois, et en tout état de cause, la déduction des treize suffrages ainsi contestés du total des voix obtenues par M. de SAINT-SERNIN n'aurait pas pour effet de lui faire perdre la majorité des suffrages exprimés, le candidat élu ayant obtenu 132 voix de plus que son adversaire au second tour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25_annot.xml</text:p>
          </table:table-cell>
          <table:table-cell office:value-type="string" table:style-name="ce3">
            <text:p>4.Campagne</text:p>
          </table:table-cell>
          <table:table-cell office:value-type="string" table:style-name="ce3">
            <text:p><text:s/>3. Considérant que, si M. AKKARI soutient que certains commentaires parus dans la presse locale à propos de la campagne électorale de Mme ANDRIEUX-BACQUET auraient été ' obtenus en échange d'argent ou de services ' et auraient ainsi constitué un moyen détourné de publicité commerciale par voie de presse, prohibé par l'article L. 52-1 du code électoral, il n'apporte aucun élément de nature à étayer ses allégation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2\rejet\CONSTEXT000017664525_annot.xml</text:p>
          </table:table-cell>
          <table:table-cell office:value-type="string" table:style-name="ce3">
            <text:p>7.Opérations</text:p>
          </table:table-cell>
          <table:table-cell office:value-type="string" table:style-name="ce3">
            <text:p><text:s/>7. Considérant que les griefs relatifs au déroulement du scrutin dans deux bureaux de vote ne sont pas assortis de précisions permettant d'en apprécier le bien-fond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1_annot.xml</text:p>
          </table:table-cell>
          <table:table-cell office:value-type="string" table:style-name="ce3">
            <text:p>6.Financement</text:p>
          </table:table-cell>
          <table:table-cell office:value-type="string" table:style-name="ce3">
            <text:p><text:s/>5. Considérant, en premier lieu, que l'édition critiquée du bulletin municipal de Woippy a été diffusée en mai 2001, soit plus de douze mois avant l'élection contestée ; qu'en conséquence, les dépenses y afférant n'entrent pas, en tout état de cause, dans le champ d'application de l'article L. 52-8 précité</text:p>
          </table:table-cell>
          <table:table-cell table:number-columns-repeated="16377"/>
        </table:table-row>
        <table:table-row table:style-name="ro1">
          <table:table-cell office:value-type="string" table:style-name="ce7">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03\rejet\CONSTEXT000017664551_annot.xml</text:p>
          </table:table-cell>
          <table:table-cell office:value-type="string" table:style-name="ce3">
            <text:p>6.Financement</text:p>
          </table:table-cell>
          <table:table-cell office:value-type="string" table:style-name="ce3">
            <text:p><text:s/>10. Considérant qu'aux termes de l'article L. 52-12 du code électoral : ' Chaque candidat ou candidat tête de liste soumis au plafonnement prévu à l'article L. 52-11 est tenu d'établir un compte de campagne retraçant, selon leur origine, l'ensemble des recettes perçues et, selon leur nature, l'ensemble des dépenses engagées ou effectuées en vue de l'élection, hors celles de la campagne officielle, par lui-même ou pour son compte, au cours de la période mentionnée à l'article L. 52-4 ' ; qu'il est spécifié que : ' Sont réputées faites pour son compte les dépenses exposées directement au profit du candidat et avec l'accord de celui-ci, par les personnes physiques qui lui apportent leur soutien, ainsi que par les partis et groupements politiques qui ont été créés en vue de lui apporter leur soutien ou qui lui apportent leur soutien... ' ; qu'aux termes de l'article L. 52-5 : ' L'association de financement électorale est tenue d'ouvrir un compte bancaire ou postal unique retraçant la totalité de ses opérations financières... '</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03\rejet\CONSTEXT000017664551_annot.xml</text:p>
          </table:table-cell>
          <table:table-cell office:value-type="string" table:style-name="ce3">
            <text:p>7.Opérations</text:p>
          </table:table-cell>
          <table:table-cell office:value-type="string" table:style-name="ce3">
            <text:p><text:s/>13. Considérant qu'il résulte de tout ce qui précède que les requêtes de MM. CLAUDE et PILLA doivent être rejeté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4_annot.xml</text:p>
          </table:table-cell>
          <table:table-cell office:value-type="string" table:style-name="ce3">
            <text:p>4.Campagne</text:p>
          </table:table-cell>
          <table:table-cell office:value-type="string" table:style-name="ce3">
            <text:p><text:s/>6. Considérant que l'éditorial signé par Mme BALKANY, premier adjoint au maire de Levallois-Perret, dans le supplément de juin 2002 du magazine d'informations municipales, relatif aux inscriptions aux activités sportives et culturelles organisées par la commune, ne constitue pas un procédé de publicité commerciale par voie de presse à des fins de propagande électorale prohibé par les dispositions du 1er alinéa de l'article L. 52-1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5_annot.xml</text:p>
          </table:table-cell>
          <table:table-cell office:value-type="string" table:style-name="ce3">
            <text:p>4.Campagne</text:p>
          </table:table-cell>
          <table:table-cell office:value-type="string" table:style-name="ce3">
            <text:p><text:s/>4. Considérant que le requérant critique la diffusion massive, à la veille du premier tour de scrutin, d'un tract intitulé ' Les casseurs de l'Union ' et d'une lettre aux habitants de la commune du Plessis-Trévise, dans lesquels M. BENISTI aurait tenu des propos de nature à jeter le discrédit sur la personne de son concurrent ; qu'il ne résulte pas de la teneur de ces documents que ceux-ci aient dépassé les limites de la polémique électorale, dont la vivacité, au demeurant, a été entretenue, tout au long de la campagne du premier tour, par les deux candidats en caus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5_annot.xml</text:p>
          </table:table-cell>
          <table:table-cell office:value-type="string" table:style-name="ce3">
            <text:p>4.Campagne</text:p>
          </table:table-cell>
          <table:table-cell office:value-type="string" table:style-name="ce3">
            <text:p><text:s/>6. Considérant qu'il est soutenu que M. BENISTI aurait utilisé, au profit de sa campagne électorale, divers moyens de communication mis à sa disposition par la commune de Villiers-sur-Marne, en violation des dispositions du second alinéa de l'article L. 52-1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5_annot.xml</text:p>
          </table:table-cell>
          <table:table-cell office:value-type="string" table:style-name="ce3">
            <text:p>4.Campagne</text:p>
          </table:table-cell>
          <table:table-cell office:value-type="string" table:style-name="ce3">
            <text:p><text:s/>7. Considérant que les numéros incriminés du bulletin municipal mensuel ' Villiers-Infos ' se limitent à donner aux administrés des informations sur la vie de la commune et ne font pas référence à l'élection ; que le numéro de mars-avril 2002 de ' La lettre du maire ' produit à l'appui de la requête se borne à présenter, à l'occasion des élections présidentielle et législative, les principales institutions de la République et le système électoral en vigueur ; que, dès lors, de telles interventions ne peuvent être regardées comme constituant une campagne de promotion publicitaire des réalisations et de la gestion d'une collectivité au sens de l'article L. 52-1 précité ; - SUR LES AUTRES GRIEFS RELATIFS AU FINANCEMENT DE LA CAMPAGNE ÉLECTORALE DE M. BENISTI</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5_annot.xml</text:p>
          </table:table-cell>
          <table:table-cell office:value-type="string" table:style-name="ce3">
            <text:p>6.Financement</text:p>
          </table:table-cell>
          <table:table-cell office:value-type="string" table:style-name="ce3">
            <text:p><text:s/>9. Considérant qu'il ressort de l'instruction que l'association de financement constituée en vue de la campagne électorale de M. BENISTI a été déclarée à la préfecture, qui en a délivré récépissé, le 28 mai 2002 ; que les formalités tendant à rendre publique l'association ont été effectuées sans retard ; qu'un compte bancaire a été ouvert au nom de cette association aux fins d'encaisser les recettes et régler les dépenses à inscrire dans le compte de campagne du candidat, conformément aux dispositions de l'article L. 52-5 ; que, dans ces conditions, l'association de financement pouvait régulièrement agir, même si sa publication au Journal officiel n'est intervenue que le 15 juin 2002</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6_annot.xml</text:p>
          </table:table-cell>
          <table:table-cell office:value-type="string" table:style-name="ce3">
            <text:p>4.Campagne</text:p>
          </table:table-cell>
          <table:table-cell office:value-type="string" table:style-name="ce3">
            <text:p><text:s/>4. Considérant que la circonstance que certains électeurs n'auraient pas reçu, avant le premier tour de scrutin, la circulaire et le bulletin de vote de M. LEGARET que la commission de propagande devait leur adresser en application de l'article L. 34 du code électoral est sans incidence sur les résultats du second tour auquel M. LEGARET, qui a obtenu à l'issue du premier tour de scrutin le nombre de suffrages exigé par les dispositions de l'article L. 126 du même code, a pu se présente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6_annot.xml</text:p>
          </table:table-cell>
          <table:table-cell office:value-type="string" table:style-name="ce3">
            <text:p>4.Campagne</text:p>
          </table:table-cell>
          <table:table-cell office:value-type="string" table:style-name="ce3">
            <text:p><text:s/>6. Considérant que, à supposer même qu'un message diffusé sur un site Internet le 13 juin 2002 aurait eu un caractère de propagande électorale, le maintien de ce message jusqu'au jour du scrutin ne constituerait pas une opération prohibée par les dispositions du second alinéa de l'article L. 49 du code électoral, dès lors qu'il n'est pas allégué que des modifications auraient été apportées au contenu de ce message après le vendredi 14 juin à minui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6_annot.xml</text:p>
          </table:table-cell>
          <table:table-cell office:value-type="string" table:style-name="ce3">
            <text:p>6.Financement</text:p>
          </table:table-cell>
          <table:table-cell office:value-type="string" table:style-name="ce3">
            <text:p><text:s/>8. Considérant que le bulletin ' spécial budget 2002 ' distribué par la ville de Paris en mars 2002 ne peut être regardé, par son contenu, comme se rattachant à la campagne électorale de Mme BILLARD ; que la déclaration faite par le maire de Paris le 13 juin 2002 appelant les jeunes électeurs à ne pas s'abstenir de voter le 16 juin ne constitue pas davantage un élément de la campagne électorale de Mme BILLARD ; que M. LEGARET n'est dès lors fondé à soutenir ni que le coût de la diffusion de ce bulletin et de cette déclaration aurait constitué un don d'une personne morale prohibé par les dispositions du deuxième alinéa de l'article L. 52-8 du code électoral, ni que Mme BILLARD aurait dû faire figurer cette dépense dans son compte de campagne en application de l'article L. 52-12 du même code</text:p>
          </table:table-cell>
          <table:table-cell table:number-columns-repeated="16377"/>
        </table:table-row>
        <table:table-row table:style-name="ro1">
          <table:table-cell office:value-type="string" table:style-name="ce7">
            <text:p>Oui</text:p>
          </table:table-cell>
          <table:table-cell office:value-type="string" table:style-name="ce3">
            <text:p>Mauvais découpage</text:p>
          </table:table-cell>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03\rejet\CONSTEXT000017664557_annot.xml</text:p>
          </table:table-cell>
          <table:table-cell office:value-type="string" table:style-name="ce3">
            <text:p>4.Campagne</text:p>
          </table:table-cell>
          <table:table-cell office:value-type="string" table:style-name="ce3">
            <text:p><text:s/>1. Considérant qu'aux termes de l'article L. 52-1 du code électoral : ' Pendant les trois mois précédant le premier jour du mois d'une élection et jusqu'à la date du tour de scrutin où celle-ci est acquise, l'utilisation à des fins de propagande électorale de tout procédé de publicité commerciale par la voie de la presse ou par tout moyen de communication audiovisuelle est interdite. - A compter du premier jour du sixième mois précédant le mois au cours duquel il doit être procédé à des élections générales, aucune campagne de promotion publicitaire des réalisations ou de la gestion d'une collectivité ne peut être organisée sur le territoire des collectivités intéressées par le scrutin...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7_annot.xml</text:p>
          </table:table-cell>
          <table:table-cell office:value-type="string" table:style-name="ce3">
            <text:p>4.Campagne</text:p>
          </table:table-cell>
          <table:table-cell office:value-type="string" table:style-name="ce3">
            <text:p><text:s/>3. Considérant que la circonstance que M. CALVET ait répondu au questionnaire adressé à tous les candidats par une organisation ' catalaniste ' et que son nom ait figuré à ce titre sur le site Internet de cette organisation n'a pas davantage constitué une infraction aux dispositions précité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7_annot.xml</text:p>
          </table:table-cell>
          <table:table-cell office:value-type="string" table:style-name="ce3">
            <text:p>4.Campagne</text:p>
          </table:table-cell>
          <table:table-cell office:value-type="string" table:style-name="ce3">
            <text:p><text:s/>4. Considérant que, si, dans le numéro de mai-juin 2002 du magazine ' Horizons Sud ', financé par la région Languedoc-Roussillon, le président du conseil régional, après avoir commenté l'élection présidentielle et la nomination du Gouvernement, a conclu son éditorial en émettant le souhait qu'une majorité soutienne la ' politique nouvelle ' afin qu'elle ' s'inscrive dans la durée ', la diffusion de ce document, rédigé en termes généraux, ne peut être regardée, par son contenu, comme une opération de promotion de la candidature de M. CALVET contrevenant aux prescriptions de l'article L. 52-1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7_annot.xml</text:p>
          </table:table-cell>
          <table:table-cell office:value-type="string" table:style-name="ce3">
            <text:p>4.Campagne</text:p>
          </table:table-cell>
          <table:table-cell office:value-type="string" table:style-name="ce3">
            <text:p><text:s/>5. Considérant que, si le numéro de décembre 2001 de la revue ' La lettre de l'Environnement ', publié par un organisme lié à la région Languedoc-Roussillon, comporte deux pages où figure une photographie de l'intéressé, consacrées à un entretien avec M. CALVET sur des questions d'aménagement du territoire relevant des attributions de la commission du conseil régional qu'il préside, ce document ne peut être regardé, eu égard aux thèmes abordés et à la teneur non polémique des propos tenus, comme un moyen de propagande électorale ; - SUR LES GRIEFS TIRÉS D'IRRÉGULARITÉS COMMISES PENDANT LA CAMPAGNE ÉLECTORA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7_annot.xml</text:p>
          </table:table-cell>
          <table:table-cell office:value-type="string" table:style-name="ce3">
            <text:p>4.Campagne</text:p>
          </table:table-cell>
          <table:table-cell office:value-type="string" table:style-name="ce3">
            <text:p><text:s/>6. Considérant que, si le premier alinéa de l'article L. 49 du code électoral interdit de ' distribuer ou faire distribuer, le jour du scrutin, des bulletins, circulaires et autres documents ', cette interdiction ne s'applique pas aux distributions effectuées pendant les jours qui précèdent celui du scrutin ; que, par suite, M. MARTINEZ n'est pas fondé à soutenir que M. CALVET aurait méconnu les dispositions précitées en distribuant, la veille du second tour du scrutin, un tract dont il n'est pas démontré qu'il aurait introduit dans la campagne électorale un élément nouveau auquel l'adversaire de M. CALVET n'aurait pu répondr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7_annot.xml</text:p>
          </table:table-cell>
          <table:table-cell office:value-type="string" table:style-name="ce3">
            <text:p>4.Campagne</text:p>
          </table:table-cell>
          <table:table-cell office:value-type="string" table:style-name="ce3">
            <text:p><text:s/>7. Considérant qu'aux termes du second alinéa de l'article L. 49 du code électoral : ' A partir de la veille du scrutin à zéro heure, il est interdit de diffuser ou de faire diffuser par tout moyen de communication audiovisuelle tout message ayant le caractère de propagande électorale ' ; que l'intervention de M. CALVET sur les questions relatives à l'aménagement du territoire en Languedoc-Roussillon ne peut être regardée, ainsi qu'il a été dit ci-dessus, comme revêtant un caractère électoral ; que, dès lors, le grief tiré de ce que la présence de ce document sur le site Internet de ' La lettre de l'Environnement ' aurait constitué une infraction aux prescriptions précitées n'est pas fondé</text:p>
          </table:table-cell>
          <table:table-cell table:number-columns-repeated="16377"/>
        </table:table-row>
        <table:table-row table:style-name="ro1">
          <table:table-cell office:value-type="string" table:style-name="ce7">
            <text:p>Oui</text:p>
          </table:table-cell>
          <table:table-cell office:value-type="string" table:style-name="ce3">
            <text:p>Mauvais découpage</text:p>
          </table:table-cell>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03\rejet\CONSTEXT000017664557_annot.xml</text:p>
          </table:table-cell>
          <table:table-cell office:value-type="string" table:style-name="ce3">
            <text:p>6.Financement</text:p>
          </table:table-cell>
          <table:table-cell office:value-type="string" table:style-name="ce3">
            <text:p><text:s/>16. Considérant qu'aux termes du deuxième alinéa de l'article L. 52-8 du même code : ' Les personnes morales, à l'exception des partis ou groupements politiques, ne peuvent participer au financement de la campagne électorales d'un candidat, ni en lui consentant des dons sous quelque forme que ce soit, ni en lui fournissant des biens, services ou autres avantages directs ou indirects à des prix inférieurs à ceux qui sont habituellement pratiqués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7_annot.xml</text:p>
          </table:table-cell>
          <table:table-cell office:value-type="string" table:style-name="ce3">
            <text:p>6.Financement</text:p>
          </table:table-cell>
          <table:table-cell office:value-type="string" table:style-name="ce3">
            <text:p><text:s/>20. Considérant, enfin, que, si, avant le premier et le second tour de scrutin, M. ALDUY, en sa qualité de ' maire sénateur ', a adressé aux électeurs de Perpignan appelés à voter dans la 3ème circonscription du département des Pyrénées-Orientales des lettres circulaires, par lesquelles il les engageait à apporter leurs suffrages à M. CALVET, il n'est pas établi que le coût de réalisation et de distribution de ces lettres ait été pris en charge par la commune de Perpignan en violation de l'article L. 52-8 du code électoral ; . En ce qui concerne le dépassement du plafond des dépenses de campagne électora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7_annot.xml</text:p>
          </table:table-cell>
          <table:table-cell office:value-type="string" table:style-name="ce3">
            <text:p>6.Financement</text:p>
          </table:table-cell>
          <table:table-cell office:value-type="string" table:style-name="ce3">
            <text:p><text:s/>22. Considérant que, contrairement à ce que soutient M. MARTINEZ, les frais de réception exposés par M. CALVET figurent dans son compte de campagne ; qu'il n'est pas établi que d'autres frais de cette nature auraient été omi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7_annot.xml</text:p>
          </table:table-cell>
          <table:table-cell office:value-type="string" table:style-name="ce3">
            <text:p>6.Financement</text:p>
          </table:table-cell>
          <table:table-cell office:value-type="string" table:style-name="ce3">
            <text:p><text:s/>23. Considérant que le compte de campagne de M. CALVET a été arrêté en dépenses par la Commission nationale des comptes de campagne et des financements politiques à un montant de 44 246 euro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7_annot.xml</text:p>
          </table:table-cell>
          <table:table-cell office:value-type="string" table:style-name="ce3">
            <text:p>6.Financement</text:p>
          </table:table-cell>
          <table:table-cell office:value-type="string" table:style-name="ce3">
            <text:p><text:s/>24. Considérant, ainsi qu'il a été dit en réponse aux griefs tirés de la participation de personnes morales au financement de la campagne électorale de M. CALVET, que les dépenses dont s'agit n'avaient pas en l'espèce à figurer au compte de campagne ; qu'en admettant même que les lettres circulaires adressées par le maire de Perpignan aux électeurs résidant sur sa commune l'aient été avec l'accord de M. CALVET, le total des dépenses du compte de campagne, après réintégration du coût de réalisation et de distribution de ces lettres, resterait inférieur au plafond des dépenses fixé, conformément aux dispositions de l'article L. 52-11 du code électoral, à 56 930 euros ; . En ce qui concerne les autres griefs relatifs au compte de campagn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8_annot.xml</text:p>
          </table:table-cell>
          <table:table-cell office:value-type="string" table:style-name="ce3">
            <text:p>6.Financement</text:p>
          </table:table-cell>
          <table:table-cell office:value-type="string" table:style-name="ce3">
            <text:p><text:s/>3. Considérant que figure dans le compte de campagne de M. VICTORIA, au titre des concours en nature, le coût d'occupation d'un local mis à la disposition du candidat durant la campagne électorale par la fédération départementale du ' Rassemblement pour la République ' ; que ce coût a été calculé en fonction du loyer dû par ce groupement au propriétaire de l'immeuble en vertu d'un contrat de bail conclu en 1996 et dont le montant n'apparaît pas inférieur aux montants de loyers d'autres locaux dans le même immeuble ; qu'ainsi, M. FIDJI n'est pas fondé à soutenir que la société propriétaire de l'immeuble aurait consenti à M. VICTORIA un avantage indirec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8_annot.xml</text:p>
          </table:table-cell>
          <table:table-cell office:value-type="string" table:style-name="ce3">
            <text:p>6.Financement</text:p>
          </table:table-cell>
          <table:table-cell office:value-type="string" table:style-name="ce3">
            <text:p><text:s/>4. Considérant qu'il résulte de l'instruction que le coût de location, en vue de l'organisation d'une réunion publique dans le cadre de la campagne électorale, d'une ' structure tendue Hall D ', comprise dans le parc d'exposition géré par l'' Association dyonisienne de promotion économique ', figure dans le compte de campagne de M. VICTORIA ; qu'il en va de même du coût des prestations annexes afférentes aux équipements mobiliers, à l'animation de cette réunion et à la restauration des participants ; que le requérant n'apporte pas d'éléments probants à l'appui de ses allégations relatives à une minoration de ces coûts ou à des omissions de dépenses ; qu'aucune omission ou minoration n'a été relevée par la Commission nationale des comptes de campagne et des financements politiques après un examen attentif de ce poste de dépenses ; que, par suite, doit être écarté le grief tiré de ce que l'' Association dyonisienne de promotion économique ', que préside M. VICTORIA, aurait consenti un don à ce dernie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8_annot.xml</text:p>
          </table:table-cell>
          <table:table-cell office:value-type="string" table:style-name="ce3">
            <text:p>6.Financement</text:p>
          </table:table-cell>
          <table:table-cell office:value-type="string" table:style-name="ce3">
            <text:p><text:s/>10. Considérant que M. FIDJI soutient que le total des dépenses électorales réellement engagées par M. VICTORIA ou pour son compte en vue de son élection dépasserait le plafond fixé en application des dispositions de l'article L. 52-11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8_annot.xml</text:p>
          </table:table-cell>
          <table:table-cell office:value-type="string" table:style-name="ce3">
            <text:p>6.Financement</text:p>
          </table:table-cell>
          <table:table-cell office:value-type="string" table:style-name="ce3">
            <text:p><text:s/>12. Considérant que, selon M. FIDJI, les coûts d'impression de divers documents diffusés par M. VICTORIA en vue de l'élection n'auraient pas été facturés et portés au compte de campagne pour leur montant réel ; que le requérant fait valoir, en particulier, que le journal électoral du candidat élu aurait été tiré à 50 000 exemplaires, alors que figure sur la facture de l'imprimeur le coût d'un tirage à 35 000 exemplaires ; que, toutefois, M. FIDJI n'apporte pas d'élément probant à l'appui de ses affirmations relatives à la minoration des dépenses d'imprimerie ; qu'une telle minoration, qui n'a pas été relevée par la Commission nationale des comptes de campagne et des financements politiques, ne résulte pas de l'instructio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3\rejet\CONSTEXT000017664558_annot.xml</text:p>
          </table:table-cell>
          <table:table-cell office:value-type="string" table:style-name="ce3">
            <text:p>7.Opérations</text:p>
          </table:table-cell>
          <table:table-cell office:value-type="string" table:style-name="ce3">
            <text:p><text:s/>18. Considérant que le requérant ne saurait invoquer utilement des irrégularités qui auraient, selon lui, entaché le déroulement du premier tour de scrutin dès lors qu'il n'est même pas soutenu que les faits allégués auraient été de nature à modifier l'ordre de préférence exprimé par les électeurs et, par voie de conséquence, les conditions de déroulement du second tour ; - SUR LE GRIEF RELATIF A LA COMPOSITION DES BUREAUX DE VOTE</text:p>
          </table:table-cell>
          <table:table-cell table:number-columns-repeated="16377"/>
        </table:table-row>
        <table:table-row table:style-name="ro1">
          <table:table-cell office:value-type="string" table:style-name="ce7">
            <text:p>Oui</text:p>
          </table:table-cell>
          <table:table-cell office:value-type="string" table:style-name="ce3">
            <text:p>Mauvais découpage</text:p>
          </table:table-cell>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04\rejet\CONSTEXT000017664790_annot.xml</text:p>
          </table:table-cell>
          <table:table-cell office:value-type="string" table:style-name="ce3">
            <text:p>6.Financement</text:p>
          </table:table-cell>
          <table:table-cell office:value-type="string" table:style-name="ce3">
            <text:p><text:s/>1. Considérant qu'aux termes du deuxième alinéa de l'article L. 52-8 du code électoral : « Les personnes morales, à l'exception des partis ou groupements politiques, ne peuvent participer au financement de la campagne électorale d'un candidat, ni en lui consentant des dons sous quelque forme que ce soit, ni en lui fournissant des biens, services ou autres avantages directs ou indirects à des prix inférieurs à ceux qui sont habituellement pratiqués » ; qu'aux termes de l'article L. 52-12 du même code : « Chaque candidat... soumis au plafonnement prévu à l'article L. 52-11 est tenu d'établir un compte de campagne retraçant, selon leur origine, l'ensemble des recettes perçues et, selon leur nature, l'ensemble des dépenses engagées ou effectuées en vue de l'élection, hors celles de la campagne officielle, par lui-même ou pour son compte, au cours de la période mentionnée à l'article L. 52-4. Sont réputées faites pour son compte les dépenses exposées directement au profit du candidat et avec l'accord de celui-ci, par des personnes physiques qui lui apportent leur soutien, ainsi que par les partis et groupements politiques qui ont été créés en vue de lui apporter leur soutien ou qui lui apportent leur soutien. Le candidat estime et inclut, en recettes et en dépenses, les avantages directs ou indirects, les prestations de services et dons en nature dont il a bénéficié...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4\rejet\CONSTEXT000017664790_annot.xml</text:p>
          </table:table-cell>
          <table:table-cell office:value-type="string" table:style-name="ce3">
            <text:p>6.Financement</text:p>
          </table:table-cell>
          <table:table-cell office:value-type="string" table:style-name="ce3">
            <text:p><text:s/>2. Considérant que, par la décision susvisée du 28 octobre 2004, la Commission nationale des comptes de campagne et des financements politiques a approuvé le compte de campagne de M. WAUQUIEZ arrêté à un montant de 57 517 euros ; que ce montant n'excède pas le plafond des dépenses électorales tel qu'il résulte de l'article L. 52-11 du code électoral et qui s'élève pour la circonscription à 61 347 euro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4\rejet\CONSTEXT000017664790_annot.xml</text:p>
          </table:table-cell>
          <table:table-cell office:value-type="string" table:style-name="ce3">
            <text:p>6.Financement</text:p>
          </table:table-cell>
          <table:table-cell office:value-type="string" table:style-name="ce3">
            <text:p><text:s/>8. Considérant qu'il n'est pas davantage établi que le candidat élu ait bénéficié, pour sa campagne électorale, de la ligne téléphonique utilisée pour les besoins de ses permanences par le député sortant, par ailleurs président du conseil général ; que, dès lors, ni le coût de cette ligne, ni le montant de la rémunération de l'agent du département répondant aux appels téléphoniques à ce numéro, n'avaient à figurer parmi les dépenses du compte ; qu'il ne résulte pas de l'instruction que d'autres dépenses téléphoniques auraient été omis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4\rejet\CONSTEXT000017664790_annot.xml</text:p>
          </table:table-cell>
          <table:table-cell office:value-type="string" table:style-name="ce3">
            <text:p>6.Financement</text:p>
          </table:table-cell>
          <table:table-cell office:value-type="string" table:style-name="ce3">
            <text:p><text:s/>9. Considérant, en outre, qu'il n'est pas établi qu'en retenant à hauteur de 55 % et non de 100 % le montant des rémunérations des anciens collaborateurs du député sortant à raison de leur participation à sa campagne électorale, M. WAUQUIEZ aurait insuffisamment pris en compte les dépenses exposées à ce titr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4\rejet\CONSTEXT000017664790_annot.xml</text:p>
          </table:table-cell>
          <table:table-cell office:value-type="string" table:style-name="ce3">
            <text:p>6.Financement</text:p>
          </table:table-cell>
          <table:table-cell office:value-type="string" table:style-name="ce3">
            <text:p><text:s/>10. Considérant, en troisième lieu, que le coût de l'affichette apposée sur les emplacements prévus à l'article L. 51 du code électoral et de l'insertion dans la presse de l'article mentionnant l'adresse du site internet créé par M. WAUQUIEZ n'a pas été intégré au compte de campagne alors qu'il s'agit dedépenses exposées directement à son profit et avec son accord, au sens de l'article L. 52-12 du code électoral ; que, toutefois, alors que le montant des dépenses déclarées par l'intéressé est inférieur de 3 830 euros au plafond des dépenses électorales déterminé conformément aux dispositions de l'article L. 52-11 du code électoral, il ne résulte pas de l'instruction que cette réintégration entraînerait un dépassement de ce plafond</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4\rejet\CONSTEXT000017664790_annot.xml</text:p>
          </table:table-cell>
          <table:table-cell office:value-type="string" table:style-name="ce3">
            <text:p>4.Campagne</text:p>
          </table:table-cell>
          <table:table-cell office:value-type="string" table:style-name="ce3">
            <text:p><text:s/>15. Considérant, en quatrième lieu, que la presse écrite est libre de rendre compte, comme elle l'entend, d'une campagne électorale ; qu'il ressort des pièces du dossier que l'article publié par le quotidien « L'Eveil », dans son édition du 25 juin 2004, a relaté la campagne de plusieurs candidats et mentionnait, notamment, la tenue d'une réunion publique par le requérant ; que, si la presse locale a rendu compte de plusieurs manifestations sportives, culturelles ou professionnelles auxquelles participait le candidat élu, cette circonstance ne caractérise pas par elle-même un abus de propagande en faveur de ce candidat ; qu'enfin, il n'est établi ni que seul le site internet créé par M. WAUQUIEZ aurait bénéficié d'une annonce dans le quotidien précité, ni que les autres candidats n'auraient pu obtenir, pour leurs propres sites, la diffusion d'une telle informatio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4\rejet\CONSTEXT000017664790_annot.xml</text:p>
          </table:table-cell>
          <table:table-cell office:value-type="string" table:style-name="ce3">
            <text:p>4.Campagne</text:p>
          </table:table-cell>
          <table:table-cell office:value-type="string" table:style-name="ce3">
            <text:p><text:s/>16. Considérant, en cinquième lieu, qu'eu égard au contenu du premier numéro daté d'avril 2004 de la revue éditée par le comité départemental du tourisme et à l'écart des voix entre les candidats, la distribution au mois de juin 2004 de ce numéro, à supposer même qu'elle ait été tardive, n'a pu altérer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4\rejet\CONSTEXT000017664790_annot.xml</text:p>
          </table:table-cell>
          <table:table-cell office:value-type="string" table:style-name="ce3">
            <text:p>4.Campagne</text:p>
          </table:table-cell>
          <table:table-cell office:value-type="string" table:style-name="ce3">
            <text:p><text:s/>18. Considérant, en septième lieu, que, si le requérant soutient qu'il ne pouvait être répondu au tract distribué dans la commune de Puy-en-Velay la veille du second tour de scrutin, il résulte de l'instruction que ce tract ne contenait aucun élément excédant les limites de la polémique électorale et qu'il n'apportait aucun élément nouveau dans le débat électoral ; que, par suite, et à la supposer établie, sa distribution, en méconnaissance des dispositions de l'article L. 165 du code électoral, n'a pas eu d'influence sur le résultat de l'électio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5\rejet\CONSTEXT000017664763_annot.xml</text:p>
          </table:table-cell>
          <table:table-cell office:value-type="string" table:style-name="ce3">
            <text:p>7.Opérations</text:p>
          </table:table-cell>
          <table:table-cell office:value-type="string" table:style-name="ce3">
            <text:p><text:s/>2. Considérant que le requérant affirme que des personnes incarcérées ayant conservé leur droit de vote n'ont pas été mises à même d'exercer ce droit ; que, cependant, il n'établit pas que les dispositions précitées de l'article L. 71 du code électoral auraient été méconnues ; que, par suite, sa requête doit être rejeté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664859_annot.xml</text:p>
          </table:table-cell>
          <table:table-cell office:value-type="string" table:style-name="ce3">
            <text:p>4.Campagne</text:p>
          </table:table-cell>
          <table:table-cell office:value-type="string" table:style-name="ce3">
            <text:p><text:s/>2. Considérant que les requérants demandent l'annulation de l'élection de Mme de LA RAUDIÈRE au motif que cette dernière a fait imprimer sa photographie sur ses bulletins de vote ; qu'ils soutiennent en particulier qu'une telle photographie porte atteinte à la liberté de l'électeur et contrevient, en tant qu'elle peut être assimilée à une affiche, à l'article L. 51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248_annot.xml</text:p>
          </table:table-cell>
          <table:table-cell office:value-type="string" table:style-name="ce3">
            <text:p>6.Financement</text:p>
          </table:table-cell>
          <table:table-cell office:value-type="string" table:style-name="ce3">
            <text:p><text:s/>2. Considérant qu'aux termes de l'article L. 52-8 du code électoral : « Les dons consentis par une personne physique dûment identifiée pour le financement de la campagne d'un ou de plusieurs candidats lors des mêmes élections ne peuvent excéder 4 600 EUR » ; que, contrairement à ce que soutient le requérant, il ressort du compte de campagne déposé par le candidat que celui-ci n'a pas recueilli directement ou indirectement de don supérieur à 4 600 EUR ; qu'ainsi, les dispositions du premier alinéa de l'article L. 52-8 du code électoral n'ont pas été méconnu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248_annot.xml</text:p>
          </table:table-cell>
          <table:table-cell office:value-type="string" table:style-name="ce3">
            <text:p>6.Financement</text:p>
          </table:table-cell>
          <table:table-cell office:value-type="string" table:style-name="ce3">
            <text:p><text:s/>6. Considérant que le requérant fait valoir qu'une partie des frais de confection et de diffusion du numéro de février 2007 du bulletin municipal Aix-les-Bains - Le Magazine devrait être imputée sur le compte de M. DORD ; qu'il résulte de l'instruction que sur les trente-deux pages de ce bulletin, l'équivalent d'une demi-page se rattache directement à la propagande en faveur du candidat élu ; qu'eu égard au montant total du coût de fabrication et de diffusion de cette publication et du nombre de pages à prendre en compte, la dépense ainsi exposée, qui relève de celles visées au premier alinéa de l'article L. 52-12 du code électoral, est estimée à 320 EUR et doit être réintégrée dans le compte du candidat élu ; qu'il s'ensuit que son compte en dépenses reste inférieur au plafond fixé par l'article L. 52-11 du code électoral ; que, si les dispositions de l'article L. 52-8 du code électoral interdisent à toute personne morale autre qu'un parti politique de consentir des dons ou des avantages divers à un candidat, aucune disposition applicable à l'élection des députés n'implique le rejet du compte de campagne au seul motif que le candidat a bénéficié d'un don ou avantage au sens de l'article L. 52-8 ; qu'il appartient au juge de l'élection d'apprécier si le bénéfice de cet avantage doit entraîner le rejet du compte ; que, compte tenu du montant de l'avantage consenti, il n'y a pas lieu pour le Conseil constitutionnel de prononcer l'inéligibilité de M. DORD</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249_annot.xml</text:p>
          </table:table-cell>
          <table:table-cell office:value-type="string" table:style-name="ce3">
            <text:p>4.Campagne</text:p>
          </table:table-cell>
          <table:table-cell office:value-type="string" table:style-name="ce3">
            <text:p><text:s/>3. Considérant, enfin, que si les requérants dénoncent la lacération des affiches électorales apposées sur certains des panneaux qui étaient réservés à M. FROMANTIN sur le territoire de la commune de Puteaux, il ne résulte pas de l'instruction que ces agissements aient présenté un caractère systématique ; que, pour regrettables qu'ils soient, ils n'ont pu exercer aucune influence significative sur l'issue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251_annot.xml</text:p>
          </table:table-cell>
          <table:table-cell office:value-type="string" table:style-name="ce3">
            <text:p>7.Opérations</text:p>
          </table:table-cell>
          <table:table-cell office:value-type="string" table:style-name="ce3">
            <text:p><text:s/>6. Considérant, en premier lieu, que l'absence de tout ou partie des mentions qui auraient dû figurer sur les listes d'émargement, en vertu de l'article R. 76 du code électoral, ne suffit pas à faire présumer l'existence de fraude, dès lors qu'il ne ressort ni des procès-verbaux des opérations de vote ni d'autres documents ou de témoignages que le contrôle du vote des mandataires aurait donné lieu à des difficultés ou anomalies ; que les divergences, relevées par le requérant, entre le nombre des votes par procuration porté sur les procès-verbaux de plusieurs communes et le nombre de ceux qui ont été enregistrés sur les listes d'émargement des mêmes communes s'expliquent par l'absence sur ces listes d'émargement d'indications relatives aux votes par procuration ; qu'il ne résulte pas de l'instruction que cette anomalie, qui a un caractère purement formel, aurait eu pour effet d'empêcher le contrôle de l'identité des mandataires et celui de la régularité des procurations, ou d'affecter le décompte des vot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251_annot.xml</text:p>
          </table:table-cell>
          <table:table-cell office:value-type="string" table:style-name="ce3">
            <text:p>7.Opérations</text:p>
          </table:table-cell>
          <table:table-cell office:value-type="string" table:style-name="ce3">
            <text:p><text:s/>8. Considérant, en troisième lieu, qu'aucune réclamation relative aux votes par procuration n'a été portée sur les procès-verbaux des opérations électorales des communes en cause ni soumise à la commission départementale de recensement des votes ; qu'il n'est pas établi que les irrégularités commises dans la tenue des documents électoraux aient permis des fraudes de nature à altérer le résultat de l'élection ; qu'il résulte de ce qui précède que les griefs tirés des irrégularités ayant affecté les votes par procuration doivent être écartés ; . En ce qui concerne la régularité des listes d'émargeme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251_annot.xml</text:p>
          </table:table-cell>
          <table:table-cell office:value-type="string" table:style-name="ce3">
            <text:p>7.Opérations</text:p>
          </table:table-cell>
          <table:table-cell office:value-type="string" table:style-name="ce3">
            <text:p><text:s/>11. Considérant que, si quelques rectifications ont été portées sur les procès-verbaux des opérations électorales de plusieurs bureaux de vote de la circonscription, il résulte de l'instruction et, notamment, de l'examen des procès-verbaux concernés, que ces rectifications étaient destinées à réparer des erreurs purement matérielles et n'ont pas altéré la sincérité du scrutin ; que la circonstance que les procès-verbaux de quelques bureaux de vote ne comporteraient pas l'ensemble des signatures exigées par l'article R. 67 du code électoral ne saurait, à elle seule, porter atteinte à la sincérité du scrutin</text:p>
          </table:table-cell>
          <table:table-cell table:number-columns-repeated="16377"/>
        </table:table-row>
        <table:table-row table:style-name="ro1">
          <table:table-cell office:value-type="string" table:style-name="ce7">
            <text:p>Oui</text:p>
          </table:table-cell>
          <table:table-cell office:value-type="string" table:style-name="ce3">
            <text:p>Mauvais découpage</text:p>
          </table:table-cell>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07\rejet\CONSTEXT000017789333_annot.xml</text:p>
          </table:table-cell>
          <table:table-cell office:value-type="string" table:style-name="ce3">
            <text:p>4.Campagne</text:p>
          </table:table-cell>
          <table:table-cell office:value-type="string" table:style-name="ce3">
            <text:p><text:s/>1. Considérant qu'aux termes du premier alinéa de l'article L. 52-1 du code électoral : « Pendant les trois mois précédant le premier jour du mois d'une élection et jusqu'à la date du tour de scrutin où celle-ci est acquise, l'utilisation à des fins de propagande électorale de tout procédé de publicité commerciale par la voie de la presse ou par tout moyen de communication audiovisuelle est interdite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33_annot.xml</text:p>
          </table:table-cell>
          <table:table-cell office:value-type="string" table:style-name="ce3">
            <text:p>4.Campagne</text:p>
          </table:table-cell>
          <table:table-cell office:value-type="string" table:style-name="ce3">
            <text:p><text:s/>2. Considérant que, s'il résulte de l'instruction que M. Bernard DEBRÉ a créé un lien publicitaire sur internet renvoyant vers le site présentant ses activités de parlementaire, la requérante n'établit pas qu'il aurait, eu égard au contenu et à l'objet de ce site, méconnu les dispositions du premier alinéa de l'article L. 52-1 du code électoral ; - SUR LE GRIEF TIRÉ DE LA MÉCONNAISSANCE DE L'ARTICLE L. 52-8 DU CODE ÉLECTORAL</text:p>
          </table:table-cell>
          <table:table-cell table:number-columns-repeated="16377"/>
        </table:table-row>
        <table:table-row table:style-name="ro1">
          <table:table-cell office:value-type="string" table:style-name="ce7">
            <text:p>Oui</text:p>
          </table:table-cell>
          <table:table-cell office:value-type="string" table:style-name="ce3">
            <text:p>Mauvais découpage</text:p>
          </table:table-cell>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07\rejet\CONSTEXT000017789334_annot.xml</text:p>
          </table:table-cell>
          <table:table-cell office:value-type="string" table:style-name="ce3">
            <text:p>4.Campagne</text:p>
          </table:table-cell>
          <table:table-cell office:value-type="string" table:style-name="ce3">
            <text:p><text:s/>4. Considérant qu'aux termes du deuxième alinéa de l'article L. 52-1 du code électoral : « A compter du premier jour du sixième mois précédant le mois au cours duquel il doit être procédé à des élections générales, aucune campagne de promotion publicitaire des réalisations ou de la gestion d'une collectivité ne peut être organisée sur le territoire des collectivités intéressées par le scrutin »</text:p>
          </table:table-cell>
          <table:table-cell table:number-columns-repeated="16377"/>
        </table:table-row>
        <table:table-row table:style-name="ro1">
          <table:table-cell office:value-type="string" table:style-name="ce7">
            <text:p>Oui</text:p>
          </table:table-cell>
          <table:table-cell office:value-type="string" table:style-name="ce3">
            <text:p>Mauvais découpage</text:p>
          </table:table-cell>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07\rejet\CONSTEXT000017789334_annot.xml</text:p>
          </table:table-cell>
          <table:table-cell office:value-type="string" table:style-name="ce3">
            <text:p>6.Financement</text:p>
          </table:table-cell>
          <table:table-cell office:value-type="string" table:style-name="ce3">
            <text:p><text:s/>10. Considérant qu'aux termes du deuxième alinéa de l'article L. 52-8 du code électoral : « Les personnes morales, à l'exception des partis ou groupements politiques, ne peuvent participer au financement de la campagne électorale d'un candidat, ni en lui consentant des dons sous quelque forme que ce soit, ni en lui fournissant des biens, services ou autres avantages directs ou indirects à des prix inférieurs à ceux qui sont habituellement pratiqués » ; qu'aux termes du premier alinéa de l'article L. 52-12 du code électoral : « Chaque candidat ou candidat tête de liste soumis au plafonnement prévu à l'article L. 52-11 est tenu d'établir un compte de campagne retraçant, selon leur origine, l'ensemble des recettes perçues et, selon leur nature, l'ensemble des dépenses engagées ou effectuées en vue de l'élection, hors celles de la campagne officielle, par lui-même ou pour son compte, au cours de la période mentionnée à l'article L. 52-4. Sont réputées faites pour son compte les dépenses exposées directement au profit du candidat et avec l'accord de celui-ci, par les personnes physiques qui lui apportent leur soutien, ainsi que par les partis et groupements politiques qui ont été créés en vue de lui apporter leur soutien ou qui lui apportent leur soutien. Le candidat estime et inclut, en recettes et en dépenses, les avantages directs et indirects, les prestations de services et dons en nature dont il a bénéficié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34_annot.xml</text:p>
          </table:table-cell>
          <table:table-cell office:value-type="string" table:style-name="ce3">
            <text:p>6.Financement</text:p>
          </table:table-cell>
          <table:table-cell office:value-type="string" table:style-name="ce3">
            <text:p><text:s/>12. Considérant, en deuxième lieu, que Mme BURG soutient que le compte de campagne de M. GROSDIDIER n'est pas exhaustif en ce qu'il n'intègre pas des dépenses supportées par la fédération départementale de l'Union pour un mouvement populaire en vue d'éditer le n° 2 du journal de cette fédération La Moselle populaire ; que, dès lors que cette publication est purement interne à ladite fédération, elle n'a pas pour objet direct l'obtention des suffrages des électeurs ; que les frais afférents à sa réalisation n'ont pas à figurer dans le compte de campagne des candidats que cette fédération soutenai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35_annot.xml</text:p>
          </table:table-cell>
          <table:table-cell office:value-type="string" table:style-name="ce3">
            <text:p>7.Opérations</text:p>
          </table:table-cell>
          <table:table-cell office:value-type="string" table:style-name="ce3">
            <text:p><text:s/>7. Considérant qu'en vertu de l'article L. 65 du code électoral, des enveloppes, spécialement réservées à cet effet, sont destinées à recueillir les paquets de 100 bulletins ; que ces enveloppes de centaines sont cachetées ; qu'elles doivent recevoir les signatures du président du bureau de vote et d'au moins deux assesseurs ; que les opérations de dépouillement du 14ème bureau de vote de la commune de Montreuil, dans lequel ces enveloppes n'avaient été ni cachetées ni signées, ont donc été effectuées en méconnaissance des dispositions de l'article L. 65 du code électoral ; que, toutefois, cette irrégularité n'a pas été, en l'espèce, de nature à altérer la sincérité du scrutin, dès lors qu'il n'est pas établi qu'elle ait eu pour objet ou pour effet de permettre des fraudes ou de provoquer des erreurs dans le calcul des suffrages</text:p>
          </table:table-cell>
          <table:table-cell table:number-columns-repeated="16377"/>
        </table:table-row>
        <table:table-row table:style-name="ro1">
          <table:table-cell office:value-type="string" table:style-name="ce7">
            <text:p>Oui</text:p>
          </table:table-cell>
          <table:table-cell office:value-type="string" table:style-name="ce3">
            <text:p>Mauvais découpage</text:p>
          </table:table-cell>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07\rejet\CONSTEXT000017789336_annot.xml</text:p>
          </table:table-cell>
          <table:table-cell office:value-type="string" table:style-name="ce3">
            <text:p>4.Campagne</text:p>
          </table:table-cell>
          <table:table-cell office:value-type="string" table:style-name="ce3">
            <text:p><text:s/>2. Considérant qu'aux termes du deuxième alinéa de l'article L. 52-1 du code électoral : « A compter du premier jour du sixième mois précédant le mois au cours duquel il doit être procédé à des élections générales, aucune campagne de promotion publicitaire des réalisations ou de la gestion d'une collectivité ne peut être organisée sur le territoire des collectivités intéressées par le scrutin »</text:p>
          </table:table-cell>
          <table:table-cell table:number-columns-repeated="16377"/>
        </table:table-row>
        <table:table-row table:style-name="ro1">
          <table:table-cell office:value-type="string" table:style-name="ce7">
            <text:p>Oui</text:p>
          </table:table-cell>
          <table:table-cell office:value-type="string" table:style-name="ce3">
            <text:p>Mauvais découpage</text:p>
          </table:table-cell>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07\rejet\CONSTEXT000017789336_annot.xml</text:p>
          </table:table-cell>
          <table:table-cell office:value-type="string" table:style-name="ce3">
            <text:p>4.Campagne</text:p>
          </table:table-cell>
          <table:table-cell office:value-type="string" table:style-name="ce3">
            <text:p><text:s/>4. Considérant qu'aux termes de l'article L. 51 du code électoral : « Pendant la durée de la période électorale, dans chaque commune, des emplacements spéciaux sont réservés par l'autorité municipale pour l'apposition des affiches électorales. Dans chacun de ces emplacements, une surface égale est attribuée à chaque candidat... Pendant les trois mois précédant le premier jour du mois d'une élection et jusqu'à la date du tour de scrutin où celle-ci est acquise, tout affichage relatif à l'élection, même par affiches timbrées, est interdit en dehors de cet emplacement ou sur l'emplacement réservé aux autres candidats »</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07\rejet\CONSTEXT000017789336_annot.xml</text:p>
          </table:table-cell>
          <table:table-cell office:value-type="string" table:style-name="ce3">
            <text:p>4.Campagne</text:p>
          </table:table-cell>
          <table:table-cell office:value-type="string" table:style-name="ce3">
            <text:p><text:s/>14. Considérant qu'aux termes du dernier alinéa de l'article L. 52-8 du code électoral : « Par dérogation au premier alinéa de l'article L. 52-1, les candidats ou les listes de candidats peuvent recourir à la publicité par voie de presse pour solliciter les dons autorisés par le présent article. La publicité ne peut contenir d'autres mentions que celles propres à permettre le versement du don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36_annot.xml</text:p>
          </table:table-cell>
          <table:table-cell office:value-type="string" table:style-name="ce3">
            <text:p>6.Financement</text:p>
          </table:table-cell>
          <table:table-cell office:value-type="string" table:style-name="ce3">
            <text:p><text:s/>3. Considérant que l'encart publié dans le numéro du 8 février 2007 de L'Essor Savoyard, relatif au cinquantenaire du Syndicat intercommunal du lac d'Annecy, ne comportait pas de propos à teneur électorale ; que, dès lors, le coût de cet encart n'avait pas à figurer dans le compte de campagne du candidat élu</text:p>
          </table:table-cell>
          <table:table-cell table:number-columns-repeated="16377"/>
        </table:table-row>
        <table:table-row table:style-name="ro1">
          <table:table-cell office:value-type="string" table:style-name="ce7">
            <text:p>Oui</text:p>
          </table:table-cell>
          <table:table-cell office:value-type="string" table:style-name="ce3">
            <text:p>Mauvais découpage</text:p>
          </table:table-cell>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07\rejet\CONSTEXT000017789336_annot.xml</text:p>
          </table:table-cell>
          <table:table-cell office:value-type="string" table:style-name="ce3">
            <text:p>6.Financement</text:p>
          </table:table-cell>
          <table:table-cell office:value-type="string" table:style-name="ce3">
            <text:p><text:s/>9. Considérant qu'aux termes de l'article L. 52-12 du code électoral : « Chaque candidat... est tenu d'établir un compte de campagne retraçant, selon leur origine, l'ensemble des recettes perçues, et selon leur nature, l'ensemble des dépenses engagées ou effectuées en vue de l'élection, hors celles de la campagne officielle, par lui-même ou pour son compte, au cours de la période mentionnée à l'article L. 52-4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36_annot.xml</text:p>
          </table:table-cell>
          <table:table-cell office:value-type="string" table:style-name="ce3">
            <text:p>6.Financement</text:p>
          </table:table-cell>
          <table:table-cell office:value-type="string" table:style-name="ce3">
            <text:p><text:s/>11. Considérant que ce grief doit être examiné au regard de la finalité poursuivie par les dispositions combinées des articles L. 52-4, L. 52-5 et L. 52-12 du code électoral ; qu'au nombre des règles posées par ces dispositions, figure l'obligation, pour chaque candidat, de désigner auprès de la préfecture un mandataire financier et de présenter un compte de campagne unique retraçant l'intégralité des recettes perçues et des dépenses engagées en vue de la campagn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36_annot.xml</text:p>
          </table:table-cell>
          <table:table-cell office:value-type="string" table:style-name="ce3">
            <text:p>6.Financement</text:p>
          </table:table-cell>
          <table:table-cell office:value-type="string" table:style-name="ce3">
            <text:p><text:s/>13. Considérant que M. TARDY a désigné un mandataire financier unique et que l'ensemble des recettes perçues et des dépenses exposées en vue de l'élection ont été retracées dans son compte de campagne ; qu'à ce titre, le compte comprend des dons reçus avant le 23 mars 2007, représentant 2,79 % du total des recettes, et des dépenses effectuées avant la même date représentant 1,38 % du total des dépenses ; qu'eu égard à l'objectif de l'ensemble des dispositions du code électoral précitées d'une part, aux circonstances de l'espèce, en particulier le faible montant de recettes et de dépenses comptabilisées par l'association de financement avant le 23 mars, d'autre part, c'est à bon droit que la Commission nationale des comptes de campagne et des financements politiques a approuvé le compte de campagne de M. TARDY ; que le moyen doit être reje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38_annot.xml</text:p>
          </table:table-cell>
          <table:table-cell office:value-type="string" table:style-name="ce3">
            <text:p>4.Campagne</text:p>
          </table:table-cell>
          <table:table-cell office:value-type="string" table:style-name="ce3">
            <text:p><text:s/>1. Considérant qu'aux termes du premier alinéa de L. 52-1 du code électoral : « Pendant les trois mois précédant le premier jour du mois d'une élection et jusqu'à la date du tour de scrutin où celle-ci est acquise, l'utilisation à des fins de propagande électorale de tout procédé de publicité commerciale par la voie de la presse ou par tout moyen de communication audiovisuelle est interdite » ; que s'il est reproché à M. RIESTER d'avoir fait paraître, pour la promotion de l'entreprise de concession automobile qu'il dirige, une publicité commerciale mettant en évidence son nom dans l'édition du Pays briard du 25 mai 2007, cette publicité n'entre pas, par sa nature et son objet, dans le champ de l'article L. 52-1 du code électoral ; - SUR LE GRIEF TIRÉ DE LA MÉCONNAISANCE DE L'ARTICLE L. 52-12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39_annot.xml</text:p>
          </table:table-cell>
          <table:table-cell office:value-type="string" table:style-name="ce3">
            <text:p>4.Campagne</text:p>
          </table:table-cell>
          <table:table-cell office:value-type="string" table:style-name="ce3">
            <text:p><text:s/>1. Considérant, en premier lieu, que l'apposition par M. DELEBARRE d'affiches différentes sur les panneaux d'affichage, dans la commune de Coudekerque-Branche d'une part, dans le reste de la circonscription d'autre part, n'est contraire à aucune disposition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39_annot.xml</text:p>
          </table:table-cell>
          <table:table-cell office:value-type="string" table:style-name="ce3">
            <text:p>6.Financement</text:p>
          </table:table-cell>
          <table:table-cell office:value-type="string" table:style-name="ce3">
            <text:p><text:s/>3. Considérant, en troisième lieu, que le requérant dénonce la distribution, au cours de la période de la campagne officielle, par M. DELEBARRE, au nom du centre communal d'action sociale de Dunkerque, qu'il préside, d'enveloppes contenant la somme de dix euros en numéraire, à plus de 800 pensionnaires âgés de plus de soixante ans des établissements sanitaires et sociaux de la ville ; qu'il ajoute que le coût de cette opération devrait être retracé dans le compte de campagn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39_annot.xml</text:p>
          </table:table-cell>
          <table:table-cell office:value-type="string" table:style-name="ce3">
            <text:p>7.Opérations</text:p>
          </table:table-cell>
          <table:table-cell office:value-type="string" table:style-name="ce3">
            <text:p><text:s/>8. Considérant que, contrairement à ce que soutient le requérant, aucune disposition législative ou réglementaire ne prévoit l'ordre dans lequel les piles des bulletins de vote des candidats doivent être placées dans les bureaux de vote</text:p>
          </table:table-cell>
          <table:table-cell table:number-columns-repeated="16377"/>
        </table:table-row>
        <table:table-row table:style-name="ro1">
          <table:table-cell office:value-type="string" table:style-name="ce7">
            <text:p>Non</text:p>
          </table:table-cell>
          <table:table-cell table:number-columns-repeated="2" table:style-name="ce3"/>
          <table:table-cell office:value-type="string" table:style-name="ce3">
            <text:p>1. Procédure</text:p>
          </table:table-cell>
          <table:table-cell office:value-type="string" table:style-name="ce3">
            <text:p>file:\\\P:\CRJ\RECHERCHE\PROJET_JADE\JADE_COMMUN\Annotation\Annotation_automatique_Maritaud\Technologie_light\Super-catégories-objets_0,8\AN\2007\rejet\CONSTEXT000017789342_annot.xml</text:p>
          </table:table-cell>
          <table:table-cell office:value-type="string" table:style-name="ce3">
            <text:p>6.Financement</text:p>
          </table:table-cell>
          <table:table-cell office:value-type="string" table:style-name="ce3">
            <text:p><text:s/>5. Considérant que le grief portant sur l'éditorial signé par le maire de Blanzy dans le bulletin municipal de juin 2007 a été invoqué après l'expiration du délai de dix jours prévu à l'article 33 de l'ordonnance du 7 novembre 1958 susvisée ; qu'il est de ce fait irrecevable ; - SUR LE GRIEF TIRÉ DE LA violation DE L'ARTICLE L. 52-11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42_annot.xml</text:p>
          </table:table-cell>
          <table:table-cell office:value-type="string" table:style-name="ce3">
            <text:p>4.Campagne</text:p>
          </table:table-cell>
          <table:table-cell office:value-type="string" table:style-name="ce3">
            <text:p><text:s/>8. Considérant qu'il n'est pas démontré que le tract intitulé « Le droit de savoir » a été réalisé avec l'accord de M. MATHUS ; que la dépense correspondante n'a donc pas à figurer au compte de campagne de ce dernie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43_annot.xml</text:p>
          </table:table-cell>
          <table:table-cell office:value-type="string" table:style-name="ce3">
            <text:p>7.Opérations</text:p>
          </table:table-cell>
          <table:table-cell office:value-type="string" table:style-name="ce3">
            <text:p><text:s/>15. Considérant, en cinquième lieu, que le requérant soutient que les procès-verbaux des opérations de vote comportent des erreurs dans le décompte du nombre d'émargements ; qu'il résulte de l'instruction et, notamment, de l'examen des procès-verbaux et des listes d'émargement, que le nombre total d'émargements recensés correspond au nombre d'enveloppes trouvées dans les urnes ; que, par suite, le grief manque en fai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43_annot.xml</text:p>
          </table:table-cell>
          <table:table-cell office:value-type="string" table:style-name="ce3">
            <text:p>7.Opérations</text:p>
          </table:table-cell>
          <table:table-cell office:value-type="string" table:style-name="ce3">
            <text:p><text:s/>18. Considérant, en deuxième lieu, que les témoignages de deux électeurs concernant trois des treize bureaux de vote du territoire ne suffisent pas à établir une carence dans l'exercice du contrôle de l'identité des électeurs prescrit par les articles L. 62 et R. 58 du code électoral dès lors qu'aucun manquement aux dispositions de ces articles n'a été mentionné sur les procès-verbaux des opérations de vot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43_annot.xml</text:p>
          </table:table-cell>
          <table:table-cell office:value-type="string" table:style-name="ce3">
            <text:p>7.Opérations</text:p>
          </table:table-cell>
          <table:table-cell office:value-type="string" table:style-name="ce3">
            <text:p><text:s/>19. Considérant, en troisième lieu, que, si, dans un bureau de vote comptant plus de mille électeurs inscrits seulement deux isoloirs avaient été installés, alors que l'article L. 62 du code électoral impose qu'il y ait un isoloir par trois cents électeurs inscrits ou par fraction, cette circonstance n'a pas entaché le scrutin d'irrégularité dès lors qu'elle n'a pas eu pour conséquence d'empêcher des électeurs de voter ou de contraindre des électeurs à voter sans passer par l'isoloir ; qu'il n'est pas établi que les isoloirs installés dans l'un des bureaux de vote ne garantissaient pas le secret du vote</text:p>
          </table:table-cell>
          <table:table-cell table:number-columns-repeated="16377"/>
        </table:table-row>
        <table:table-row table:style-name="ro1">
          <table:table-cell office:value-type="string" table:style-name="ce7">
            <text:p>Oui</text:p>
          </table:table-cell>
          <table:table-cell office:value-type="string" table:style-name="ce3">
            <text:p>Mauvais découpage</text:p>
          </table:table-cell>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07\rejet\CONSTEXT000017789344_annot.xml</text:p>
          </table:table-cell>
          <table:table-cell office:value-type="string" table:style-name="ce3">
            <text:p>4.Campagne</text:p>
          </table:table-cell>
          <table:table-cell office:value-type="string" table:style-name="ce3">
            <text:p><text:s/>1. Considérant qu'aux termes du deuxième alinéa de l'article L. 52-1 du code électoral : « A compter du premier jour du sixième mois précédant le mois au cours duquel il doit être procédé à des élections générales, aucune campagne de promotion publicitaire des réalisations ou de la gestion d'une collectivité ne peut être organisée sur le territoire des collectivités intéressées par le scrutin » ; que le deuxième alinéa de l'article L. 52-8 du code électoral dispose que : « Les personnes morales, à l'exception des partis ou groupements politiques, ne peuvent participer au financement de la campagne électorale d'un candidat, ni en lui consentant des dons sous quelque forme que ce soit, ni en lui fournissant des biens, services ou autres avantages directs ou indirects à des prix inférieurs à ceux qui sont habituellement pratiqués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45_annot.xml</text:p>
          </table:table-cell>
          <table:table-cell office:value-type="string" table:style-name="ce3">
            <text:p>4.Campagne</text:p>
          </table:table-cell>
          <table:table-cell office:value-type="string" table:style-name="ce3">
            <text:p><text:s/>10. Considérant, en troisième lieu, que si M. CHASSAIN soutient qu'auraient été apposés sur ses affiches électorales, la veille et le jour du second tour, des bandeaux portant la mention « Chassain – Incinérateur » et que l'introduction tardive dans le débat électoral de ce thème de campagne aurait faussé la sincérité du scrutin et l'égalité entre les candidats, il résulte de l'instruction que la question, à laquelle faisaient référence les affichettes en litige, du remplacement d'une décharge à ciel ouvert située dans la plaine de la Crau par un incinérateur de déchets ne présentait aucun caractère de nouveauté ; qu'ainsi, à supposer même que les bandeaux aient été apposés aux dates alléguées, le grief doit être écar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49_annot.xml</text:p>
          </table:table-cell>
          <table:table-cell office:value-type="string" table:style-name="ce3">
            <text:p>4.Campagne</text:p>
          </table:table-cell>
          <table:table-cell office:value-type="string" table:style-name="ce3">
            <text:p><text:s/>1. Considérant, en premier lieu, que la participation de Mme BIÉMOURET, en sa qualité de vice-président du conseil général du Gers, à l'inauguration de la cantine et de la chaufferie d'un collège à Vic-Fezensac ne peut être regardée comme une campagne de promotion à caractère publicitaire au sens des dispositions de l'article L. 52-1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49_annot.xml</text:p>
          </table:table-cell>
          <table:table-cell office:value-type="string" table:style-name="ce3">
            <text:p>4.Campagne</text:p>
          </table:table-cell>
          <table:table-cell office:value-type="string" table:style-name="ce3">
            <text:p><text:s/>3. Considérant, enfin, que, si M. DUBRAC soutient que Mme BIÉMOURET aurait fait procéder de façon massive à des affichages et des distributions de tracts illicites, il n'apporte aucune précision au soutien de ses allégation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50_annot.xml</text:p>
          </table:table-cell>
          <table:table-cell office:value-type="string" table:style-name="ce3">
            <text:p>4.Campagne</text:p>
          </table:table-cell>
          <table:table-cell office:value-type="string" table:style-name="ce3">
            <text:p><text:s/>2. Considérant qu'aux termes du second alinéa de l'article L. 52-1 du code électoral : « A compter du premier jour du sixième mois précédant le mois au cours duquel il doit être procédé à des élections générales, aucune campagne de promotion publicitaire des réalisations ou de la gestion d'une collectivité ne peut être organisée sur le territoire des collectivités intéressées par le scrutin » ; que les numéros de février à mai 2007 du magazine d'informations municipales de la ville de Boulogne-sur-Mer ne peuvent être regardés, par leur contenu, comme une campagne de promotion publicitaire des réalisations ou de la gestion de la commune au sens de cet article ; qu'il en est de même des actions menées par le maire de Boulogne-sur-Mer entre janvier et mars 2007</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50_annot.xml</text:p>
          </table:table-cell>
          <table:table-cell office:value-type="string" table:style-name="ce3">
            <text:p>4.Campagne</text:p>
          </table:table-cell>
          <table:table-cell office:value-type="string" table:style-name="ce3">
            <text:p><text:s/>6. Considérant que le premier alinéa de l'article L. 49 du code électoral n'interdit de distribuer ou faire distribuer des bulletins, circulaires et autres documents que le jour du scrutin ; que les requérants ne sont donc pas fondés à soutenir que M. CUVILLIER aurait méconnu les dispositions précitées en distribuant un tract la veille du second tour du scrutin ; qu'en outre, ce tract, qui ne contenait aucun élément excédant les limites de la polémique électorale, n'a pas introduit dans la campagne un élément nouveau auquel Mme VALLA n'aurait pu répondre ; - SUR LES GRIEFS RELATIFS AU DÉROULEMENT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50_annot.xml</text:p>
          </table:table-cell>
          <table:table-cell office:value-type="string" table:style-name="ce3">
            <text:p>7.Opérations</text:p>
          </table:table-cell>
          <table:table-cell office:value-type="string" table:style-name="ce3">
            <text:p><text:s/>8. Considérant que les requérants font état de ce que, dans un des bureaux de vote de la circonscription, un électeur aurait proféré des injures à l'égard de Mme VALLA ; que, toutefois, ce comportement isolé, à supposer qu'il soit avéré, ne peut avoir influencé l'issue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50_annot.xml</text:p>
          </table:table-cell>
          <table:table-cell office:value-type="string" table:style-name="ce3">
            <text:p>7.Opérations</text:p>
          </table:table-cell>
          <table:table-cell office:value-type="string" table:style-name="ce3">
            <text:p><text:s/>9. Considérant que les allégations des requérants relatives aux autres incidents qui auraient troublé le déroulement du second tour de scrutin ne sont étayées d'aucun commencement de preuve</text:p>
          </table:table-cell>
          <table:table-cell table:number-columns-repeated="16377"/>
        </table:table-row>
        <table:table-row table:style-name="ro1">
          <table:table-cell office:value-type="string" table:style-name="ce7">
            <text:p>Oui</text:p>
          </table:table-cell>
          <table:table-cell office:value-type="string" table:style-name="ce3">
            <text:p>Mauvais découpage</text:p>
          </table:table-cell>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07\rejet\CONSTEXT000017789352_annot.xml</text:p>
          </table:table-cell>
          <table:table-cell office:value-type="string" table:style-name="ce3">
            <text:p>4.Campagne</text:p>
          </table:table-cell>
          <table:table-cell office:value-type="string" table:style-name="ce3">
            <text:p>: 1. Considérant qu'aux termes de l'alinéa 1 de l'article L. 52-1 du code électoral : « Pendant les trois mois précédant le premier jour d'une élection et jusqu'à la date du tour de scrutin où celle-ci est acquise, l'utilisation à des fins de propagande électorale de tout procédé de publicité commerciale par la voie de la presse ou par tout moyen de communication audiovisuelle est interdite » ; qu'aux termes de l'alinéa 2 de l'article L. 52-8 du même code : « Les personnes morales, à l'exception des partis ou groupements politiques, ne peuvent participer au financement de la campagne électorale d'un candidat, ni en lui consentant des dons sous quelque forme que ce soit, ni en lui fournissant des biens, services ou autres avantages directs ou indirects à des prix inférieurs à ceux qui sont habituellement pratiqués »</text:p>
          </table:table-cell>
          <table:table-cell table:number-columns-repeated="16377"/>
        </table:table-row>
        <table:table-row table:style-name="ro1">
          <table:table-cell office:value-type="string" table:style-name="ce7">
            <text:p>Oui</text:p>
          </table:table-cell>
          <table:table-cell office:value-type="string" table:style-name="ce3">
            <text:p>Mauvais découpage</text:p>
          </table:table-cell>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07\rejet\CONSTEXT000017789354_annot.xml</text:p>
          </table:table-cell>
          <table:table-cell office:value-type="string" table:style-name="ce3">
            <text:p>4.Campagne</text:p>
          </table:table-cell>
          <table:table-cell office:value-type="string" table:style-name="ce3">
            <text:p><text:s/>1. Considérant qu'aux termes du deuxième alinéa de l'article L. 52-1 du code électoral : « A compter du premier jour du sixième mois précédant le mois au cours duquel il doit être procédé à des élections générales, aucune campagne de promotion publicitaire des réalisations ou de la gestion d'une collectivité ne peut être organisée sur le territoire des collectivités intéressées par le scrutin » ; qu'aux termes du deuxième alinéa de l'article L. 52-8 du même code : « Les personnes morales, à l'exception des partis ou groupements politiques, ne peuvent participer au financement de la campagne électorale d'un candidat, ni en lui consentant des dons sous quelque forme que ce soit, ni en lui fournissant des biens, services ou autres avantages directs ou indirects à des prix inférieurs à ceux qui sont habituellement pratiqués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54_annot.xml</text:p>
          </table:table-cell>
          <table:table-cell office:value-type="string" table:style-name="ce3">
            <text:p>7.Opérations</text:p>
          </table:table-cell>
          <table:table-cell office:value-type="string" table:style-name="ce3">
            <text:p><text:s/>9. Considérant que les conditions dans lesquelles un candidat peut présider un bureau de vote ou désigner des assesseurs pour siéger dans un bureau de vote sont fixées par les dispositions des articles R. 42 à R. 44 du code électoral ; que, dès lors, le grief tiré de ce que M. LAMDAOUI n'aurait pu obtenir les informations correspondantes des services de la commune d'Argenteuil est inopéra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55_annot.xml</text:p>
          </table:table-cell>
          <table:table-cell office:value-type="string" table:style-name="ce3">
            <text:p>7.Opérations</text:p>
          </table:table-cell>
          <table:table-cell office:value-type="string" table:style-name="ce3">
            <text:p><text:s/>1. Considérant que si certains procès-verbaux de dépouillement des bureaux de votes ne portent pas la signature de l'ensemble des scrutateurs, cette seule circonstance n'est pas de nature à vicier la régula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55_annot.xml</text:p>
          </table:table-cell>
          <table:table-cell office:value-type="string" table:style-name="ce3">
            <text:p>7.Opérations</text:p>
          </table:table-cell>
          <table:table-cell office:value-type="string" table:style-name="ce3">
            <text:p><text:s/>2. Considérant que la circonstance qu'aucun conseiller municipal d'opposition de la commune d'Epinay-sur-Orge n'aurait présidé de bureau de vote n'est pas de nature à vicier la régularité du scrutin dès lors qu'il n'est fait état d'aucune méconnaissance de l'article R. 43 du code électoral qui prévoit que les conseillers municipaux sont désignés dans l'ordre du tableau</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55_annot.xml</text:p>
          </table:table-cell>
          <table:table-cell office:value-type="string" table:style-name="ce3">
            <text:p>4.Campagne</text:p>
          </table:table-cell>
          <table:table-cell office:value-type="string" table:style-name="ce3">
            <text:p><text:s/>6. Considérant que le maintien sur les sites Internet de la candidate et de son suppléant, pendant les trois mois précédant le premier jour du mois du scrutin, d'éléments d'information ne saurait, eu égard à leur contenu, être regardés comme de la propagande électorale au sens de l'article L. 52-1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56_annot.xml</text:p>
          </table:table-cell>
          <table:table-cell office:value-type="string" table:style-name="ce3">
            <text:p>4.Campagne</text:p>
          </table:table-cell>
          <table:table-cell office:value-type="string" table:style-name="ce3">
            <text:p><text:s/>2. Considérant que la presse écrite peut rendre compte comme elle l'entend d'une campagne électorale ; que les articles publiés par un quotidien local incriminés par Mme GRELIER n'ont pas altéré la liberté et la sincérité du scrutin ; qu'alors même qu'ils révèleraient une prise de position en faveur de la candidature de M. Fidelin, ils ne sauraient être regardés comme constituant un procédé de publicité commerciale au sens du deuxième alinéa de l'article L. 52-1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57_annot.xml</text:p>
          </table:table-cell>
          <table:table-cell office:value-type="string" table:style-name="ce3">
            <text:p>4.Campagne</text:p>
          </table:table-cell>
          <table:table-cell office:value-type="string" table:style-name="ce3">
            <text:p><text:s/>1. Considérant que les tracts intitulés « appel du 10 juin » et « appel du 17 juin » sont rédigés dans des termes qui n'excèdent pas les limites de la polémique électorale et ne comportent pas d'éléments nouveaux auxquels M. DUBERNARD aurait été dans l'impossibilité de répondre ; qu'au demeurant, ce dernier avait apporté des éléments de réponse circonstanciés dans un tract diffusé la veille du premier tour de scrutin ; que, par suite, ils ne peuvent être regardés comme ayant été de nature à modifier le résultat de l'électio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57_annot.xml</text:p>
          </table:table-cell>
          <table:table-cell office:value-type="string" table:style-name="ce3">
            <text:p>4.Campagne</text:p>
          </table:table-cell>
          <table:table-cell office:value-type="string" table:style-name="ce3">
            <text:p><text:s/>3. Considérant que l'utilisation par M. TOURAINE d'affiches d'un format supérieur aux limites fixées par l'article R. 27 du code électoral n'a pas, compte tenu du caractère très limité du dépassement, exercé d'influence déterminante sur l'issue du scrutin ; - SUR LES GRIEFS RELATIFS AU FINANCEMENT DE LA CAMPAGNE ÉLECTORA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57_annot.xml</text:p>
          </table:table-cell>
          <table:table-cell office:value-type="string" table:style-name="ce3">
            <text:p>6.Financement</text:p>
          </table:table-cell>
          <table:table-cell office:value-type="string" table:style-name="ce3">
            <text:p><text:s/>6. Considérant que, contrairement à ce qui est soutenu par le requérant, le coût de la réunion organisée dans un local associatif le 7 juin 2007 a bien été pris en charge par M. TOURAINE et intégré dans son compte de campagn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57_annot.xml</text:p>
          </table:table-cell>
          <table:table-cell office:value-type="string" table:style-name="ce3">
            <text:p>6.Financement</text:p>
          </table:table-cell>
          <table:table-cell office:value-type="string" table:style-name="ce3">
            <text:p><text:s/>7. Considérant que les insuffisances dénoncées relatives au coût de la campagne de M. TOURAINE, qui n'ont pas été relevées par la Commission nationale des comptes de campagne et des financements politiques, ne sont pas établi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62_annot.xml</text:p>
          </table:table-cell>
          <table:table-cell office:value-type="string" table:style-name="ce3">
            <text:p>4.Campagne</text:p>
          </table:table-cell>
          <table:table-cell office:value-type="string" table:style-name="ce3">
            <text:p><text:s/>9. Considérant que, si, aux termes de l'article L. 48 du code électoral « les affiches des actes émanés de l'autorité seront seules imprimées sur papier blanc », la prohibition qui en résulte n'est pas applicable aux documents de propagande autres que les affiches ; que, par suite, l'impression et la diffusion pour le compte de M. REYNÈS de tracts imprimés en caractère noir sur papier blanc ne sont constitutives d'aucune irrégulari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62_annot.xml</text:p>
          </table:table-cell>
          <table:table-cell office:value-type="string" table:style-name="ce3">
            <text:p>7.Opérations</text:p>
          </table:table-cell>
          <table:table-cell office:value-type="string" table:style-name="ce3">
            <text:p><text:s/>10. Considérant que Mme PRIEUR fait valoir que les bulletins de vote établis au nom de M. REYNÈS en vue du second tour de scrutin avaient été imprimés en caractères bleus, blancs et rouges ; que, s'agissant de bulletins de vote, l'utilisation de tels caractères ne méconnaissait aucune disposition législative ou réglementaire en vigueur à la date du scrutin ; qu'il ne résulte pas des pièces du dossier que l'utilisation de ces bulletins ait constitué une manœuvre de nature à altérer la sincérité des opérations électoral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63_annot.xml</text:p>
          </table:table-cell>
          <table:table-cell office:value-type="string" table:style-name="ce3">
            <text:p>4.Campagne</text:p>
          </table:table-cell>
          <table:table-cell office:value-type="string" table:style-name="ce3">
            <text:p><text:s/>1. Considérant que le contenu du tract diffusé par M. GONZALES le 15 juin 2007 ne dépassait pas les limites de la polémique électorale et ne comportait pas d'affirmation nouvelle à laquelle le requérant n'aurait pas été en mesure de répondr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63_annot.xml</text:p>
          </table:table-cell>
          <table:table-cell office:value-type="string" table:style-name="ce3">
            <text:p>4.Campagne</text:p>
          </table:table-cell>
          <table:table-cell office:value-type="string" table:style-name="ce3">
            <text:p><text:s/>5. Considérant que, sur le territoire de la commune de Villeneuve-le-Roi, des bandeaux apposés sur les affiches de M. SCHWARTZENBERG et qui mentionnaient que sa candidature était soutenue par le parti communiste ont été recouverts de peinture grise ; que cette peinture ne masquait pas les affiches et n'a été apposée que la nuit précédant le second tour de scrutin ; que cette circonstance n'a pas été de nature à porter atteinte à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63_annot.xml</text:p>
          </table:table-cell>
          <table:table-cell office:value-type="string" table:style-name="ce3">
            <text:p>4.Campagne</text:p>
          </table:table-cell>
          <table:table-cell office:value-type="string" table:style-name="ce3">
            <text:p><text:s/>6. Considérant que, si, en méconnaissance de l'article L. 48 du code électoral qui dispose que « les affiches des actes émanés de l'autorité seront seules imprimées sur papier blanc », M. GONZALES a apposé sur ses affiches, entre les deux tours de scrutin, une affichette imprimée en caractères noirs sur fond blanc, cette circonstance n'a pas pu, eu égard aux mentions de ladite affichette et à sa présentation, induire les électeurs en erreur ou donner à sa candidature un caractère officie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85_annot.xml</text:p>
          </table:table-cell>
          <table:table-cell office:value-type="string" table:style-name="ce3">
            <text:p>4.Campagne</text:p>
          </table:table-cell>
          <table:table-cell office:value-type="string" table:style-name="ce3">
            <text:p><text:s/>6. Considérant, en cinquième lieu, que l'apposition sur les affiches de Mme SCHMID, dans les jours précédant le second tour de scrutin, de bandeaux comportant les phrases « la cuisine c'est Schmid » et « affichage illégal : candidat non démocrate ! », pour regrettable qu'elle soit, n'a pas présenté un caractère massif et n'a pas été de nature, compte tenu de l'écart de voix entre les deux candidats à l'issue du second tour, à avoir altéré la sincérité du scrutin ; qu'il en va de même de la circonstance que M. SANTINI se serait prévalu à tort, dans ses tracts électoraux, du soutien d'un collectif d'associations ainsi que de celui d'une « Eglise évangélique » ; - SUR LES GRIEFS RELATIFS AU FINANCEMENT DE LA CAMPAGNE DE M. SANTINI</text:p>
          </table:table-cell>
          <table:table-cell table:number-columns-repeated="16377"/>
        </table:table-row>
        <table:table-row table:style-name="ro1">
          <table:table-cell office:value-type="string" table:style-name="ce7">
            <text:p>Non</text:p>
          </table:table-cell>
          <table:table-cell table:style-name="ce3"/>
          <table:table-cell office:value-type="string" table:style-name="ce3">
            <text:p>Présente la majeure /</text:p>
          </table:table-cell>
          <table:table-cell office:value-type="string" table:style-name="ce3">
            <text:p>7. Opérations</text:p>
          </table:table-cell>
          <table:table-cell office:value-type="string" table:style-name="ce3">
            <text:p>file:\\\P:\CRJ\RECHERCHE\PROJET_JADE\JADE_COMMUN\Annotation\Annotation_automatique_Maritaud\Technologie_light\Super-catégories-objets_0,8\AN\2007\rejet\CONSTEXT000017789385_annot.xml</text:p>
          </table:table-cell>
          <table:table-cell office:value-type="string" table:style-name="ce3">
            <text:p>4.Campagne</text:p>
          </table:table-cell>
          <table:table-cell office:value-type="string" table:style-name="ce3">
            <text:p><text:s/>10. Considérant, toutefois, qu'aux termes de l'article L. 57-1 du code électoral dans sa version applicable avant l'entrée en vigueur de la loi du 9 décembre 2004 de simplification du droit : « Des machines à voter peuvent être utilisées dans les bureaux de vote des communes de plus de 3 500 habitants figurant sur une liste qui sera fixée par décret en Conseil d'Etat » ; qu'aux termes de l'article 1er du décret du 18 mars 2004 fixant une liste des communes où est autorisée l'utilisation de machines à voter : « Il est rétabli à la section II du chapitre VI du titre Ier du livre Ier du code électoral un article R. 53 ainsi rédigé : “Des machines à voter peuvent être utilisées dans les bureaux de vote des communes figurant sur la liste annexée à la partie réglementaire du présent code” » ; qu'aux termes de l'article 2 de ce même décret : « Il est ajouté à la partie réglementaire du code électoral une annexe ainsi rédigée : “Liste des communes où est autorisée l'utilisation de machines à voter : ... Hauts-de-Seine ... Issy-les-Moulineaux ...” » ; que, si le décret du 11 octobre 2006 portant mesures de simplification en matière électorale a, par son article 12, abrogé l'article R. 53 du code électoral et supprimé l'annexe à la partie réglementaire du code électoral intitulée « Liste des communes où est autorisée l'utilisation de machines à voter », cette abrogation et cette suppression n'ont eu ni pour objet ni pour effet de retirer l'autorisation délivrée antérieurement à la commune d'Issy-les-Moulineaux par le décret du 18 mars 2004 ; que le grief doit par suite être écarté</text:p>
          </table:table-cell>
          <table:table-cell table:number-columns-repeated="16377"/>
        </table:table-row>
        <table:table-row table:style-name="ro1">
          <table:table-cell office:value-type="string" table:style-name="ce7">
            <text:p>Non</text:p>
          </table:table-cell>
          <table:table-cell table:number-columns-repeated="2"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2007\rejet\CONSTEXT000017789385_annot.xml</text:p>
          </table:table-cell>
          <table:table-cell office:value-type="string" table:style-name="ce3">
            <text:p>4.Campagne</text:p>
          </table:table-cell>
          <table:table-cell office:value-type="string" table:style-name="ce3">
            <text:p><text:s/>16. Considérant, en deuxième lieu, que si Mme SCHMID soutient que l'« interface » des machines à voter faisait apparaître son nom en caractères plus petits que ceux utilisés pour son adversaire au second tour, il résulte de l'instruction que cette « interface » se bornait à reproduire les bulletins de vote tels qu'ils avaient été fournis par les candidats à la commission de propagande ; qu'au demeurant, il n'est pas établi que la différence de taille des caractères utilisés aurait eu une quelconque influence sur l'issue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86_annot.xml</text:p>
          </table:table-cell>
          <table:table-cell office:value-type="string" table:style-name="ce3">
            <text:p>4.Campagne</text:p>
          </table:table-cell>
          <table:table-cell office:value-type="string" table:style-name="ce3">
            <text:p><text:s/>2. Considérant, en premier lieu, qu'aux termes du troisième alinéa de l'article L. 51 du code électoral : « Pendant les trois mois précédant le premier jour du mois d'une élection et jusqu'à la date du tour de scrutin où celle-ci est acquise, tout affichage relatif à l'élection, même par affiches timbrées, est interdit en dehors de cet emplacement ou sur l'emplacement réservé aux autres candidats » ; qu'il est reproché à Mme BRUNEL d'avoir apposé dans la commune de Roissy-en-Brie, avant le premier tour, des affiches sur des emplacements réservés à d'autres candidats ; que cette irrégularité a été, compte tenu de l'écart de voix, sans incidence sur la situation des candidats pour le second tou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86_annot.xml</text:p>
          </table:table-cell>
          <table:table-cell office:value-type="string" table:style-name="ce3">
            <text:p>4.Campagne</text:p>
          </table:table-cell>
          <table:table-cell office:value-type="string" table:style-name="ce3">
            <text:p><text:s/>3. Considérant, en deuxième lieu, que le tract diffusé par Mme BRUNEL entre les deux tours de l'élection n'excédait pas les limites de la polémique électorale et n'apportait aucun élément nouveau dans le débat ; qu'au surplus il a pu être répondu à ce tract avant le deuxième tour de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86_annot.xml</text:p>
          </table:table-cell>
          <table:table-cell office:value-type="string" table:style-name="ce3">
            <text:p>4.Campagne</text:p>
          </table:table-cell>
          <table:table-cell office:value-type="string" table:style-name="ce3">
            <text:p><text:s/>4. Considérant, en troisième lieu, qu'aucune disposition n'interdit l'utilisation de traductions d'un document de propagande électorale ; qu'il résulte de l'instruction que le document en langue vietnamienne diffusé par Mme Brunel était la traduction littérale du tract établi par celle-ci avant le premier tour du scrutin ; que, dès lors, la diffusion de ce document ne saurait avoir altéré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789386_annot.xml</text:p>
          </table:table-cell>
          <table:table-cell office:value-type="string" table:style-name="ce3">
            <text:p>6.Financement</text:p>
          </table:table-cell>
          <table:table-cell office:value-type="string" table:style-name="ce3">
            <text:p><text:s/>7. Considérant, enfin, que, dans le bulletin municipal de Montévrain, le maire de la commune a signé un éditorial appelant à voter en faveur de Mme BRUNEL ; que celle-ci a remboursé à ladite commune la quote-part du coût d'impression et de diffusion du bulletin municipal ; que cette dépense figure à son compte de campagne ; qu'il ne peut dès lors être allégué que Mme BRUNEL a bénéficié d'un avantage en nature de la part de la commune de Montévrain en méconnaissance de l'article L. 52-8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939275_annot.xml</text:p>
          </table:table-cell>
          <table:table-cell office:value-type="string" table:style-name="ce3">
            <text:p>7.Opérations</text:p>
          </table:table-cell>
          <table:table-cell office:value-type="string" table:style-name="ce3">
            <text:p><text:s/>5. Considérant que, s'il est mentionné sur le procès-verbal des opérations électorales du trente-quatrième bureau de vote de la circonscription qu'un électeur aurait voté sans présenter de pièce d'identité, cette unique irrégularité ne saurait modifier le résultat du scrutin ; qu'il en est de même pour les deux cas, relevés dans les cinquième et trente et unième bureaux, où un électeur a été autorisé à voter malgré le vote préalable, en son nom, de son mandatair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939275_annot.xml</text:p>
          </table:table-cell>
          <table:table-cell office:value-type="string" table:style-name="ce3">
            <text:p>7.Opérations</text:p>
          </table:table-cell>
          <table:table-cell office:value-type="string" table:style-name="ce3">
            <text:p><text:s/>7. Considérant que, s'il résulte des dispositions de l'article L. 65 du code électoral que quatre scrutateurs au moins doivent procéder aux opérations de dépouillement à chaque table, les membres du bureau de vote peuvent participer à ces opérations à défaut de scrutateurs en nombre suffisant ; que, dès lors, la circonstance que les membres de certains bureaux de vote n'ont pas désigné de scrutateurs en nombre suffisant ne suffit pas à établir que le nombre effectif de scrutateurs aurait été inférieur à celui fixé par les dispositions de l'article L. 65 ; qu'à supposer que, dans ces bureaux de vote, il ait été procédé au dépouillement des résultats du scrutin dans des conditions non conformes à celles prescrites par ce même article, il n'est pas établi que les irrégularités qui auraient été ainsi commises aient eu pour effet de faciliter des fraudes ou des erreurs de calcu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939275_annot.xml</text:p>
          </table:table-cell>
          <table:table-cell office:value-type="string" table:style-name="ce3">
            <text:p>7.Opérations</text:p>
          </table:table-cell>
          <table:table-cell office:value-type="string" table:style-name="ce3">
            <text:p><text:s/>8. Considérant qu'il résulte de l'examen des procès-verbaux des opérations électorales des bureaux de vote n° 5, 24 et 31 de la circonscription que le nombre des bulletins et enveloppes trouvés dans les urnes ne correspond pas exactement à celui des émargements ; que les écarts ainsi constatés entre le nombre des émargements et celui des bulletins trouvés dans l'urne n'ont pu, compte tenu de l'importance du nombre de suffrages acquis aux différents candidats à l'issue du premier tour de scrutin, modifier l'ordre de préférence exprimé par les électeurs</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07\rejet\CONSTEXT000017939286_annot.xml</text:p>
          </table:table-cell>
          <table:table-cell office:value-type="string" table:style-name="ce3">
            <text:p>4.Campagne</text:p>
          </table:table-cell>
          <table:table-cell office:value-type="string" table:style-name="ce3">
            <text:p><text:s/>3. Considérant que, eu égard au faible nombre de voix recueillies par la requérante et sans qu'il soit besoin d'apprécier le prétendu caractère diffamatoire des propos dénoncés, les faits allégués n'apparaissent pas susceptibles d'avoir influencé le résultat du scrutin</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07\rejet\CONSTEXT000017939288_annot.xml</text:p>
          </table:table-cell>
          <table:table-cell office:value-type="string" table:style-name="ce3">
            <text:p>4.Campagne</text:p>
          </table:table-cell>
          <table:table-cell office:value-type="string" table:style-name="ce3">
            <text:p><text:s/>3. Considérant que, eu égard au faible nombre de voix recueillies par le requérant et sans qu'il soit besoin d'apprécier le prétendu caractère diffamatoire des propos dénoncés, les faits allégués n'apparaissent pas susceptibles d'avoir influencé le résultat du scrutin</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07\rejet\CONSTEXT000017939289_annot.xml</text:p>
          </table:table-cell>
          <table:table-cell office:value-type="string" table:style-name="ce3">
            <text:p>4.Campagne</text:p>
          </table:table-cell>
          <table:table-cell office:value-type="string" table:style-name="ce3">
            <text:p><text:s/>3. Considérant que, eu égard au faible nombre de voix recueillies par le requérant et sans qu'il soit besoin d'apprécier le prétendu caractère diffamatoire des propos dénoncés, les faits allégués n'apparaissent pas susceptibles d'avoir influencé le résultat du scrutin</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07\rejet\CONSTEXT000017939290_annot.xml</text:p>
          </table:table-cell>
          <table:table-cell office:value-type="string" table:style-name="ce3">
            <text:p>4.Campagne</text:p>
          </table:table-cell>
          <table:table-cell office:value-type="string" table:style-name="ce3">
            <text:p><text:s/>3. Considérant que, eu égard au faible nombre de voix recueillies par la requérante et sans qu'il soit besoin d'apprécier le prétendu caractère diffamatoire des propos dénoncés, les faits allégués n'apparaissent pas susceptibles d'avoir influencé le résultat du scrutin</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07\rejet\CONSTEXT000017939291_annot.xml</text:p>
          </table:table-cell>
          <table:table-cell office:value-type="string" table:style-name="ce3">
            <text:p>4.Campagne</text:p>
          </table:table-cell>
          <table:table-cell office:value-type="string" table:style-name="ce3">
            <text:p><text:s/>3. Considérant que, eu égard au faible nombre de voix recueillies par la requérante et sans qu'il soit besoin d'apprécier le prétendu caractère diffamatoire des propos dénoncés, les faits allégués n'apparaissent pas susceptibles d'avoir influencé le résultat du scrutin</text:p>
          </table:table-cell>
          <table:table-cell table:number-columns-repeated="16377"/>
        </table:table-row>
        <table:table-row table:style-name="ro1">
          <table:table-cell office:value-type="string" table:style-name="ce7">
            <text:p>Oui </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939298_annot.xml</text:p>
          </table:table-cell>
          <table:table-cell office:value-type="string" table:style-name="ce3">
            <text:p>5.Campagne</text:p>
          </table:table-cell>
          <table:table-cell office:value-type="string" table:style-name="ce3">
            <text:p><text:s/>2. Considérant que M. TROLLÉ, qui s'est présenté à l'élection sous l'étiquette de l'Union pour la démocratie française, soutient que M. André FLAJOLET, candidat élu appartenant à l'Union pour un mouvement populaire, a créé la confusion dans l'esprit des électeurs en laissant à penser qu'il était investi par l'Union pour la démocratie français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939303_annot.xml</text:p>
          </table:table-cell>
          <table:table-cell office:value-type="string" table:style-name="ce3">
            <text:p>4.Campagne</text:p>
          </table:table-cell>
          <table:table-cell office:value-type="string" table:style-name="ce3">
            <text:p><text:s/>1. Considérant que les articles du bulletin municipal de Châteauneuf-du-Faou diffusé en janvier 2007 selon sa périodicité habituelle, qui se bornent à donner aux administrés des informations sur la vie locale et l'état d'avancement d'équipements publics, ne peuvent être regardés, par leur contenu, comme constituant, au sens du deuxième alinéa de l'article L. 52-1 du code électoral, une « campagne de promotion publicitaire » des réalisations ou de la gestion de cette commune dont M. MÉNARD était maire ; que le grief tiré de la violation de cet article doit dès lors être écarté ; - SUR LES GRIEFS TIRÉS D'IRRÉGULARITÉS DE PROPAGAND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939303_annot.xml</text:p>
          </table:table-cell>
          <table:table-cell office:value-type="string" table:style-name="ce3">
            <text:p>4.Campagne</text:p>
          </table:table-cell>
          <table:table-cell office:value-type="string" table:style-name="ce3">
            <text:p><text:s/>4. Considérant, en troisième lieu, que, si le requérant fait grief à ses adversaires d'avoir fait apposer sur ses affiches un bandeau destiné à le discréditer, il n'apporte aucune preuve de ces irrégularités ; que les témoignages produits se bornent à faire état de la présence de quelques bandeaux autocollants apposés sur des éléments de mobilier urba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939303_annot.xml</text:p>
          </table:table-cell>
          <table:table-cell office:value-type="string" table:style-name="ce3">
            <text:p>4.Campagne</text:p>
          </table:table-cell>
          <table:table-cell office:value-type="string" table:style-name="ce3">
            <text:p><text:s/>5. Considérant, en quatrième lieu, qu'il résulte de l'instruction que la banderole apposée par M. MÉNARD sur la façade de sa permanence à Châteaulin, en méconnaissance des règles d'affichage fixées par l'article L. 51 du code électoral, a été retirée dès que la méconnaissance de la loi a été signalée au candida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7939305_annot.xml</text:p>
          </table:table-cell>
          <table:table-cell office:value-type="string" table:style-name="ce3">
            <text:p>4.Campagne</text:p>
          </table:table-cell>
          <table:table-cell office:value-type="string" table:style-name="ce3">
            <text:p><text:s/>2. Considérant que l'apposition sur un emplacement réservé à M. DESCAMPS, en violation de l'article L. 51 du code électoral, d'une affiche relative à une réunion électorale organisée par Mme TOURAINE, n'a pu, à elle seule, altérer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9599785_annot.xml</text:p>
          </table:table-cell>
          <table:table-cell office:value-type="string" table:style-name="ce3">
            <text:p>4.Campagne</text:p>
          </table:table-cell>
          <table:table-cell office:value-type="string" table:style-name="ce3">
            <text:p><text:s/>7. Considérant qu'en vertu de l'article L. 52-1 du code électoral, sont interdites, dans les mois précédant l'élection, l'utilisation à des fins de propagande électorale de tout procédé de publicité commerciale ainsi que la réalisation de toute campagne de promotion publicitaire des réalisations ou de la gestion d'une collectivité loca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9599785_annot.xml</text:p>
          </table:table-cell>
          <table:table-cell office:value-type="string" table:style-name="ce3">
            <text:p>4.Campagne</text:p>
          </table:table-cell>
          <table:table-cell office:value-type="string" table:style-name="ce3">
            <text:p><text:s/>8. Considérant que ni le journal mensuel Asnières info, dont le contenu relève de l'information générale locale, ni le supplément hebdomadaire Asnières info dimanche, constitué d'une simple page recto-verso contenant des informations locales pratiques, publications dont la diffusion s'est poursuivie pendant la campagne électorale, ni les cérémonies de voeux à la population organisées en début d'année 2007 d'une manière similaire aux années précédentes, ni, enfin, la mise en ligne sur le site Internet de la mairie, comme les années précédentes, d'un reportage sur les événements marquants de l'année écoulée et d'un autre relatif aux cérémonies des voeux, ne peuvent être regardés, par leur contenu, comme constituant, au sens du deuxième alinéa de l'article L. 52-1 du code électoral, une « campagne de promotion publicitaire » des réalisations ou de la gestion de la commune d'Asnières-sur-Seine dont M. AESCHLIMANN était maire ; que le grief tiré de la violation de cet article doit dès lors être écarté ; - SUR LE GRIEF TIRÉ DE LA VIOLATION DE L'ARTICLE L. 52-8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7\rejet\CONSTEXT000019599785_annot.xml</text:p>
          </table:table-cell>
          <table:table-cell office:value-type="string" table:style-name="ce3">
            <text:p>6.Financement</text:p>
          </table:table-cell>
          <table:table-cell office:value-type="string" table:style-name="ce3">
            <text:p><text:s/>11. Considérant que la mention figurant sur plusieurs documents de propagande utilisés par M. AESCHLIMANN selon laquelle ils seraient entièrement financés sur fonds privés ne suffit pas, à elle seule, en l'absence de tout élément probant fourni par les requérants, à établir que le financement de sa campagne a méconnu les dispositions de l'article L. 52-8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8\rejet\CONSTEXT000018037615_annot.xml</text:p>
          </table:table-cell>
          <table:table-cell office:value-type="string" table:style-name="ce3">
            <text:p>4.Campagne</text:p>
          </table:table-cell>
          <table:table-cell office:value-type="string" table:style-name="ce3">
            <text:p><text:s/>2. Considérant que les propos rapportés par La Dépêche du Midi et que le requérant qualifie d'injurieux à son égard, pour les uns, ne sont pas imputables à la candidate proclamée élue et, pour les autres, n'excédaient pas les limites de la polémique électora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8\rejet\CONSTEXT000018037615_annot.xml</text:p>
          </table:table-cell>
          <table:table-cell office:value-type="string" table:style-name="ce3">
            <text:p>6.Financement</text:p>
          </table:table-cell>
          <table:table-cell office:value-type="string" table:style-name="ce3">
            <text:p><text:s/>6. Considérant que c'est à bon droit que la Commission nationale des comptes de campagne et des financements politiques n'a pas inclus dans le compte de campagne de Mme PINEL la dépense, prise en charge par le conseil général du Tarn-et-Garonne, afférente à une journée de travail à Paris dès lors qu'il n'est pas établi que ce déplacement revêtait un caractèr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8\rejet\CONSTEXT000018037615_annot.xml</text:p>
          </table:table-cell>
          <table:table-cell office:value-type="string" table:style-name="ce3">
            <text:p>6.Financement</text:p>
          </table:table-cell>
          <table:table-cell office:value-type="string" table:style-name="ce3">
            <text:p><text:s/>10. Considérant que le requérant fait valoir que, dans les mois précédant l'élection, Mme PINEL aurait assuré à temps complet la promotion de sa candidature alors qu'elle était rémunérée par le conseil général qui l'employait, ce qui constituerait une participation au financement de sa campagne ; que, si Mme PINEL a bénéficié du congé de 20 jours pour participer à la campagne électorale, prévu par l'article L. 122-24-1 du code du travail rendu applicable aux agents non titulaires des collectivités territoriales par l'article L. 122-24-3 du même code, il résulte des pièces produites par le conseil général que la durée de cette absence a été imputée sur celle des droits à congé payé annuel, comme le permet l'article L. 122-24-1 précité ; qu'il n'est dès lors pas établi que le nombre de jours de congés payés pris par Mme PINEL a excédé la limite des droits qu'elle avait acquis à ce titre à la date du premier tour de scrutin ; que, dès lors, le grief doit être écar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8\rejet\CONSTEXT000018037615_annot.xml</text:p>
          </table:table-cell>
          <table:table-cell office:value-type="string" table:style-name="ce3">
            <text:p>6.Financement</text:p>
          </table:table-cell>
          <table:table-cell office:value-type="string" table:style-name="ce3">
            <text:p><text:s/>12. Considérant, dès lors, que le grief soulevé par le requérant selon lequel Mme PINEL n'aurait pas respecté les dispositions de l'article L. 52-11 du code électoral instituant un plafond pour les dépenses électorales doit être écar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8\rejet\CONSTEXT000019159174_annot.xml</text:p>
          </table:table-cell>
          <table:table-cell office:value-type="string" table:style-name="ce3">
            <text:p>4.Campagne</text:p>
          </table:table-cell>
          <table:table-cell office:value-type="string" table:style-name="ce3">
            <text:p><text:s/>1. Considérant, en premier lieu, que l'article contesté par Mme NOACHOVITCH, paru dans l'édition du 5 décembre 2007 du journal « Le Canard Enchaîné », qui se réfère à un autre article paru en juin 2007, n'apportait aucun élément nouveau dans le débat électoral ; que la requérante a eu la possibilité d'y répondre ; qu'elle n'est, dès lors, pas fondée à soutenir que cette publication a constitué une manœuvre de nature à modifier le résultat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8\rejet\CONSTEXT000019159174_annot.xml</text:p>
          </table:table-cell>
          <table:table-cell office:value-type="string" table:style-name="ce3">
            <text:p>7.Opérations</text:p>
          </table:table-cell>
          <table:table-cell office:value-type="string" table:style-name="ce3">
            <text:p><text:s/>6. Considérant, en deuxième lieu, que, si la requérante soutient que, lors du second tour du scrutin dans le bureau de vote n° 23 de la commune de Sarcelles, un assesseur ayant souhaité contrôler l'identité d'un électeur porteur d'une procuration, aurait, par suite, été incité à quitter le bureau de vote pendant une heure au cours de laquelle plus de cent électeurs auraient voté, elle n'apporte aucun élément de preuve d'un tel incide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08\rejet\CONSTEXT000019159174_annot.xml</text:p>
          </table:table-cell>
          <table:table-cell office:value-type="string" table:style-name="ce3">
            <text:p>7.Opérations</text:p>
          </table:table-cell>
          <table:table-cell office:value-type="string" table:style-name="ce3">
            <text:p><text:s/>7. Considérant, en troisième lieu, que, lors des opérations électorales du deuxième tour de scrutin dans le premier bureau de vote de la commune de Sarcelles, les enveloppes de centaine ont été distribuées, en méconnaissance des dispositions de l'article L. 65 du code électoral, sans la signature du président et d'au moins deux assesseurs du bureau, ainsi qu'en atteste le procès-verbal du bureau de vote ; qu'il n'est pas établi que cette irrégularité, qui s'est produite notamment en présence des assesseurs, a eu pour effet de permettre des fraudes ou des erreurs de calcul ; que l'allégation de Mme NOACHOVITCH selon laquelle les enveloppes de centaine déposées non signées sur les tables de dépouillement auraient été signées auparavant, n'est pas établie</text:p>
          </table:table-cell>
          <table:table-cell table:number-columns-repeated="16377"/>
        </table:table-row>
        <table:table-row table:style-name="ro1">
          <table:table-cell office:value-type="string" table:style-name="ce7">
            <text:p>Non</text:p>
          </table:table-cell>
          <table:table-cell table:style-name="ce3"/>
          <table:table-cell office:value-type="string" table:style-name="ce3">
            <text:p>Présente la majeure /</text:p>
          </table:table-cell>
          <table:table-cell office:value-type="string" table:style-name="ce3">
            <text:p>3. Candidatures</text:p>
          </table:table-cell>
          <table:table-cell office:value-type="string" table:style-name="ce3">
            <text:p>file:\\\P:\CRJ\RECHERCHE\PROJET_JADE\JADE_COMMUN\Annotation\Annotation_automatique_Maritaud\Technologie_light\Super-catégories-objets_0,8\AN\2010\rejet\CONSTEXT000022762677_annot.xml</text:p>
          </table:table-cell>
          <table:table-cell office:value-type="string" table:style-name="ce3">
            <text:p>4.Campagne</text:p>
          </table:table-cell>
          <table:table-cell office:value-type="string" table:style-name="ce3">
            <text:p><text:s/>2. Considérant qu'aux termes de l'article L. 157 du code électoral, applicable à l'élection des députés : « Les déclarations de candidatures doivent être déposées, en double exemplaire, à la préfecture au plus tard à 18 heures le quatrième vendredi précédant le jour du scrutin » ; qu'aux termes de son article R. 98 : « Les déclarations de candidatures à l'Assemblée nationale sont reçues dans les préfectures, pour le premier tour de scrutin, à partir du quatrième lundi qui précède le jour de l'élection...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6345585_annot.xml</text:p>
          </table:table-cell>
          <table:table-cell office:value-type="string" table:style-name="ce3">
            <text:p>4.Campagne</text:p>
          </table:table-cell>
          <table:table-cell office:value-type="string" table:style-name="ce3">
            <text:p><text:s/>3. Considérant, en second lieu, que si M. LAANAYA soutient que M. Philippe VIGIER, député sortant et candidat élu au premier tour, aurait bénéficié d'une tribune dans le programme d'une manifestation sportive en utilisant le logo du conseil régional, il ne produit toutefois aucun élément de nature à établir que cette tribune pourrait être regardée comme une campagne de promotion à caractère publicitaire au sens des dispositions de l'article L. 52-1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6345591_annot.xml</text:p>
          </table:table-cell>
          <table:table-cell office:value-type="string" table:style-name="ce3">
            <text:p>7.Opérations</text:p>
          </table:table-cell>
          <table:table-cell office:value-type="string" table:style-name="ce3">
            <text:p><text:s/>4. Considérant, en troisième lieu, que les requérants dénoncent une signature anticipée du procès-verbal des opérations de vote ainsi qu'une clôture de ce procès-verbal dès 20 heures le 10 juin 2012 dans le bureau de vote n° 15 du IIIème arrondissement ; qu'ils dénoncent également l'absence de respect des règles relatives au dénombrement des émargements lors du dépouillement des votes dans plusieurs bureaux de vote ; qu'eu égard aux importants écarts de voix constatés tant au premier tour qu'au second tour de scrutin, ces faits, à les supposer établis, ne sont pas de nature à altérer la sincérité du scrutin ; qu'il en est de même de ceux relatifs aux écarts entre le nombre de votes exprimés et le nombre d'émargements constatés dans huit bureaux de vote le 10 juin 2012, pour un total de 19 voix</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6345595_annot.xml</text:p>
          </table:table-cell>
          <table:table-cell office:value-type="string" table:style-name="ce3">
            <text:p>4.Campagne</text:p>
          </table:table-cell>
          <table:table-cell office:value-type="string" table:style-name="ce3">
            <text:p><text:s/>2. Considérant qu'à l'appui de sa protestation, M. BOUF dénonce des irrégularités qui auraient entaché l'affichage électoral de la candidate élue, notamment l'utilisation massive de panneaux mis à la disposition des candidats à l'élection présidentielle ; qu'eu égard aux écarts de voix, de telles irrégularités, à les supposer établies, ne sont pas de nature à altérer la sincérité du scrutin ; que, par suite, la requête de M. BOUF doit être rejeté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6345612_annot.xml</text:p>
          </table:table-cell>
          <table:table-cell office:value-type="string" table:style-name="ce3">
            <text:p>4.Campagne</text:p>
          </table:table-cell>
          <table:table-cell office:value-type="string" table:style-name="ce3">
            <text:p><text:s/>3. Considérant que si le requérant affirme que cette irrégularité laissait penser que les enveloppes « le plus souvent, étaient pré-remplies d'un bulletin favorable » au candidat déclaré élu au second tour, il n'établit ni même n'allègue qu'un électeur aurait signalé la présence d'une enveloppe ainsi pré-remplie ou que le nombre de bulletins nuls ait été anormalement élevé ; que, par suite, la requête de M. REMILLER ne peut qu'être rejeté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6345614_annot.xml</text:p>
          </table:table-cell>
          <table:table-cell office:value-type="string" table:style-name="ce3">
            <text:p>4.Campagne</text:p>
          </table:table-cell>
          <table:table-cell office:value-type="string" table:style-name="ce3">
            <text:p><text:s/>2. Considérant, en premier lieu, que M. GAULTIER, candidat dans la 4ème circonscription des Vosges, soutient qu'une lettre adressée par le président du conseil général le 5 juin 2012 aux maires de cette circonscription a eu un « impact majeur sur le résultat de l'élection » ; que cette lettre, qui pouvait utilement être contredite par M. GAULTIER, n'excédait manifestement pas les limites de la polémique électorale ; que, dès lors, le grief doit être écarté</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1. Procédure</text:p>
          </table:table-cell>
          <table:table-cell office:value-type="string" table:style-name="ce3">
            <text:p>file:\\\P:\CRJ\RECHERCHE\PROJET_JADE\JADE_COMMUN\Annotation\Annotation_automatique_Maritaud\Technologie_light\Super-catégories-objets_0,8\AN\2012\rejet\CONSTEXT000026345615_annot.xml</text:p>
          </table:table-cell>
          <table:table-cell office:value-type="string" table:style-name="ce3">
            <text:p>4.Campagne</text:p>
          </table:table-cell>
          <table:table-cell office:value-type="string" table:style-name="ce3">
            <text:p><text:s/>3. Considérant, en premier lieu, que le requérant n'était pas inscrit sur les listes électorales de la 5ème circonscription des Alpes-Maritimes et qu'il n'a pas fait acte de candidature dans cette circonscription ; que, dès lors, il n'a pas qualité pour contester les opérations électorales auxquelles il a été procédé dans cette circonscriptio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6345619_annot.xml</text:p>
          </table:table-cell>
          <table:table-cell office:value-type="string" table:style-name="ce3">
            <text:p>4.Campagne</text:p>
          </table:table-cell>
          <table:table-cell office:value-type="string" table:style-name="ce3">
            <text:p><text:s/>2. Considérant, en premier lieu, qu'à l'appui de sa protestation, la requérante, candidate dans la 17ème circonscription de Paris, met en cause des bulletins d'information municipale ainsi que le discours prononcé lors de la cérémonie des voeux par le maire du dix-huitième arrondissement de Paris, candidat proclamé élu ; que ces bulletins et discours, qui ne contenaient aucune allusion à la campagne électorale à venir, ne sauraient être regardés comme ayant été faits en violation des prescriptions du code électoral ; qu'ils n'ont pu, en raison de leur contenu et eu égard aux écarts de voix séparant les candidats, altérer la sincérité du scrutin</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1. Procédure</text:p>
          </table:table-cell>
          <table:table-cell office:value-type="string" table:style-name="ce3">
            <text:p>file:\\\P:\CRJ\RECHERCHE\PROJET_JADE\JADE_COMMUN\Annotation\Annotation_automatique_Maritaud\Technologie_light\Super-catégories-objets_0,8\AN\2012\rejet\CONSTEXT000026345629_annot.xml</text:p>
          </table:table-cell>
          <table:table-cell office:value-type="string" table:style-name="ce3">
            <text:p>4.Campagne</text:p>
          </table:table-cell>
          <table:table-cell office:value-type="string" table:style-name="ce3">
            <text:p><text:s/>1. Considérant que, par la décision du 13 juillet 2012 susvisée, le Conseil constitutionnel a déclaré irrecevable une requête déposée par M. POURCHEZ au tribunal administratif de Lille ; qu'une autre requête rédigée dans les mêmes termes a toutefois également été déposée le 28 juin 2012 à la préfecture du Nord ; qu'elle est donc recevable</text:p>
          </table:table-cell>
          <table:table-cell table:number-columns-repeated="16377"/>
        </table:table-row>
        <table:table-row table:style-name="ro1">
          <table:table-cell office:value-type="string" table:style-name="ce7">
            <text:p>Non<text:s/></text:p>
          </table:table-cell>
          <table:table-cell office:value-type="string" table:style-name="ce3">
            <text:p>Mauvais découpage</text:p>
          </table:table-cell>
          <table:table-cell table:number-columns-repeated="2" table:style-name="ce3"/>
          <table:table-cell office:value-type="string" table:style-name="ce3">
            <text:p>file:\\\P:\CRJ\RECHERCHE\PROJET_JADE\JADE_COMMUN\Annotation\Annotation_automatique_Maritaud\Technologie_light\Super-catégories-objets_0,8\AN\2012\rejet\CONSTEXT000027090311_annot.xml</text:p>
          </table:table-cell>
          <table:table-cell office:value-type="string" table:style-name="ce3">
            <text:p>4.Campagne</text:p>
          </table:table-cell>
          <table:table-cell office:value-type="string" table:style-name="ce3">
            <text:p><text:s/>1. Considérant, en premier lieu, qu'aux termes du troisième alinéa de l'article L. 62-1 du code électoral : « Le vote de chaque électeur est constaté par sa signature apposée à l'encre en face de son nom sur la liste d'émargement » ; qu'aux termes du deuxième alinéa de l'article L. 64 du même code : « Lorsqu'un électeur se trouve dans l'impossibilité de signer, l'émargement prévu par le troisième alinéa de l'article L. 62-1 est apposé par un électeur de son choix qui fait suivre sa signature de la mention suivante : 'l'électeur ne peut signer lui-même' » ; qu'il ressort de ces dispositions, destinées à assurer la sincérité des opérations électorales, que seule la signature personnelle, à l'encre, d'un électeur est de nature à apporter la preuve de sa participation au scrutin, sauf cas d'impossibilité dûment mentionnée sur la liste d'émargeme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090311_annot.xml</text:p>
          </table:table-cell>
          <table:table-cell office:value-type="string" table:style-name="ce3">
            <text:p>4.Campagne</text:p>
          </table:table-cell>
          <table:table-cell office:value-type="string" table:style-name="ce3">
            <text:p><text:s/>7. Considérant, en deuxième lieu, que la diffusion d'une émission satirique « Action discrète », sur la chaîne Canal Plus, le dimanche 3 juin 2012, n'a pu, en raison de son caractère même, être à l'origine d'une rumeur diffamatoire que l'adversaire de Mme BRUN aurait pu exploite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090311_annot.xml</text:p>
          </table:table-cell>
          <table:table-cell office:value-type="string" table:style-name="ce3">
            <text:p>7.Opérations</text:p>
          </table:table-cell>
          <table:table-cell office:value-type="string" table:style-name="ce3">
            <text:p><text:s/>3. Considérant, d'autre part, que Mme BRUN soutient que les signatures figurant pour les deux tours de scrutin en marge du nom d'un même électeur présentent, dans quarante-quatre cas, des différences qui établissent que le vote n'a pas été effectué par l'électeur ; qu'il résulte de l'instruction, notamment de l'examen des listes d'émargement des bureaux de vote concernés, que, pour l'essentiel des cas, les différences alléguées ne sont pas probantes ; qu'au surplus, vingt-quatre des électeurs concernés ont reconnu formellement avoir voté en personne lors des deux tours de scrutin tandis qu'une électrice attestait n'avoir voté qu'au second tour, ce qui expliquait la présence d'une signature rayée au premier tour sur la liste d'émargement ; qu'en revanche, sept votes, correspondant à des différences de signature significatives, doivent être regardés comme irrégulièrement exprimé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090311_annot.xml</text:p>
          </table:table-cell>
          <table:table-cell office:value-type="string" table:style-name="ce3">
            <text:p>7.Opérations</text:p>
          </table:table-cell>
          <table:table-cell office:value-type="string" table:style-name="ce3">
            <text:p><text:s/>4. Considérant, en second lieu, que sur la liste d'émargement du bureau de vote n° 1 du Plessis-Gassot, le nom du mandataire ne figure pas à côté du nom du mandant pour six électeurs ayant voté par procuration, contrairement à ce qu'exige l'article R. 76-1 du code électoral ; que cette omission, pour regrettable qu'elle soit, ne doit toutefois pas conduire à l'invalidation d'un nombre équivalent de suffrages, dès lors qu'il ne résulte pas de l'instruction, et qu'il n'est d'ailleurs pas allégué, que ces insuffisances ou omissions auraient été à l'origine de votes irrégulier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090312_annot.xml</text:p>
          </table:table-cell>
          <table:table-cell office:value-type="string" table:style-name="ce3">
            <text:p>4.Campagne</text:p>
          </table:table-cell>
          <table:table-cell office:value-type="string" table:style-name="ce3">
            <text:p><text:s/>1. Considérant, en premier lieu, qu'il résulte de l'instruction qu'un long message électronique anonyme comportant notamment une présentation critique du parcours politique de M. LOVISOLO et des insinuations relatives à son honnêteté et à celle de sa famille, ainsi qu'une invitation à le transmettre largement à d'autres correspondants, a été diffusé au plus tard à partir du lendemain du premier tour de scrutin ; que si ce message était susceptible de discréditer le requérant dans l'esprit des électeurs, il n'est cependant pas allégué qu'il aurait fait l'objet d'une diffusion sous forme de tracts imprimés ni établi que sa diffusion par voie électronique aurait été importante ; que, par suite, eu égard à l'écart de voix entre le requérant et le candidat élu, sa diffusion n'a pas, contrairement à ce qui est soutenu, été de nature à altérer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090315_annot.xml</text:p>
          </table:table-cell>
          <table:table-cell office:value-type="string" table:style-name="ce3">
            <text:p>7.Opérations</text:p>
          </table:table-cell>
          <table:table-cell office:value-type="string" table:style-name="ce3">
            <text:p><text:s/>1. Considérant, en premier lieu, que M. ZERIBI, qui dit avoir constaté à 19 heures le soir du premier tour que les bulletins de vote à son nom étaient recouverts par ceux d'un autre candidat dans le bureau de vote n°1404 de Marseille, soutient que ces bulletins n'ont pas été disponibles pendant toute la journée ; que, contrairement à ce qui est allégué par le requérant, le procès-verbal du bureau de vote n° 1404 de Marseille ne mentionne pas cette irrégularité ; qu'aucun commencement de preuve n'est produit par le requérant ; que le grief tiré de l'absence de mise à disposition des bulletins portant le nom de M. ZERIBI dans le bureau de vote n° 1404 de Marseille doit donc être écar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090315_annot.xml</text:p>
          </table:table-cell>
          <table:table-cell office:value-type="string" table:style-name="ce3">
            <text:p>7.Opérations</text:p>
          </table:table-cell>
          <table:table-cell office:value-type="string" table:style-name="ce3">
            <text:p><text:s/>3. Considérant que les listes d'émargement du bureau de vote n° 1613 de Marseille ont disparu au soir des opérations électorales du premier tour ; que ces listes n'ont jamais pu être produites à l'appui des résultats de ce bureau de vote ; qu'il résulte de l'instruction que cette disparition a été constatée en fin de journée, lors des opérations de comptage des bulletins, par le président du bureau de vote, qui l'a mentionnée au procès-verbal de ce bureau ; qu'elle a été également mentionnée dans le procès-verbal, en date du 11 juin 2012, de la commission chargée du recensement des votes dans la 7ème circonscription des Bouches-du-Rhône ; que l'absence de ces listes constitue une irrégularité qui fait obstacle au contrôle par le Conseil constitutionnel de la sincérité des opérations électorales dans le bureau de vote n° 1613 de Marseille ; qu'il y a lieu de considérer comme nuls les suffrages émis dans ce bureau de vote et de les retrancher du nombre de voix obtenues par les candidats ; que, déduction faite des 114 suffrages attribués à M. JIBRAYEL, des 92 suffrages attribués à M. ZERIBI et des 52 suffrages attribués à M. MIRANDAT dans le bureau de vote n° 1613 de Marseille, MM. JIBRAYEL et MIRANDAT demeurent les deux candidats arrivés en tête à l'issue du premier tour de scrutin sans qu'aucun autre candidat n'obtienne un nombre de suffrages au moins égal à 12,5 % des électeurs inscrits ; que, par suite, seuls MM. JIBRAYEL et MIRANDAT remplissaient les conditions pour être candidats au second tour ; que le grief tiré de ce que la disparition des listes d'émargement conduirait à modifier la désignation des candidats pour le second tour doit être écar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090316_annot.xml</text:p>
          </table:table-cell>
          <table:table-cell office:value-type="string" table:style-name="ce3">
            <text:p>4.Campagne</text:p>
          </table:table-cell>
          <table:table-cell office:value-type="string" table:style-name="ce3">
            <text:p><text:s/>1. Considérant que M. BORELLI allègue qu'un tract contenant des propos à caractère diffamatoire à l'encontre de M. DIARD, candidat au second tour, a été massivement diffusé la veille du second tour de scrutin ; que M. DIARD aurait été ainsi mis dans l'impossibilité d'y répondre ; que cette diffusion méconnaîtrait l'article L. 48-2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090316_annot.xml</text:p>
          </table:table-cell>
          <table:table-cell office:value-type="string" table:style-name="ce3">
            <text:p>4.Campagne</text:p>
          </table:table-cell>
          <table:table-cell office:value-type="string" table:style-name="ce3">
            <text:p><text:s/>2. Considérant que M. BORELLI n'apporte pas la preuve que le tract a été diffusé la veille du scrutin ; qu'il résulte, au contraire, de l'instruction que sa première diffusion est intervenue l'avant-veille du second tour ; que ce tract, dont le caractère massif de la diffusion n'est pas démontré, ne contenait aucun élément nouveau et n'excédait pas les limites de la polémique électorale ; que, par suite, le grief tiré d'irrégularités commises pendant la campagne électorale doit être écarté ; - SUR LE GRIEF TIRÉ DE L'IMPOSSIBILITÉ POUR PLUSIEURS ÉLECTEURS DE FAIRE ÉTABLIR UNE PROCURATIO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090316_annot.xml</text:p>
          </table:table-cell>
          <table:table-cell office:value-type="string" table:style-name="ce3">
            <text:p>7.Opérations</text:p>
          </table:table-cell>
          <table:table-cell office:value-type="string" table:style-name="ce3">
            <text:p><text:s/>7. Considérant, en deuxième lieu, qu'aucune disposition législative ou règlementaire n'impose que les bulletins de vote soient identiques dans tous les bureaux de vote ; qu'il ne résulte pas de l'instruction que les prescriptions du code électoral relatives aux mentions et au format des bulletins auraient été méconnu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090316_annot.xml</text:p>
          </table:table-cell>
          <table:table-cell office:value-type="string" table:style-name="ce3">
            <text:p>7.Opérations</text:p>
          </table:table-cell>
          <table:table-cell office:value-type="string" table:style-name="ce3">
            <text:p><text:s/>9. Considérant, en dernier lieu, que le requérant n'établit pas que des bulletins de vote auraient été distribués avant le scrutin ; que le grief tiré de l'atteinte au secret du vote doit, en tout état de cause, être écar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090317_annot.xml</text:p>
          </table:table-cell>
          <table:table-cell office:value-type="string" table:style-name="ce3">
            <text:p>7.Opérations</text:p>
          </table:table-cell>
          <table:table-cell office:value-type="string" table:style-name="ce3">
            <text:p><text:s/>3. Considérant que si cette discordance est établie et n'est d'ailleurs pas contestée, il n'est en revanche ni établi, ni même soutenu, que le nombre d'émargements arrêté aux procès-verbaux de ces bureaux ne correspondrait pas au nombre d'émargements effectivement portés au cours des opérations de vote ou différerait du nombre de bulletins trouvés dans l'urne ; que, toutefois, la mention d'une enveloppe surnuméraire au procès-verbal du bureau de vote n° 54 de Montpellier doit conduire à déduire une voix tant du nombre de suffrages exprimés que du nombre de voix obtenues par le candidat élu ; que les procès-verbaux ne comportent aucune observation relative à cette discordance et qu'au surplus, de nombreux émargements, d'aspect grossier et répartis entre les bureaux en cause pour le second tour, présentent de fortes ressemblances ; que, dès lors, la discordance relevée doit être regardée comme résultant en l'espèce de l'ajout d'émargements postérieurement au dépouillement et à l'établissement des procès-verbaux ; que, dans ces conditions et sans qu'il soit nécessaire de connaître les circonstances dans lesquelles se sont produits ces ajouts, la discordance relevée est sans incidence sur le résultat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090317_annot.xml</text:p>
          </table:table-cell>
          <table:table-cell office:value-type="string" table:style-name="ce3">
            <text:p>7.Opérations</text:p>
          </table:table-cell>
          <table:table-cell office:value-type="string" table:style-name="ce3">
            <text:p><text:s/>5. Considérant, d'une part, que, parmi les signatures dénoncées, quatre-vingt-dix-sept signatures résultent d'ajouts postérieurs au dépouillement et à l'établissement des procès-verbaux et n'ont en tout état de cause pu être prises en compte lors du dépouillement ; que, par suite, le défaut d'authenticité de ces signatures ne saurait avoir d'incidence sur le résultat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090317_annot.xml</text:p>
          </table:table-cell>
          <table:table-cell office:value-type="string" table:style-name="ce3">
            <text:p>7.Opérations</text:p>
          </table:table-cell>
          <table:table-cell office:value-type="string" table:style-name="ce3">
            <text:p><text:s/>11. Considérant qu'il n'est pas établi qu'il n'aurait pas été fait usage lors du dépouillement du second tour de scrutin dans les bureaux de vote de la commune de Montpellier de feuilles de pointages ; qu'en tout état de cause cette irrégularité ne serait pas, en elle-même, susceptible de vicier les résultats du scrutin, dès lors que le décompte des suffrages opéré dans ces bureaux n'est pas contesté ; - SUR LES GRIEFS RELATIFS AUX PROCÈS-VERBAUX</text:p>
          </table:table-cell>
          <table:table-cell table:number-columns-repeated="16377"/>
        </table:table-row>
        <table:table-row table:style-name="ro1">
          <table:table-cell office:value-type="string" table:style-name="ce7">
            <text:p>Non</text:p>
          </table:table-cell>
          <table:table-cell table:style-name="ce3"/>
          <table:table-cell office:value-type="string" table:style-name="ce3">
            <text:p>Présente la majeure</text:p>
          </table:table-cell>
          <table:table-cell office:value-type="string" table:style-name="ce3">
            <text:p><text:s/>7. Opérations</text:p>
          </table:table-cell>
          <table:table-cell office:value-type="string" table:style-name="ce3">
            <text:p>file:\\\P:\CRJ\RECHERCHE\PROJET_JADE\JADE_COMMUN\Annotation\Annotation_automatique_Maritaud\Technologie_light\Super-catégories-objets_0,8\AN\2012\rejet\CONSTEXT000027090317_annot.xml</text:p>
          </table:table-cell>
          <table:table-cell office:value-type="string" table:style-name="ce3">
            <text:p>4.Campagne</text:p>
          </table:table-cell>
          <table:table-cell office:value-type="string" table:style-name="ce3">
            <text:p><text:s/>10. Considérant, en second lieu, qu'en vertu du troisième alinéa de l'article L. 65 du code électoral, lors du dépouillement, « les noms portés sur les bulletins sont relevés par deux scrutateurs au moins sur des listes préparées à cet effet » et qu'aux termes de l'article R. 68 : « les feuilles de pointage sont jointes au procès-verbal »</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12\rejet\CONSTEXT000027146918_annot.xml</text:p>
          </table:table-cell>
          <table:table-cell office:value-type="string" table:style-name="ce3">
            <text:p>4.Campagne</text:p>
          </table:table-cell>
          <table:table-cell office:value-type="string" table:style-name="ce3">
            <text:p><text:s/>3. Considérant qu'il résulte de tout ce qui précède que la requête de M. ABRAHAM doit être rejeté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19_annot.xml</text:p>
          </table:table-cell>
          <table:table-cell office:value-type="string" table:style-name="ce3">
            <text:p>4.Campagne</text:p>
          </table:table-cell>
          <table:table-cell office:value-type="string" table:style-name="ce3">
            <text:p><text:s/>3. Considérant, en deuxième lieu, que, d'une part, M. ISNARD fait valoir que M. FERRAND a animé une émission de télévision hebdomadaire sur la chaine LCI et participé à de nombreuses émissions diffusées par des chaînes de télévision et de radiodiffusion nationales dans des conditions entraînant une rupture de l'égalité avec les autres candidats devant les moyens de communication ; que, nonobstant l'intérêt que les services de communication audiovisuelle ont porté à la candidature de M. FERRAND en raison de sa notoriété, il ne résulte pas de l'instruction que, dans les émissions citées, M. FERRAND serait intervenu sur des thèmes relatifs à la campagne électorale dans la 8ème circonscription des Bouches-du-Rhôn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19_annot.xml</text:p>
          </table:table-cell>
          <table:table-cell office:value-type="string" table:style-name="ce3">
            <text:p>4.Campagne</text:p>
          </table:table-cell>
          <table:table-cell office:value-type="string" table:style-name="ce3">
            <text:p><text:s/>7. Considérant, en quatrième lieu, que M. ISNARD fait valoir que M. FERRAND aurait fait procéder à l'apposition d'affiches électorales la veille du second tour de scrutin sur la place de la mairie de Salon-de-Provence en méconnaissance des dispositions des articles L. 51 et L. 90 du code électoral ; qu'il conteste également la tenue d'une réunion de propagande électorale la veille du second tour de scrutin en méconnaissance des dispositions des articles L. 48-1, L. 48-2 et L. 49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19_annot.xml</text:p>
          </table:table-cell>
          <table:table-cell office:value-type="string" table:style-name="ce3">
            <text:p>5.Campagne</text:p>
          </table:table-cell>
          <table:table-cell office:value-type="string" table:style-name="ce3">
            <text:p><text:s/>5. Considérant, en troisième lieu, que M. ISNARD soutient que M. FERRAND aurait bénéficié d'opérations de propagande électorale irrégulières, en s'appuyant sur des moyens municipaux, notamment à l'occasion d'une cérémonie en souvenir de la mort de son arrière-grand-père, de la présentation d'une coupe aux enfants d'un club de football et du déplacement de plusieurs personnalités politiques ; qu'il met également en cause le soutien de membres du gouvernement au candidat élu</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19_annot.xml</text:p>
          </table:table-cell>
          <table:table-cell office:value-type="string" table:style-name="ce3">
            <text:p>7.Opérations</text:p>
          </table:table-cell>
          <table:table-cell office:value-type="string" table:style-name="ce3">
            <text:p><text:s/>12. Considérant, en troisième lieu, que M. ISNARD conteste les conditions d'ouverture des bureaux de vote de la commune de Salon-de-Provence ; qu'il soutient que la fermeture de ces bureaux de vote à 18 heures, alors que des informations non officielles relatives à l'ouverture des bureaux de vote de cette commune indiquaient une fermeture à 20 heures, a privé de nombreux électeurs de la possibilité de vote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19_annot.xml</text:p>
          </table:table-cell>
          <table:table-cell office:value-type="string" table:style-name="ce3">
            <text:p>7.Opérations</text:p>
          </table:table-cell>
          <table:table-cell office:value-type="string" table:style-name="ce3">
            <text:p><text:s/>13. Considérant que, lors des deux tours de scrutin, les bureaux de vote ont fermé à 18 heures en application du premier alinéa de l'article R. 41 du code électoral ; qu'il n'est pas établi que la circonstance que certains électeurs aient pu croire que les bureaux de vote fermeraient plus tard résulte d'une manoeuvr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21_annot.xml</text:p>
          </table:table-cell>
          <table:table-cell office:value-type="string" table:style-name="ce3">
            <text:p>4.Campagne</text:p>
          </table:table-cell>
          <table:table-cell office:value-type="string" table:style-name="ce3">
            <text:p><text:s/>1. Considérant, en premier lieu, qu'à l'appui de sa protestation, le requérant soutient qu'une publication occasionnelle intitulée « La lettre du maire » ainsi que les bulletins municipaux de la ville de Trappes en mai et juin 2012 contenaient des éditoriaux signés par le maire de cette commune et commentaient l'actualité électorale en méconnaissance des dispositions de l'article L. 52-8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21_annot.xml</text:p>
          </table:table-cell>
          <table:table-cell office:value-type="string" table:style-name="ce3">
            <text:p>4.Campagne</text:p>
          </table:table-cell>
          <table:table-cell office:value-type="string" table:style-name="ce3">
            <text:p><text:s/>5. Considérant, en troisième lieu, que M. FOURGOUS disposait du temps nécessaire pour répondre aux allégations contenues dans le tract qu'une « conseillère municipale UMP » de la ville d'Elancourt a fait imprimer en 20 000 exemplaires et distribuer avant le premier tour de scrutin et qui contenait des allégations tendant à discréditer sa candidature ; que la diffusion de ce tract n'a pu avoir pour effet d'altérer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21_annot.xml</text:p>
          </table:table-cell>
          <table:table-cell office:value-type="string" table:style-name="ce3">
            <text:p>4.Campagne</text:p>
          </table:table-cell>
          <table:table-cell office:value-type="string" table:style-name="ce3">
            <text:p><text:s/>6. Considérant, en quatrième lieu, que le tract émanant d'une conseillère municipale du Mesnil-Saint-Denis et présentant de manière ambiguë la position du requérant sur plusieurs questions d'intérêt local, diffusé dans cette commune dans les jours précédant le second tour du scrutin, ne contenait pas d'élément de polémique électorale nouveau ; que l'ampleur de sa diffusion n'est pas établie ; que, par suite, cette diffusion, même tardive, n'a pu exercer une influence déterminante sur le scrutin</text:p>
          </table:table-cell>
          <table:table-cell table:number-columns-repeated="16377"/>
        </table:table-row>
        <table:table-row table:style-name="ro1">
          <table:table-cell office:value-type="string" table:style-name="ce7">
            <text:p>Non</text:p>
          </table:table-cell>
          <table:table-cell table:style-name="ce3"/>
          <table:table-cell office:value-type="string" table:style-name="ce3">
            <text:p>Présente la majeure</text:p>
          </table:table-cell>
          <table:table-cell office:value-type="string" table:style-name="ce3">
            <text:p>7. Opérations</text:p>
          </table:table-cell>
          <table:table-cell office:value-type="string" table:style-name="ce3">
            <text:p>file:\\\P:\CRJ\RECHERCHE\PROJET_JADE\JADE_COMMUN\Annotation\Annotation_automatique_Maritaud\Technologie_light\Super-catégories-objets_0,8\AN\2012\rejet\CONSTEXT000027146922_annot.xml</text:p>
          </table:table-cell>
          <table:table-cell office:value-type="string" table:style-name="ce3">
            <text:p>4.Campagne</text:p>
          </table:table-cell>
          <table:table-cell office:value-type="string" table:style-name="ce3">
            <text:p><text:s/>1. Considérant, en premier lieu, qu'aux termes du troisième alinéa de l'article L. 62-1 du code électoral : « Le vote de chaque électeur est constaté par sa signature apposée à l'encre en face de son nom sur la liste d'émargement » ; qu'aux termes du deuxième alinéa de l'article L. 64 du même code : « Lorsqu'un électeur se trouve dans l'impossibilité de signer, l'émargement prévu par le troisième alinéa de l'article L. 62-1 est apposé par un électeur de son choix qui fait suivre sa signature de la mention suivante : 'l'électeur ne peut signer lui-même' » ; qu'il ressort de ces dispositions, destinées à assurer la sincérité des opérations électorales, que seule la signature personnelle, à l'encre, d'un électeur est de nature à apporter la preuve de sa participation au scrutin, sauf cas d'impossibilité dûment mentionnée sur la liste d'émargeme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22_annot.xml</text:p>
          </table:table-cell>
          <table:table-cell office:value-type="string" table:style-name="ce3">
            <text:p>4.Campagne</text:p>
          </table:table-cell>
          <table:table-cell office:value-type="string" table:style-name="ce3">
            <text:p><text:s/>8. Considérant, en premier lieu, que M. BRIOIS soutient que le reportage sur la campagne électorale dans la 11ème circonscription du Pas-de-Calais, qui a été diffusé le 14 juin 2012 dans le cadre de l'émission télévisée « Envoyé spécial » sur France 2, n'a pas respecté l'égalité du temps de parole entre les candidats faute pour Mme Marine LE PEN d'y avoir été interrogée ; qu'il résulte de l'instruction que Mme LE PEN s'est exprimée lors d'autres émissions et notamment, dès le lendemain au cours de l'édition régionale du journal télévisé « 19/20 » de France 3 ; qu'ainsi, l'existence d'un traitement discriminatoire des candidats de nature à avoir altéré la sincérité des résultats du scrutin n'est pas établi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22_annot.xml</text:p>
          </table:table-cell>
          <table:table-cell office:value-type="string" table:style-name="ce3">
            <text:p>7.Opérations</text:p>
          </table:table-cell>
          <table:table-cell office:value-type="string" table:style-name="ce3">
            <text:p><text:s/>2. Considérant, d'une part, qu'il résulte de l'instruction que deux votes constatés par de simples croix sur les listes d'émargement des bureaux de vote n° 1 de Carvin et n° 4 de Libercourt ne peuvent être tenus pour régulièrement exprimé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23_annot.xml</text:p>
          </table:table-cell>
          <table:table-cell office:value-type="string" table:style-name="ce3">
            <text:p>4.Campagne</text:p>
          </table:table-cell>
          <table:table-cell office:value-type="string" table:style-name="ce3">
            <text:p><text:s/>3. Considérant, en deuxième lieu, que Mme MORANO dénonce les agissements d'un humoriste imitateur, animateur d'une émission de radio, lequel, se faisant passer pour le vice-président du Front National, a tenu avec elle une conversation téléphonique à caractère politique diffusée lors d'émissions radiophoniques le 14 juin 2012 ; que cette diffusion constituerait une manoeuvre prohibée par l'article L. 97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23_annot.xml</text:p>
          </table:table-cell>
          <table:table-cell office:value-type="string" table:style-name="ce3">
            <text:p>7.Opérations</text:p>
          </table:table-cell>
          <table:table-cell office:value-type="string" table:style-name="ce3">
            <text:p><text:s/>9. Considérant qu'il résulte en effet de l'instruction que des membres d'une équipe de tournage audiovisuel ont porté atteinte aux règles du code électoral relatives au déroulement des opérations de vote dans un bureau de vote de la circonscription le jour du second tour de scrutin ; qu'indépendamment de leur éventuelle répression pénale, ces faits n'ont toutefois pu, compte tenu de l'écart de voix, avoir une incidence sur les résultats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24_annot.xml</text:p>
          </table:table-cell>
          <table:table-cell office:value-type="string" table:style-name="ce3">
            <text:p>4.Campagne</text:p>
          </table:table-cell>
          <table:table-cell office:value-type="string" table:style-name="ce3">
            <text:p><text:s/>4. Considérant, en troisième lieu, que M. ROSSIGNOL soutient à l'appui de sa requête qu'un tract hostile à sa candidature a été diffusé massivement la veille du second tour de scrutin, en méconnaissance de l'article L. 48-2 du code électoral, et dans des conditions lui interdisant d'y répondre en temps utile ; que, compte tenu du faible écart de voix le séparant de la candidate élue, ce tract aurait été de nature à altérer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27_annot.xml</text:p>
          </table:table-cell>
          <table:table-cell office:value-type="string" table:style-name="ce3">
            <text:p>4.Campagne</text:p>
          </table:table-cell>
          <table:table-cell office:value-type="string" table:style-name="ce3">
            <text:p><text:s/>1. Considérant, en premier lieu, que la participation de M. ALAUZET à l'inauguration d'une salle polyvalente la veille du scrutin et la relation par la presse de cet événement n'enfreignent pas l'article L. 49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27_annot.xml</text:p>
          </table:table-cell>
          <table:table-cell office:value-type="string" table:style-name="ce3">
            <text:p>4.Campagne</text:p>
          </table:table-cell>
          <table:table-cell office:value-type="string" table:style-name="ce3">
            <text:p><text:s/>3. Considérant, en troisième lieu, que la diffusion sur internet et les réseaux sociaux, le 15 juin 2012 au matin, d'appréciations négatives concernant M. GROSPERRIN n'excédait pas les limites de la polémique électorale ; que le candidat mis en cause a pu y répondre ; que, dès lors, cette diffusion n'a pas été de nature à altérer la sincérité du scrutin ; - SUR LES GRIEFS RELATIFS AUX OPÉRATIONS DE VOT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27_annot.xml</text:p>
          </table:table-cell>
          <table:table-cell office:value-type="string" table:style-name="ce3">
            <text:p>7.Opérations</text:p>
          </table:table-cell>
          <table:table-cell office:value-type="string" table:style-name="ce3">
            <text:p><text:s/>7. Considérant que l'absence sur les listes d'émargement des mentions obligatoires en matière de vote par procuration ne doit pas conduire à l'invalidation d'un nombre équivalent de suffrages, dès lors qu'il ne résulte pas de l'instruction que ces insuffisances ou omissions auraient été à l'origine de votes irréguliers ; qu'il résulte cependant de l'instruction que, dans les bureaux de vote des communes de Besançon et Devecey, deux électeurs ont voté par procuration sans qu'il soit établi qu'une procuration avait été valablement donnée ; que, par suite, deux votes doivent être regardés comme exprimés de manière irrégulièr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27_annot.xml</text:p>
          </table:table-cell>
          <table:table-cell office:value-type="string" table:style-name="ce3">
            <text:p>7.Opérations</text:p>
          </table:table-cell>
          <table:table-cell office:value-type="string" table:style-name="ce3">
            <text:p><text:s/>9. Considérant enfin que M. GROSPERRIN soutient que, dans deux bureaux de vote de la commune de Besançon ainsi que dans le bureau de vote de la commune de Mérey-Vieilley, le nombre des émargements effectifs ne correspond pas au nombre des bulletins trouvés dans l'urn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27_annot.xml</text:p>
          </table:table-cell>
          <table:table-cell office:value-type="string" table:style-name="ce3">
            <text:p>7.Opérations</text:p>
          </table:table-cell>
          <table:table-cell office:value-type="string" table:style-name="ce3">
            <text:p><text:s/>11. Considérant que, pour la commune de Besançon, il résulte de l'instruction que, dans deux bureaux de vote, le nombre des émargements est inférieur de un au nombre des votes ; que, par suite, deux votes doivent être regardés comme exprimés de manière irrégulièr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30_annot.xml</text:p>
          </table:table-cell>
          <table:table-cell office:value-type="string" table:style-name="ce3">
            <text:p>4.Campagne</text:p>
          </table:table-cell>
          <table:table-cell office:value-type="string" table:style-name="ce3">
            <text:p><text:s/>4. Considérant, en troisième lieu, que M. ÉPINEAU fait grief à M. GORGES d'avoir fait diffuser sur son site internet, le vendredi 15 juin 2012, un communiqué par lequel il était sous-entendu qu'un militant favorable à M. LEBON aurait dégradé les affiches de M. GORGES ; que ce communiqué constituerait une manoeuvre de dernière minute de nature à altérer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30_annot.xml</text:p>
          </table:table-cell>
          <table:table-cell office:value-type="string" table:style-name="ce3">
            <text:p>4.Campagne</text:p>
          </table:table-cell>
          <table:table-cell office:value-type="string" table:style-name="ce3">
            <text:p><text:s/>5. Considérant que le communiqué en cause, diffusé le vendredi 15 juin 2012, n'imputait pas directement à M. LEBON la dégradation des affiches; qu'il était possible à ce dernier d'y répondre, ce qu'il a d'ailleurs fait ; qu'ainsi la diffusion de ce communiqué n'a pu altérer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30_annot.xml</text:p>
          </table:table-cell>
          <table:table-cell office:value-type="string" table:style-name="ce3">
            <text:p>4.Campagne</text:p>
          </table:table-cell>
          <table:table-cell office:value-type="string" table:style-name="ce3">
            <text:p><text:s/>7. Considérant qu'il n'est pas établi que la diffusion du message de propagande appelant à voter pour M. GORGES le matin du scrutin ait revêtu un caractère massif ; que, par suite, pour regrettable qu'elle soit, elle n'a pu altérer la sincérité du scrutin ; qu'il n'est par ailleurs pas établi que M. GORGES ait fait apposer de nouvelles affiches à compter de la veille du scrutin à minui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30_annot.xml</text:p>
          </table:table-cell>
          <table:table-cell office:value-type="string" table:style-name="ce3">
            <text:p>4.Campagne</text:p>
          </table:table-cell>
          <table:table-cell office:value-type="string" table:style-name="ce3">
            <text:p><text:s/>10. Considérant qu'il résulte de l'instruction que des paniers garnis sont distribués aux retraités n'ayant pu participer au « dîner des anciens » depuis 2006 au moins ; qu'une telle distribution, qui revêt un caractère traditionnel, n'a pas de caractèr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30_annot.xml</text:p>
          </table:table-cell>
          <table:table-cell office:value-type="string" table:style-name="ce3">
            <text:p>4.Campagne</text:p>
          </table:table-cell>
          <table:table-cell office:value-type="string" table:style-name="ce3">
            <text:p><text:s/>14. Considérant, en neuvième lieu, que M. ÉPINEAU soutient qu'une lettre d'information diffusée par un conseiller général, par ailleurs soutien de M. GORGES, constitue une violation de l'article L. 52-1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30_annot.xml</text:p>
          </table:table-cell>
          <table:table-cell office:value-type="string" table:style-name="ce3">
            <text:p>4.Campagne</text:p>
          </table:table-cell>
          <table:table-cell office:value-type="string" table:style-name="ce3">
            <text:p><text:s/>15. Considérant qu'aux termes du deuxième alinéa de l'article L. 52-1 du code électoral : « À compter du premier jour du sixième mois précédant le mois au cours duquel il doit être procédé à des élections générales, aucune campagne de promotion publicitaire des réalisations ou de la gestion d'une collectivité ne peut être organisée sur le territoire des collectivités intéressées par le scrutin. . . » ; qu'il résulte de l'instruction que la lettre du conseiller général citée par le requérant ne fait pas référence à M. GORGES ou au scrutin législatif ; qu'elle se borne à présenter les dossiers d'intérêt cantonal ; qu'elle ne peut donc être regardée comme une campagne de promotion publicitaire au bénéfice de M. GORGES</text:p>
          </table:table-cell>
          <table:table-cell table:number-columns-repeated="16377"/>
        </table:table-row>
        <table:table-row table:style-name="ro1">
          <table:table-cell office:value-type="string" table:style-name="ce7">
            <text:p>Non</text:p>
          </table:table-cell>
          <table:table-cell office:value-type="string" table:style-name="ce3">
            <text:p>Mauvais découpage / Présente la majeure</text:p>
          </table:table-cell>
          <table:table-cell table:number-columns-repeated="2" table:style-name="ce3"/>
          <table:table-cell office:value-type="string" table:style-name="ce3">
            <text:p>file:\\\P:\CRJ\RECHERCHE\PROJET_JADE\JADE_COMMUN\Annotation\Annotation_automatique_Maritaud\Technologie_light\Super-catégories-objets_0,8\AN\2012\rejet\CONSTEXT000027146932_annot.xml</text:p>
          </table:table-cell>
          <table:table-cell office:value-type="string" table:style-name="ce3">
            <text:p>4.Campagne</text:p>
          </table:table-cell>
          <table:table-cell office:value-type="string" table:style-name="ce3">
            <text:p><text:s/>2. Considérant qu'aux termes du deuxième alinéa de l'article L. 52-1 du code électoral : « À compter du premier jour du sixième mois précédant le mois au cours duquel il doit être procédé à des élections générales, aucune campagne de promotion publicitaire des réalisations ou de la gestion d'une collectivité ne peut être organisée sur le territoire des collectivités intéressées par le scrutin » ; qu'aux termes du deuxième alinéa de l'article L. 52-8 du même code : « Les personnes morales, à l'exception des partis ou groupements politiques, ne peuvent participer au financement de la campagne électorale d'un candidat, ni en lui consentant des dons sous quelque forme que ce soit, ni en lui fournissant des biens, services ou autres avantages directs ou indirects à des prix inférieurs à ceux habituellement pratiqués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35_annot.xml</text:p>
          </table:table-cell>
          <table:table-cell office:value-type="string" table:style-name="ce3">
            <text:p>4.Campagne</text:p>
          </table:table-cell>
          <table:table-cell office:value-type="string" table:style-name="ce3">
            <text:p><text:s/>5. Considérant, en quatrième lieu, que la présence des couleurs bleu, blanc et rouge sur la circulaire que la candidate élue a adressée aux électeurs pour le second tour du scrutin ne constituait pas, en l'espèce, une combinaison des trois couleurs prohibée par l'article R. 27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36_annot.xml</text:p>
          </table:table-cell>
          <table:table-cell office:value-type="string" table:style-name="ce3">
            <text:p>4.Campagne</text:p>
          </table:table-cell>
          <table:table-cell office:value-type="string" table:style-name="ce3">
            <text:p><text:s/>3. Considérant que le requérant reproche au maire de Fontenay-aux-Roses d'avoir, dans sa commune, le vendredi 15 juin, fait à la fois afficher sur des panneaux officiels de la campagne électorale et distribuer, sous forme de tract, un message appelant à voter pour M. GERMAIN et mettant en cause la proximité de M. PEMEZEC avec le Front national ; que, d'une part, l'ampleur de la diffusion de ce tract n'est pas établie ; que, d'autre part, si l'apposition de ces affiches constitue une violation de l'article L. 51 du code électoral, M. PEMEZEC a pu répondre au contenu de ces affiches ; que, par suite, cette irrégularité, d'autant plus regrettable qu'elle émane du maire, n'a pu, dans les circonstances de l'espèce, eu égard à l'écart de voix, être de nature à altérer la sincérité du scrutin ; - SUR LES GRIEFS RELATIFS AUX OPÉRATIONS DE VOT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36_annot.xml</text:p>
          </table:table-cell>
          <table:table-cell office:value-type="string" table:style-name="ce3">
            <text:p>7.Opérations</text:p>
          </table:table-cell>
          <table:table-cell office:value-type="string" table:style-name="ce3">
            <text:p><text:s/>5. Considérant, en deuxième lieu, que si l'article R. 43 du code électoral prévoit que les bureaux de vote sont présidés par les maires, adjoints et conseillers municipaux dans l'ordre du tableau et, à défaut, par des électeurs de la commune désignés par le maire, il ressort de l'arrêté du maire de Clamart en date du 12 juin 2012 que deux électeurs seulement ont été désignés pour présider un bureau de vote parmi les trente-cinq que compte la commune ; que le fait que ces deux électeurs exercent des responsabilités respectivement à la mairie et à l'office gérant les logements sociaux de la commune ne faisait pas obstacle à ce qu'ils président un bureau de vote ; qu'il ne résulte de l'instruction ni que les modalités d'attribution de ces présidences ont été constitutives d'une manoeuvre, ni qu'elles ont été à l'origine de difficultés ou d'anomalies lors du déroulement des opérations de vote dans ces deux bureaux</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36_annot.xml</text:p>
          </table:table-cell>
          <table:table-cell office:value-type="string" table:style-name="ce3">
            <text:p>7.Opérations</text:p>
          </table:table-cell>
          <table:table-cell office:value-type="string" table:style-name="ce3">
            <text:p><text:s/>6. Considérant, en dernier lieu, que, d'une part, les griefs tirés de l'absence de mention du nom de la suppléante de M. GERMAIN sur certains des bulletins de vote et du défaut de signature des enveloppes destinées à rassembler les bulletins de vote lors du dépouillement dans les bureaux de vote des communes de Clamart et de Fontenay-aux-Roses ne sont assortis d'aucun commencement de preuve ; que, d'autre part, un nombre élevé de bulletins nuls et de procurations ne saurait, à lui seul, établir l'existence d'irrégularités ; - SUR LES GRIEFS RELATIFS AU COMPTE DE CAMPAGNE DE M. GERMA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39_annot.xml</text:p>
          </table:table-cell>
          <table:table-cell office:value-type="string" table:style-name="ce3">
            <text:p>6.Financement</text:p>
          </table:table-cell>
          <table:table-cell office:value-type="string" table:style-name="ce3">
            <text:p><text:s/>9. Considérant, en premier lieu, que le requérant demande à ce que soient inclus dans le compte de campagne de M. MENNUCCI à la fois le montant des subventions accordées, le 25 mai 2012, par le conseil régional aux associations intervenant en matière culturelle et l'avantage résultant de l'emplacement dont il a bénéficié pour son affiche dans un établissement commercial de Marseille ; qu'il résulte toutefois de ce qui précède que les subventions, qui procèdent de simples renouvellements annuels, sont dépourvues de lien avec cette campagne électorale et que l'affichage en cause résulte de l'initiative d'un salarié de l'établisseme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39_annot.xml</text:p>
          </table:table-cell>
          <table:table-cell office:value-type="string" table:style-name="ce3">
            <text:p>6.Financement</text:p>
          </table:table-cell>
          <table:table-cell office:value-type="string" table:style-name="ce3">
            <text:p><text:s/>10. Considérant, en second lieu, que le requérant soutient que, d'une part, certaines dépenses ne figurent pas dans le compte de campagne de M. MENNUCCI ou ont été sous-évaluées, que, d'autre part, des avantages lui ont été accordés par plusieurs personnes morales en violation des dispositions de l'article L. 52-8 du code électoral et qu'enfin, il a reçu des sommes en espèces d'un militant au-delà du montant autorisé par le troisième alinéa de l'article L. 52-8 du code électoral afin de financer la campagne électorale en méconnaissance de l'article L. 52-4 du même code ; que ces nouveaux griefs invoqués pour la première fois dans des mémoires enregistrés les 9 octobre et 5 novembre 2012 ont été présentés après l'expiration du délai de dix jours fixé par l'article 33 de l'ordonnance du 7 novembre 1958 susvisée ; qu'ils sont, par suite, irrecevabl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40_annot.xml</text:p>
          </table:table-cell>
          <table:table-cell office:value-type="string" table:style-name="ce3">
            <text:p>4.Campagne</text:p>
          </table:table-cell>
          <table:table-cell office:value-type="string" table:style-name="ce3">
            <text:p><text:s/>3. Considérant, en deuxième lieu, que la requérante met en cause la création, sur internet, d'un site homonyme qui l'aurait gênée dans la création de son propre site et qui aurait diffusé des informations de nature à nuire à sa candidature ; que Mme LATRÈCHE estime que ce site a été de nature à semer la confusion dans l'esprit des électeur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40_annot.xml</text:p>
          </table:table-cell>
          <table:table-cell office:value-type="string" table:style-name="ce3">
            <text:p>4.Campagne</text:p>
          </table:table-cell>
          <table:table-cell office:value-type="string" table:style-name="ce3">
            <text:p><text:s/>4. Considérant que, si l'existence, à partir du 6 mai 2012, d'un site internet usurpant l'identité de Mme LATRÈCHE et diffusant des informations destinées à discréditer sa candidature, doit être regardée comme une manoeuvre excédant les limites de la polémique électorale, cette circonstance, en l'absence de tout élément sur l'audience de ce site, n'a pu, eu égard à l'écart de voix, avoir une incidence sur les résultats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40_annot.xml</text:p>
          </table:table-cell>
          <table:table-cell office:value-type="string" table:style-name="ce3">
            <text:p>6.Financement</text:p>
          </table:table-cell>
          <table:table-cell office:value-type="string" table:style-name="ce3">
            <text:p><text:s/>9. Considérant qu'il ne résulte pas de l'instruction qu'un agent de la commune de Drancy a participé à la campagne de M. LAGARDE pendant ses heures de service ; que la participation du directeur des services informatiques de la commune à la campagne de M. LAGARDE n'est pas établie ; que figurent notamment dans le compte de campagne du candidat élu des dépenses informatiques, l'achat de huit clichés photographiques à la commune de Drancy, le coût d'utilisation du véhicule qui a servi à M. LAGARDE pour ses déplacements électoraux, le coût d'utilisation d'un local de campagne et le coût d'impression de différents tracts et de matériel électoral ; que, s'agissant des bulletins municipaux, il n'est pas établi qu'ils aient revêtu un caractère électoral et devraient, par suite, figurer dans le compte de campagne ; que la requérante n'apporte pas d'éléments de preuve démontrant que le compte de campagne de M. LAGARDE aurait été incomplet ou que le plafond des dépenses aurait été dépass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42_annot.xml</text:p>
          </table:table-cell>
          <table:table-cell office:value-type="string" table:style-name="ce3">
            <text:p>4.Campagne</text:p>
          </table:table-cell>
          <table:table-cell office:value-type="string" table:style-name="ce3">
            <text:p><text:s/>5. Considérant, en troisième lieu, que les requérants soutiennent qu'aurait été apposé sur les affiches électorales de M. BRAILLARD, la veille et le jour du premier tour du scrutin, le logotype du parti socialiste ; que ce fait, dont le caractère massif n'a pas été rapporté, n'a pas été de nature à altérer la sincérité du scrutin ; - SUR LES GRIEFS RELATIFS AU FINANCEMENT DE LA CAMPAGNE ELECTORA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45_annot.xml</text:p>
          </table:table-cell>
          <table:table-cell office:value-type="string" table:style-name="ce3">
            <text:p>4.Campagne</text:p>
          </table:table-cell>
          <table:table-cell office:value-type="string" table:style-name="ce3">
            <text:p><text:s/>4. Considérant, en troisième lieu, que le maintien sur le site internet du candidat élu d'éléments d'information relatifs à l'association de ses amis ne saurait, eu égard à leur contenu, être regardé comme une campagne de promotion publicitaire au sens de l'article L. 52-1 du code électoral ou une action de propagande électorale visée par l'interdiction énoncée à son article L. 49 ; qu'il résulte par ailleurs de l'instruction que cette association n'a pas participé au financement de la campagne de M. GINÉSY</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46_annot.xml</text:p>
          </table:table-cell>
          <table:table-cell office:value-type="string" table:style-name="ce3">
            <text:p>4.Campagne</text:p>
          </table:table-cell>
          <table:table-cell office:value-type="string" table:style-name="ce3">
            <text:p><text:s/>3. Considérant que ce document a été publié antérieurement au début de la campagne électorale ; qu'il ne contient aucune référence aux élections législatives ; qu'il résulte de l'instruction que ce document n'a pas été utilisé à cette occasion par le candida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46_annot.xml</text:p>
          </table:table-cell>
          <table:table-cell office:value-type="string" table:style-name="ce3">
            <text:p>4.Campagne</text:p>
          </table:table-cell>
          <table:table-cell office:value-type="string" table:style-name="ce3">
            <text:p><text:s/>4. Considérant, en deuxième lieu, que M. GIRARD soutient que M. DORD a utilisé un véhicule de fonction mis à disposition par la mairie pendant la période électoral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47_annot.xml</text:p>
          </table:table-cell>
          <table:table-cell office:value-type="string" table:style-name="ce3">
            <text:p>6.Financement</text:p>
          </table:table-cell>
          <table:table-cell office:value-type="string" table:style-name="ce3">
            <text:p><text:s/>3. Considérant que cette manifestation était organisée dans le cadre de la campagne présidentielle ; qu'une partie des coûts correspondant à son organisation figure au compte de campagne au titre de la campagne législative ; que les requérants n'apportent pas d'éléments de preuve à l'appui de leurs allégations selon lesquelles cette prestation a été fournie au candidat élu pour un prix inférieur à ceux habituellement pratiqués ; que cette organisation ne peut être regardée comme un don prohibé au sens des dispositions de l'article L. 52-8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47_annot.xml</text:p>
          </table:table-cell>
          <table:table-cell office:value-type="string" table:style-name="ce3">
            <text:p>4.Campagne</text:p>
          </table:table-cell>
          <table:table-cell office:value-type="string" table:style-name="ce3">
            <text:p><text:s/>5. Considérant qu'il résulte de l'instruction que la manifestation en cause revêt un caractère traditionnel et n'a pas fait l'objet d'une modification particulière en vue des élections contestées ; que le candidat élu n'a fait aucune allusion à la campagne législative ; que, le caractère électoral de cette manifestation n'est pas établi</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47_annot.xml</text:p>
          </table:table-cell>
          <table:table-cell office:value-type="string" table:style-name="ce3">
            <text:p>4.Campagne</text:p>
          </table:table-cell>
          <table:table-cell office:value-type="string" table:style-name="ce3">
            <text:p><text:s/>7. Considérant qu'il n'est pas établi que cette manifestation traditionnelle ait revêtu un caractère électoral</text:p>
          </table:table-cell>
          <table:table-cell table:number-columns-repeated="16377"/>
        </table:table-row>
        <table:table-row table:style-name="ro1">
          <table:table-cell office:value-type="string" table:style-name="ce7">
            <text:p>Non</text:p>
          </table:table-cell>
          <table:table-cell table:style-name="ce3"/>
          <table:table-cell office:value-type="string" table:style-name="ce3">
            <text:p>Présente la majeure</text:p>
          </table:table-cell>
          <table:table-cell office:value-type="string" table:style-name="ce3">
            <text:p><text:s/>7. Opérations</text:p>
          </table:table-cell>
          <table:table-cell office:value-type="string" table:style-name="ce3">
            <text:p>file:\\\P:\CRJ\RECHERCHE\PROJET_JADE\JADE_COMMUN\Annotation\Annotation_automatique_Maritaud\Technologie_light\Super-catégories-objets_0,8\AN\2012\rejet\CONSTEXT000027146948_annot.xml</text:p>
          </table:table-cell>
          <table:table-cell office:value-type="string" table:style-name="ce3">
            <text:p>4.Campagne</text:p>
          </table:table-cell>
          <table:table-cell office:value-type="string" table:style-name="ce3">
            <text:p><text:s/>1. Considérant, en premier lieu, qu'aux termes du dernier alinéa de l'article L. 62-1 du code électoral : « Le vote de chaque électeur est constaté par sa signature apposée à l'encre en face de son nom sur la liste d'émargement » ; qu'aux termes du second alinéa de l'article L. 64 du même code : « Lorsqu'un électeur se trouve dans l'impossibilité de signer, l'émargement prévu par le troisième alinéa de l'article L. 62-1 est apposé par un électeur de son choix qui fait suivre sa signature de la mention suivante : 'l'électeur ne peut signer lui-même' » ; qu'il ressort de ces dispositions, destinées à assurer la sincérité des opérations électorales, que seule la signature personnelle, à l'encre, d'un électeur est de nature à apporter la preuve de sa participation au scrutin, sauf cas d'impossibilité dûment mentionnée sur la liste d'émargeme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2\rejet\CONSTEXT000027146948_annot.xml</text:p>
          </table:table-cell>
          <table:table-cell office:value-type="string" table:style-name="ce3">
            <text:p>7.Opérations</text:p>
          </table:table-cell>
          <table:table-cell office:value-type="string" table:style-name="ce3">
            <text:p><text:s/>4. Considérant, en deuxième lieu, que M. ROUILLON se prévaut de la différence existant entre le nombre de bulletins de votes et le nombre d'émargements dans dix-huit bureaux de vote ; qu'il résulte de l'instruction, et notamment de l'examen des procès-verbaux des opérations électorales de ces bureaux de vote, que dans les seuls bureaux des communes de Cherreau, Cherré, Roullée et Saint-Cosme-en-Varais, ainsi que dans le bureau de vote n° 1 de Coulaines et les bureaux de vote nos 14, 20, 21, 24, 25 et 33 du Mans, le nombre de bulletins et d'enveloppes ne correspond pas à celui des émargements ; qu'en pareil cas, il convient de retenir le moins élevé de ces deux nombres ; qu'ainsi il y a lieu de déduire douze suffrages tant du nombre des suffrages exprimés que du nombre de voix obtenues par M. LE MENER</text:p>
          </table:table-cell>
          <table:table-cell table:number-columns-repeated="16377"/>
        </table:table-row>
        <table:table-row table:style-name="ro1">
          <table:table-cell office:value-type="string" table:style-name="ce7">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12\rejet\CONSTEXT000027146949_annot.xml</text:p>
          </table:table-cell>
          <table:table-cell office:value-type="string" table:style-name="ce3">
            <text:p>4.Campagne</text:p>
          </table:table-cell>
          <table:table-cell office:value-type="string" table:style-name="ce3">
            <text:p><text:s/>1. Considérant qu'aux termes du deuxième alinéa de l'article L. 52-1 du code électoral : « À compter du premier jour du sixième mois précédant le mois au cours duquel il doit être procédé à des élections générales, aucune campagne de promotion publicitaire des réalisations ou de la gestion d'une collectivité ne peut être organisée sur le territoire des collectivités intéressées par le scrutin » ; qu'aux termes du deuxième alinéa de l'article L. 52-8 du même code : « Les personnes morales, à l'exception des partis ou groupements politiques, ne peuvent participer au financement de la campagne électorale d'un candidat, ni en lui consentant des dons sous quelque forme que ce soit, ni en lui fournissant des biens, services ou autres avantages directs ou indirects à des prix inférieurs à ceux habituellement pratiqués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3\rejet\CONSTEXT000027146920_annot.xml</text:p>
          </table:table-cell>
          <table:table-cell office:value-type="string" table:style-name="ce3">
            <text:p>4.Campagne</text:p>
          </table:table-cell>
          <table:table-cell office:value-type="string" table:style-name="ce3">
            <text:p><text:s/>7. Considérant qu' il résulte de l' instruction que Mme SCHMID a bénéficié dans sa campagne du soutien du dirigeant d' un parti politique suisse et a fait part de ce soutien, par le biais de messages électroniques, aux électeurs de la 6ème circonscription ; qu' une telle circonstance ne saurait, contrairement à ce que prétend M. GARCIA, constituer une méconnaissance des dispositions du cinquième alinéa de l' article L. 52-8 du code électoral en l' absence de toute contribution ou aide matérielle apportée par ce parti à la candidate ; que l' expression de ce soutien n' est pas constitutive d' une irrégularité de nature à avoir altéré la sincérité du scrutin ; - SUR LES GRIEFS TIRÉS D' IRRÉGULARITÉS COMMISES DURANT LES OPÉRATIONS ÉLECTORALES</text:p>
          </table:table-cell>
          <table:table-cell table:number-columns-repeated="16377"/>
        </table:table-row>
        <table:table-row table:style-name="ro1">
          <table:table-cell office:value-type="string" table:style-name="ce7">
            <text:p>Non </text:p>
          </table:table-cell>
          <table:table-cell table:number-columns-repeated="2"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2013\rejet\CONSTEXT000027146920_annot.xml</text:p>
          </table:table-cell>
          <table:table-cell office:value-type="string" table:style-name="ce3">
            <text:p>4.Campagne</text:p>
          </table:table-cell>
          <table:table-cell office:value-type="string" table:style-name="ce3">
            <text:p><text:s/>10. Considérant que M. BROUSTINE n' établit pas que son délégué n' a pas été mis à même d' assister aux réunions du bureau du vote électronique et de participer à ce titre aux opérations de contrôle prévues par l' article R. 176-3-10</text:p>
          </table:table-cell>
          <table:table-cell table:number-columns-repeated="16377"/>
        </table:table-row>
        <table:table-row table:style-name="ro1">
          <table:table-cell office:value-type="string" table:style-name="ce7">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13\rejet\CONSTEXT000027146925_annot.xml</text:p>
          </table:table-cell>
          <table:table-cell office:value-type="string" table:style-name="ce3">
            <text:p>4.Campagne</text:p>
          </table:table-cell>
          <table:table-cell office:value-type="string" table:style-name="ce3">
            <text:p><text:s/>1. Considérant, en premier lieu, qu'aux termes du premier alinéa de l'article L. 52-1 du code électoral : « Pendant les six mois précédant le premier jour du mois d'une élection et jusqu'à la date du tour de scrutin où celle-ci est acquise, l'utilisation à des fins de propagande électorale de tout procédé de publicité commerciale par la voie de la presse ou par tout moyen de communication audiovisuelle est interdite » ; qu'aux termes de l'article L. 48-1 du même code : « Les interdictions et restrictions prévues par le présent code en matière de propagande électorale sont applicables à tout message ayant le caractère de propagande électorale diffusé par tout moyen de communication au public par voie électronique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3\rejet\CONSTEXT000027146925_annot.xml</text:p>
          </table:table-cell>
          <table:table-cell office:value-type="string" table:style-name="ce3">
            <text:p>4.Campagne</text:p>
          </table:table-cell>
          <table:table-cell office:value-type="string" table:style-name="ce3">
            <text:p><text:s/>2. Considérant qu'il est fait grief à M. FROMANTIN d'avoir acheté un lien permettant un meilleur référencement du site internet du parti politique « Territoires en mouvement », en contradiction avec les dispositions du premier alinéa de l'article L. 52-1 du code électoral ; que, toutefois, l'achat d'un tel lien, sans rapport avec la campagne électorale, ne méconnaît pas les dispositions du premier alinéa de l'article L. 52-1 ou de l'article L. 48-1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3\rejet\CONSTEXT000027146931_annot.xml</text:p>
          </table:table-cell>
          <table:table-cell office:value-type="string" table:style-name="ce3">
            <text:p>4.Campagne</text:p>
          </table:table-cell>
          <table:table-cell office:value-type="string" table:style-name="ce3">
            <text:p><text:s/>1. Considérant, en premier lieu, qu'à l'appui de sa protestation, le requérant soutient que les dispositions du code électoral organisant l'affichage électoral auraient été méconnues et que le candidat élu aurait irrégulièrement fait figurer ses affiches sur les panneaux électoraux d'autres candidats, ou sur des emplacements qui n'étaient pas réservés à l'affichag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3\rejet\CONSTEXT000027146931_annot.xml</text:p>
          </table:table-cell>
          <table:table-cell office:value-type="string" table:style-name="ce3">
            <text:p>4.Campagne</text:p>
          </table:table-cell>
          <table:table-cell office:value-type="string" table:style-name="ce3">
            <text:p><text:s/>2. Considérant que le requérant apporte la preuve d'affichages irréguliers en faveur d'un candidat autre que le candidat élu ; que si des affiches en faveur du candidat élu ont pu également être apposées en dehors des emplacements réservés, il n'est pas établi que cet affichage ait revêtu un caractère massif, prolongé ou répété ; qu'eu égard à l'écart des voix entre le candidat élu et les autres candidats, les affichages auxquels il a été procédé en méconnaissance de l'article L. 51 du code électoral n'ont pu avoir une incidence sur le résultat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3\rejet\CONSTEXT000027146931_annot.xml</text:p>
          </table:table-cell>
          <table:table-cell office:value-type="string" table:style-name="ce3">
            <text:p>4.Campagne</text:p>
          </table:table-cell>
          <table:table-cell office:value-type="string" table:style-name="ce3">
            <text:p><text:s/>3. Considérant, en second lieu, que le requérant soutient que le principe d'accès équitable à l'antenne des candidats n'a pas été respecté et fait valoir en particulier qu'il a été écarté d'un débat télévisuel le 30 mai 2012</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3\rejet\CONSTEXT000027146931_annot.xml</text:p>
          </table:table-cell>
          <table:table-cell office:value-type="string" table:style-name="ce3">
            <text:p>4.Campagne</text:p>
          </table:table-cell>
          <table:table-cell office:value-type="string" table:style-name="ce3">
            <text:p><text:s/>5. Considérant qu'il résulte de l'instruction que les médias audiovisuels diffusés localement ont rendu compte de la candidature du requérant ; que la seule circonstance qu'il n'a pas été convié par la chaîne Réunion Première à un débat n'a contrevenu ni aux dispositions législatives ni à la recommandation précitées ; qu'enfin, cette circonstance, eu égard au faible nombre de voix obtenues par M. MAGNIN, n'a pu constituer un traitement discriminatoire de nature à avoir altéré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3\rejet\CONSTEXT000027146931_annot.xml</text:p>
          </table:table-cell>
          <table:table-cell office:value-type="string" table:style-name="ce3">
            <text:p>6.Financement</text:p>
          </table:table-cell>
          <table:table-cell office:value-type="string" table:style-name="ce3">
            <text:p><text:s/>7. Considérant que le requérant soutient que le compte de campagne du candidat élu est insincère et que le montant de ses dépenses de campagne excède le plafond fixé en application de l'article L. 52-11 du code électoral ; qu'il conviendrait, en conséquence, de rejeter le compte de campagne de M. ROBERT et de prononcer son inéligibili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3\rejet\CONSTEXT000027146931_annot.xml</text:p>
          </table:table-cell>
          <table:table-cell office:value-type="string" table:style-name="ce3">
            <text:p>6.Financement</text:p>
          </table:table-cell>
          <table:table-cell office:value-type="string" table:style-name="ce3">
            <text:p><text:s/>10. Considérant que, toutefois, les évaluations produites par le requérant procèdent soit de simples affirmations ou hypothèses, soit de devis dont il n'est pas établi qu'ils correspondent à des dépenses de la nature de celles exposées par le candidat élu, pour sa campagne ; qu'il ne résulte pas de l'instruction que les dépenses exposées par M. ROBERT en vue de sa campagne aient été sous-évaluées</text:p>
          </table:table-cell>
          <table:table-cell table:number-columns-repeated="16377"/>
        </table:table-row>
        <table:table-row table:style-name="ro1">
          <table:table-cell office:value-type="string" table:style-name="ce7">
            <text:p>Non</text:p>
          </table:table-cell>
          <table:table-cell table:style-name="ce3"/>
          <table:table-cell office:value-type="string" table:style-name="ce3">
            <text:p>Présente la majeure</text:p>
          </table:table-cell>
          <table:table-cell office:value-type="string" table:style-name="ce3">
            <text:p>7. Opérations</text:p>
          </table:table-cell>
          <table:table-cell office:value-type="string" table:style-name="ce3">
            <text:p>file:\\\P:\CRJ\RECHERCHE\PROJET_JADE\JADE_COMMUN\Annotation\Annotation_automatique_Maritaud\Technologie_light\Super-catégories-objets_0,8\AN\2013\rejet\CONSTEXT000027146944_annot.xml</text:p>
          </table:table-cell>
          <table:table-cell office:value-type="string" table:style-name="ce3">
            <text:p>4.Campagne</text:p>
          </table:table-cell>
          <table:table-cell office:value-type="string" table:style-name="ce3">
            <text:p><text:s/>1. Considérant, en premier lieu, qu'aux termes du troisième alinéa de l'article L. 62-1 du code électoral : « Le vote de chaque électeur est constaté par sa signature apposée à l'encre en face de son nom sur la liste d'émargement » ; qu'aux termes du deuxième alinéa de l'article L. 64 du même code : « Lorsqu'un électeur se trouve dans l'impossibilité de signer, l'émargement prévu par le troisième alinéa de l'article L. 62-1 est apposé par un électeur de son choix qui fait suivre sa signature de la mention suivante : « l'électeur ne peut signer lui-même » ; qu'il ressort de ces dispositions, destinées à assurer la sincérité des opérations électorales, que seule la signature personnelle, à l'encre, d'un électeur est de nature à apporter la preuve de sa participation au scrutin, sauf cas d'impossibilité dûment mentionnée sur la liste d'émargeme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3\rejet\CONSTEXT000027146944_annot.xml</text:p>
          </table:table-cell>
          <table:table-cell office:value-type="string" table:style-name="ce3">
            <text:p>6.Financement</text:p>
          </table:table-cell>
          <table:table-cell office:value-type="string" table:style-name="ce3">
            <text:p><text:s/>17. Considérant que le coût de location de la voiture est intégré dans le compte de campagne de M. DESTANS ; que le grief manque donc en fai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5\rejet\CONSTEXT000030285985_annot.xml</text:p>
          </table:table-cell>
          <table:table-cell office:value-type="string" table:style-name="ce3">
            <text:p>4.Campagne</text:p>
          </table:table-cell>
          <table:table-cell office:value-type="string" table:style-name="ce3">
            <text:p><text:s/>7. Considérant que M. AMARU, inscrit sur les listes électorales de la commune de Papeete, conteste l'utilisation de bulletins de vote de couleur par Mme SAGE en méconnaissance des prescriptions du code électoral ; qu'aux termes de l'article R. 30 du code électoral : « Les bulletins doivent être imprimés en une seule couleur sur papier blanc » ; que l'article R. 204 de ce code rend applicable ces dispositions à l'élection des députés en Polynésie française « à l'exclusion des mots ' sur papier blanc ' » ; qu'il résulte en outre des dispositions de l'article L. 390 du même code que la déclaration de candidature à l'élection de député peut, en Polynésie française, indiquer la couleur que les candidats choisissent pour leur bulletin de vote ; qu'il résulte de ces dispositions que, lors de l'élection des députés en Polynésie française, les bulletins doivent être imprimés en une seule couleur sur un papier qui peut être de couleu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5\rejet\CONSTEXT000030285992_annot.xml</text:p>
          </table:table-cell>
          <table:table-cell office:value-type="string" table:style-name="ce3">
            <text:p>4.Campagne</text:p>
          </table:table-cell>
          <table:table-cell office:value-type="string" table:style-name="ce3">
            <text:p><text:s/>3. Considérant, que, contrairement à ce que soutient le requérant, le reportage diffusé le vendredi 14 novembre 2014 à 19 heures sur la chaîne France 3 Champagne-Ardenne n'a pas le caractère d'une promotion publicitaire ; que, si seuls les candidats de l'Union pour un Mouvement populaire, du Front National et du Parti Socialiste ont été interrogés dans ce reportage, cette circonstance n'est pas de nature à avoir altéré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5\rejet\CONSTEXT000031761485_annot.xml</text:p>
          </table:table-cell>
          <table:table-cell office:value-type="string" table:style-name="ce3">
            <text:p>6.Financement</text:p>
          </table:table-cell>
          <table:table-cell office:value-type="string" table:style-name="ce3">
            <text:p><text:s/>1. Considérant que, par sa décision n° 2015-4949 AN du 19 novembre 2015 susvisée, le Conseil constitutionnel a déclaré M. Ismaël BOUDJEKADA inéligible à tout mandat pour une durée de trois ans, en relevant notamment que le candidat n'ayant pas restitué les carnets de reçus-dons délivrés à son mandataire financier par la préfecture du Doubs, il ne pouvait être regardé comme n'ayant pas bénéficié de dons consentis par des personnes physiques et était en conséquence tenu de déposer un compte de campagne</text:p>
          </table:table-cell>
          <table:table-cell table:number-columns-repeated="16377"/>
        </table:table-row>
        <table:table-row table:style-name="ro1">
          <table:table-cell office:value-type="string" table:style-name="ce7">
            <text:p>Non</text:p>
          </table:table-cell>
          <table:table-cell table:number-columns-repeated="2"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2016\rejet\CONSTEXT000032453717_annot.xml</text:p>
          </table:table-cell>
          <table:table-cell office:value-type="string" table:style-name="ce3">
            <text:p>4.Campagne</text:p>
          </table:table-cell>
          <table:table-cell office:value-type="string" table:style-name="ce3">
            <text:p>; 3. Considérant que les irrégularités dénoncées, à les supposer établies, n'ont pu altérer la sincérité du scrutin, dès lors qu'elles n'ont pas revêtu un caractère massif, prolongé ou répé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6\rejet\CONSTEXT000033105022_annot.xml</text:p>
          </table:table-cell>
          <table:table-cell office:value-type="string" table:style-name="ce3">
            <text:p>4.Campagne</text:p>
          </table:table-cell>
          <table:table-cell office:value-type="string" table:style-name="ce3">
            <text:p><text:s/>2. M. ROUSSEAUX, candidat au premier tour de scrutin qui s'est déroulé dans la troisième circonscription de la Loire-Atlantique, met en cause le fait que Mme Karine DANIEL, candidate élue, a utilisé la mention « députée » sur ses affiches et tracts ainsi que sur ses site et messagerie électroniques de campagne, alors qu'elle n'était pas le député sortant.</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17\rejet\CONSTEXT000035284866_annot.xml</text:p>
          </table:table-cell>
          <table:table-cell office:value-type="string" table:style-name="ce3">
            <text:p>4.Campagne</text:p>
          </table:table-cell>
          <table:table-cell office:value-type="string" table:style-name="ce3">
            <text:p><text:s/>3. Il résulte de tout ce qui précède que la requête de M. Yohann DUVAL doit être rejetée.</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17\rejet\CONSTEXT000035358927_annot.xml</text:p>
          </table:table-cell>
          <table:table-cell office:value-type="string" table:style-name="ce3">
            <text:p>4.Campagne</text:p>
          </table:table-cell>
          <table:table-cell office:value-type="string" table:style-name="ce3">
            <text:p><text:s/>4. Il résulte de tout ce qui précède que la requête doit être rejetée.</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17\rejet\CONSTEXT000035358933_annot.xml</text:p>
          </table:table-cell>
          <table:table-cell office:value-type="string" table:style-name="ce3">
            <text:p>4.Campagne</text:p>
          </table:table-cell>
          <table:table-cell office:value-type="string" table:style-name="ce3">
            <text:p><text:s/>3. Il résulte de ce qui précède que la requête de M. Éric HINSCHBERGER doit être rejeté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5358939_annot.xml</text:p>
          </table:table-cell>
          <table:table-cell office:value-type="string" table:style-name="ce3">
            <text:p>4.Campagne</text:p>
          </table:table-cell>
          <table:table-cell office:value-type="string" table:style-name="ce3">
            <text:p><text:s/>2. M. Patrick BAUDOT soutient que le candidat élu aurait publié sur son compte « Facebook », la veille du scrutin, de nouveaux articles et qu'il aurait eu recours, en méconnaissance de l'article L. 52-1 du code électoral, à des publicités commerciales. Toutefois, de tels faits n'ont pu, eu égard au nombre de voix obtenues par chacun des candidats, avoir une influence sur l'issue du scrutin. Dès lors, la requête doit être rejetée.</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17\rejet\CONSTEXT000035358947_annot.xml</text:p>
          </table:table-cell>
          <table:table-cell office:value-type="string" table:style-name="ce3">
            <text:p>4.Campagne</text:p>
          </table:table-cell>
          <table:table-cell office:value-type="string" table:style-name="ce3">
            <text:p><text:s/>4. Il résulte de tout ce qui précède que la requête doit être rejetée.</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17\rejet\CONSTEXT000035358955_annot.xml</text:p>
          </table:table-cell>
          <table:table-cell office:value-type="string" table:style-name="ce3">
            <text:p>4.Campagne</text:p>
          </table:table-cell>
          <table:table-cell office:value-type="string" table:style-name="ce3">
            <text:p><text:s/>4. Il résulte de tout ce qui précède que la requête doit être rejetée.</text:p>
          </table:table-cell>
          <table:table-cell table:number-columns-repeated="16377"/>
        </table:table-row>
        <table:table-row table:style-name="ro1">
          <table:table-cell office:value-type="string" table:style-name="ce7">
            <text:p>Non</text:p>
          </table:table-cell>
          <table:table-cell table:style-name="ce3"/>
          <table:table-cell office:value-type="string" table:style-name="ce3">
            <text:p>Présente la majeure</text:p>
          </table:table-cell>
          <table:table-cell office:value-type="string" table:style-name="ce3">
            <text:p>3. Candidatures</text:p>
          </table:table-cell>
          <table:table-cell office:value-type="string" table:style-name="ce3">
            <text:p>file:\\\P:\CRJ\RECHERCHE\PROJET_JADE\JADE_COMMUN\Annotation\Annotation_automatique_Maritaud\Technologie_light\Super-catégories-objets_0,8\AN\2017\rejet\CONSTEXT000035390820_annot.xml</text:p>
          </table:table-cell>
          <table:table-cell office:value-type="string" table:style-name="ce3">
            <text:p>4.Campagne</text:p>
          </table:table-cell>
          <table:table-cell office:value-type="string" table:style-name="ce3">
            <text:p><text:s/>5. L'article L. 123 du code électoral, dans sa rédaction résultant de la loi du 11 juillet 1986 mentionnée ci-dessus, prévoit : « Les députés sont élus au scrutin uninominal majoritaire à deux tours ».</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17\rejet\CONSTEXT000035390820_annot.xml</text:p>
          </table:table-cell>
          <table:table-cell office:value-type="string" table:style-name="ce3">
            <text:p>4.Campagne</text:p>
          </table:table-cell>
          <table:table-cell office:value-type="string" table:style-name="ce3">
            <text:p><text:s/>12. Il résulte de ce qui précède que la question soulevée, qui n'est pas nouvelle, ne présente pas un caractère sérieux. Elle doit donc être rejetée. - Sur le fond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57855_annot.xml</text:p>
          </table:table-cell>
          <table:table-cell office:value-type="string" table:style-name="ce3">
            <text:p>4.Campagne</text:p>
          </table:table-cell>
          <table:table-cell office:value-type="string" table:style-name="ce3">
            <text:p><text:s/>3. En premier lieu, d'une part, aux termes du premier alinéa de l'article L. 48 du code électoral : « Sont applicables à la propagande les dispositions de la loi du 29 juillet 1881 sur la liberté de la presse, à l'exception de son article 16 ». D'autre part, le premier alinéa de l'article L. 166 du même code dispose que la commission de propagande est chargée d'assurer l'envoi et la distribution de tous les documents de propagande électorale. Enfin, en application du troisième alinéa de l'article R. 38 du même code, la commission n'assure pas l'envoi des circulaires et bulletins de vote dont les couleurs, le grammage, le format, le libellé ou l'impression ne répondent pas aux prescriptions légales ou réglementaires. Il résulte de ces dispositions que la commission de propagande ne peut refuser que les circulaires et bulletins qui ne respecteraient pas les prescriptions du code électoral et de la loi du 29 juillet 1881 mentionnée ci-dessus relatives à la présentation matérielle des documents électoraux. Par conséquent, en s'abstenant de se prononcer sur la véracité des soutiens, investitures ou étiquettes politiques mentionnés sur les documents de propagande du candidat élu, la commission de propagande n'a pas méconnu l'article R. 38 du code électoral.</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1. Procédure</text:p>
          </table:table-cell>
          <table:table-cell office:value-type="string" table:style-name="ce3">
            <text:p>file:\\\P:\CRJ\RECHERCHE\PROJET_JADE\JADE_COMMUN\Annotation\Annotation_automatique_Maritaud\Technologie_light\Super-catégories-objets_0,8\AN\2017\rejet\CONSTEXT000036157855_annot.xml</text:p>
          </table:table-cell>
          <table:table-cell office:value-type="string" table:style-name="ce3">
            <text:p>6.Financement</text:p>
          </table:table-cell>
          <table:table-cell office:value-type="string" table:style-name="ce3">
            <text:p><text:s/>9. La requérante demande au Conseil constitutionnel de mettre à la charge de M. CABARÉ la somme de 2 000 euros au titre de l'article L. 761-1 du code de justice administrative. Toutefois, les dispositions de cet article ne sont pas applicables devant le Conseil constitutionnel. Dès lors, les conclusions tendant à la condamnation aux frais exposés dans l'instance ne peuvent être accueilli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57857_annot.xml</text:p>
          </table:table-cell>
          <table:table-cell office:value-type="string" table:style-name="ce3">
            <text:p>4.Campagne</text:p>
          </table:table-cell>
          <table:table-cell office:value-type="string" table:style-name="ce3">
            <text:p><text:s/>4. En deuxième lieu, le requérant soutient que des tracts comportant des propos diffamatoires à son encontre auraient été massivement distribués la veille du scrutin du second tour. Il en résulterait une méconnaissance des articles L. 48-2 et L. 49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57862_annot.xml</text:p>
          </table:table-cell>
          <table:table-cell office:value-type="string" table:style-name="ce3">
            <text:p>6.Financement</text:p>
          </table:table-cell>
          <table:table-cell office:value-type="string" table:style-name="ce3">
            <text:p><text:s/>9. En second lieu, si M. GERIN soutient que d'autres dépenses ne figureraient pas dans le compte de campagne ou ont été irrégulièrement prises en charge, ces griefs ont été invoqués pour la première fois dans un mémoire enregistré le 10 novembre 2017. Ils constituent ainsi des griefs nouveaux présentés hors du délai de dix jours fixé par l'article 33 de l'ordonnance du 7 novembre 1958 mentionnée ci-dessus et sont, par suite, irrecevabl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57863_annot.xml</text:p>
          </table:table-cell>
          <table:table-cell office:value-type="string" table:style-name="ce3">
            <text:p>7.Opérations</text:p>
          </table:table-cell>
          <table:table-cell office:value-type="string" table:style-name="ce3">
            <text:p><text:s/>9. Le requérant soutient que le bureau de vote n° 116 de la commune de Saint-Paul a ouvert à 8 heures 28 et non à 8 heures. Ce retard isolé, dont il n'est pas allégué qu'il serait constitutif d'une manœuvre, n'a pas été de nature à altérer la sincérité du scrutin. La circonstance qu'un bureau de vote a ouvert avec retard ne saurait par elle-même justifier une fermeture de ce bureau au-delà de l'heure légale de clôture du scrutin. Par conséquent, la circonstance, relevée par le requérant, que la fermeture de ce bureau de vote n'a pas été retardée, n'est pas constitutive d'une irrégulari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57864_annot.xml</text:p>
          </table:table-cell>
          <table:table-cell office:value-type="string" table:style-name="ce3">
            <text:p>7.Opérations</text:p>
          </table:table-cell>
          <table:table-cell office:value-type="string" table:style-name="ce3">
            <text:p><text:s/>4. D'une part, la requérante dénonce neuf différences de signatures sur les listes d'émargement entre le premier et le second tour, dans deux bureaux de vote, ce qui signifierait que certains des votes correspondants n'ont pas été effectués par l'électeur. Toutefois, il résulte de l'instruction que les différences de signatures alléguées soit ne sont pas probantes, soit s'expliquent par des erreurs matérielles ou par le recours à des procurations de vote. Le grief doit donc être écarté.</text:p>
          </table:table-cell>
          <table:table-cell table:number-columns-repeated="16377"/>
        </table:table-row>
        <table:table-row table:style-name="ro1">
          <table:table-cell office:value-type="string" table:style-name="ce7">
            <text:p>Non</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17\rejet\CONSTEXT000036157865_annot.xml</text:p>
          </table:table-cell>
          <table:table-cell office:value-type="string" table:style-name="ce3">
            <text:p>4.Campagne</text:p>
          </table:table-cell>
          <table:table-cell office:value-type="string" table:style-name="ce3">
            <text:p><text:s/>7. Aux termes de l'article L. 51 du code électoral : « Pendant les six mois précédant le premier jour du mois d'une élection et jusqu'à la date du tour de scrutin où celle-ci est acquise, tout affichage relatif à l'élection, même par affiches timbrées, est interdit en dehors de cet emplacement ou sur l'emplacement réservé aux autres candidats, ainsi qu'en dehors des panneaux d'affichage d'expression libre lorsqu'il en existe ».</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17\rejet\CONSTEXT000036187758_annot.xml</text:p>
          </table:table-cell>
          <table:table-cell office:value-type="string" table:style-name="ce3">
            <text:p>4.Campagne</text:p>
          </table:table-cell>
          <table:table-cell office:value-type="string" table:style-name="ce3">
            <text:p><text:s/>4. Il résulte de tout ce qui précède que la requête doit être rejeté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76_annot.xml</text:p>
          </table:table-cell>
          <table:table-cell office:value-type="string" table:style-name="ce3">
            <text:p>4.Campagne</text:p>
          </table:table-cell>
          <table:table-cell office:value-type="string" table:style-name="ce3">
            <text:p><text:s/>1. M. SALLES fait valoir que des affiches faisant état du ralliement à M. Philippe VARDON de M. Didier ASIN, initialement candidat au nom du Parti chrétien démocrate auraient été apposées sur les emplacements réservés à M. ASIN, à partir du samedi 10 juin 2017 au soir, soit après l'expiration de la période de campagne officielle. Il soutient que cet affichage contreviendrait aux dispositions des articles L. 48-2 et L. 49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76_annot.xml</text:p>
          </table:table-cell>
          <table:table-cell office:value-type="string" table:style-name="ce3">
            <text:p>4.Campagne</text:p>
          </table:table-cell>
          <table:table-cell office:value-type="string" table:style-name="ce3">
            <text:p><text:s/>13. M. SALLES fait valoir que M. ROUSSEL a fait diffuser sur le site « Facebook » le 11 juin 2017, jour du premier tour de scrutin, un lien commercial en méconnaissance des dispositions de l'article L. 52-1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77_annot.xml</text:p>
          </table:table-cell>
          <table:table-cell office:value-type="string" table:style-name="ce3">
            <text:p>4.Campagne</text:p>
          </table:table-cell>
          <table:table-cell office:value-type="string" table:style-name="ce3">
            <text:p><text:s/>5. En dernier lieu, le requérant soutient que, trois jours avant le premier tour du scrutin, un proche de la candidate élue a diffusé par courrier électronique, aux élus et habitants de la commune de Rillieux-la-Pape, un tract le mettant en cause. Cette même personne aurait également adressé des messages électroniques sur les téléphones portables d'électeurs de cette même commune quelques jours avant le premier tou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77_annot.xml</text:p>
          </table:table-cell>
          <table:table-cell office:value-type="string" table:style-name="ce3">
            <text:p>4.Campagne</text:p>
          </table:table-cell>
          <table:table-cell office:value-type="string" table:style-name="ce3">
            <text:p><text:s/>6. Il résulte de l'instruction, d'une part, que s'agissant de ces derniers messages, les faits allégués ne sont pas étayés par des éléments suffisamment probants et, d'autre part, que si le tract en cause a excédé les limites admissibles de la polémique électorale, sa diffusion a été limitée à la commune de Rillieux-la-Pape et le requérant a eu la possibilité d'y apporter une réponse en temps utile avant le premier tour et le second tour du scrutin. En outre, il n'est pas démontré que ce tract est imputable à la candidate élue, qui s'en est d'ailleurs publiquement désolidarisée. Dès lors, bien que regrettable, cette circonstance n'est pas de nature à altérer la sincérité du scrutin du second tour. - Sur les griefs relatifs aux opérations électorales :</text:p>
          </table:table-cell>
          <table:table-cell table:number-columns-repeated="16377"/>
        </table:table-row>
        <table:table-row table:style-name="ro1">
          <table:table-cell office:value-type="string" table:style-name="ce3">
            <text:p>Oui</text:p>
          </table:table-cell>
          <table:table-cell table:number-columns-repeated="2" table:style-name="ce3"/>
          <table:table-cell office:value-type="string" table:style-name="ce3">
            <text:p>6. Financement</text:p>
          </table:table-cell>
          <table:table-cell office:value-type="string" table:style-name="ce3">
            <text:p>file:\\\P:\CRJ\RECHERCHE\PROJET_JADE\JADE_COMMUN\Annotation\Annotation_automatique_Maritaud\Technologie_light\Super-catégories-objets_0,8\AN\2017\rejet\CONSTEXT000036192779_annot.xml</text:p>
          </table:table-cell>
          <table:table-cell office:value-type="string" table:style-name="ce3">
            <text:p>4.Campagne</text:p>
          </table:table-cell>
          <table:table-cell office:value-type="string" table:style-name="ce3">
            <text:p><text:s/>5. L'ensemble des griefs relatifs au financement de la campagne doit donc être écarté. - Sur les griefs relatifs à la campagne électorale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79_annot.xml</text:p>
          </table:table-cell>
          <table:table-cell office:value-type="string" table:style-name="ce3">
            <text:p>7.Opérations</text:p>
          </table:table-cell>
          <table:table-cell office:value-type="string" table:style-name="ce3">
            <text:p><text:s/>10. Les requérants produisent aussi des attestations des personnes désignées comme assesseurs par la candidate pour les bureaux de vote nos 1 et 6 de la même commune, selon lesquelles elles n'auraient pas été appelées à signer le procès-verbal du bureau de vote malgré leur présence à l'ouverture et à la clôture du scrutin, en méconnaissance des dispositions de l'article R. 67 du code électoral. Il est également soutenu que dans le bureau de vote no 1, l'assesseure désignée par la candidate n'aurait été appelée à exercer aucune des tâches des membres du bureau. Il n'est cependant ni établi ni même allégué que ces faits, à les supposer avérés, auraient empêché ces personnes de suivre les opérations de vote pour le compte de la candidate ou auraient porté atteinte à la véracité des mentions du procès-verb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79_annot.xml</text:p>
          </table:table-cell>
          <table:table-cell office:value-type="string" table:style-name="ce3">
            <text:p>7.Opérations</text:p>
          </table:table-cell>
          <table:table-cell office:value-type="string" table:style-name="ce3">
            <text:p><text:s/>11. Aucun des autres faits décrits par les requérants en ce qui concerne les opérations de vote et de dépouillement dans ce même bureau n° 6, à les supposer établis, ne révèle de manquement aux prescriptions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80_annot.xml</text:p>
          </table:table-cell>
          <table:table-cell office:value-type="string" table:style-name="ce3">
            <text:p>4.Campagne</text:p>
          </table:table-cell>
          <table:table-cell office:value-type="string" table:style-name="ce3">
            <text:p><text:s/>8. En outre, la publication, peu de temps avant les élections, dans deux numéros successifs d'un journal gratuit local, d'articles visant à discréditer la candidature de Mme MOUDNIB en remettant en cause sa probité n'est pas de nature en l'espèce à avoir altéré la sincérité du scrutin, dès lors que l'intéressée a pu répondre à ces accusations par des courriers publiés en regard de ces articl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81_annot.xml</text:p>
          </table:table-cell>
          <table:table-cell office:value-type="string" table:style-name="ce3">
            <text:p>4.Campagne</text:p>
          </table:table-cell>
          <table:table-cell office:value-type="string" table:style-name="ce3">
            <text:p><text:s/>5. En conséquence, le grief relatif au défaut d'acheminement de la propagande électorale doit être écarté. - Sur les autres griefs relatifs à la campagne électorale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81_annot.xml</text:p>
          </table:table-cell>
          <table:table-cell office:value-type="string" table:style-name="ce3">
            <text:p>7.Opérations</text:p>
          </table:table-cell>
          <table:table-cell office:value-type="string" table:style-name="ce3">
            <text:p><text:s/>11. L'article R. 64 du code électoral prévoit que les membres du bureau de vote peuvent participer aux opérations de dépouillement à défaut de scrutateurs en nombre suffisant. Dès lors, en l'absence d'allégation de fraude, doit être écarté le grief du requérant selon lequel, dans un grand nombre de bureaux de vote, les membres du bureau présenteraient la double qualité d'assesseurs titulaires et de scrutateurs, sans qu'il soit démontré que la présence de scrutateurs était insuffisant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81_annot.xml</text:p>
          </table:table-cell>
          <table:table-cell office:value-type="string" table:style-name="ce3">
            <text:p>7.Opérations</text:p>
          </table:table-cell>
          <table:table-cell office:value-type="string" table:style-name="ce3">
            <text:p><text:s/>13. Si le requérant fait valoir divers griefs relatifs aux liens familiaux qui existeraient au sein de certains bureaux de vote ou entre des membres de bureau de vote et des scrutateurs, il n'établit pas en quoi cette circonstance, qui ne constitue pas en elle-même une irrégularité, serait constitutive d'une fraud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81_annot.xml</text:p>
          </table:table-cell>
          <table:table-cell office:value-type="string" table:style-name="ce3">
            <text:p>7.Opérations</text:p>
          </table:table-cell>
          <table:table-cell office:value-type="string" table:style-name="ce3">
            <text:p><text:s/>15. Si quelques rectifications ont été portées sur les procès-verbaux des opérations électorales de plusieurs bureaux de vote de la circonscription ou sur des feuilles de dépouillement, notamment pour les votes blancs ou nuls, il résulte de l'instruction, et notamment de l'examen des procès-verbaux concernés, que ces rectifications étaient destinées à réparer des erreurs purement matérielles et n'ont pas altéré la sincérité du scrutin. Par ailleurs, la circonstance que les procès-verbaux de quelques bureaux de vote ne comporteraient pas l'ensemble des signatures exigées par l'article R. 67 du code électoral est sans incidence sur la régula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83_annot.xml</text:p>
          </table:table-cell>
          <table:table-cell office:value-type="string" table:style-name="ce3">
            <text:p>7.Opérations</text:p>
          </table:table-cell>
          <table:table-cell office:value-type="string" table:style-name="ce3">
            <text:p><text:s/>65. Au demeurant, à supposer que, dans ces bureaux de vote, il ait été procédé au dépouillement des résultats du scrutin dans des conditions non conformes à celles prescrites par ce même article, il n'est pas établi que les irrégularités qui auraient été ainsi commises aient eu pour effet de faciliter des fraudes ou des erreurs de calcul. Mme CHELLY ne l'allègue d'ailleurs pas. Dans ces conditions, le grief doit être écarté. - Sur le grief relatif à la transmission des listes d'émargement, feuilles de pointage et procès-verbaux à la commission locale de recensement des votes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83_annot.xml</text:p>
          </table:table-cell>
          <table:table-cell office:value-type="string" table:style-name="ce3">
            <text:p>7.Opérations</text:p>
          </table:table-cell>
          <table:table-cell office:value-type="string" table:style-name="ce3">
            <text:p><text:s/>4. Il résulte de l'instruction que, si certaines communes ont, dans un premier temps, omis de joindre au procès-verbal des opérations de vote des feuilles de pointages ou des listes d'émargement, voire, dans certains cas, de transmettre le procès-verbal d'un bureau de vote lui-même ou le procès-verbal du bureau de vote centralisateur, ces manquements ont conduit le préfet à demander, dès le dimanche 18 juin dans la soirée, la transmission de l'ensemble des pièces manquantes pour le lundi 19 juin à 9 heures 30 en précisant que ce délai était impératif. Dans le procès-verbal qu'elle a dressé le lundi 19 juin à 10 heures 59, la commission locale de recensement des votes n'a fait état de l'absence d'aucune feuille de pointage ou liste d'émargement, ni d'aucun procès-verbal. Dans ces conditions, le grief tiré de l'absence de transmission de ces pièces doit être écarté. - Sur les griefs relatifs à la campagne électorale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84_annot.xml</text:p>
          </table:table-cell>
          <table:table-cell office:value-type="string" table:style-name="ce3">
            <text:p>4.Campagne</text:p>
          </table:table-cell>
          <table:table-cell office:value-type="string" table:style-name="ce3">
            <text:p><text:s/>1. M. SIMONNET fait valoir que, en violation de l'article L. 49 du code électoral, le samedi 17 juin 2017, Mme DUBOIS aurait publié, sur sa page « Facebook », une photographie de ses soutiens accompagnée de la mention « Dimanche, je compte sur vous » et que le même jour elle aurait publié sur cette même page des photographies d'un café citoyen dans lequel elle intervenait. Il soutient également que le dimanche 18 juin, elle aurait publié sur sa page « Facebook » une photographie la représentant à l'occasion d'une commémoration officielle de l'appel du 18 juin 1940 et que son suppléant aurait vanté ses mérites sur sa page « Facebook » le samedi 17 juin 2017.</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84_annot.xml</text:p>
          </table:table-cell>
          <table:table-cell office:value-type="string" table:style-name="ce3">
            <text:p>7.Opérations</text:p>
          </table:table-cell>
          <table:table-cell office:value-type="string" table:style-name="ce3">
            <text:p><text:s/>11. Si le requérant soutient que des pièces n'auraient pas été jointes lors de l'envoi, le soir du second tour de scrutin, des procès-verbaux par certaines communes à la préfecture, il ne précise ni les communes concernées, ni les pièces manquantes dans chacune de ces communes. Dès lors, le grief n'est pas assorti des précisions et justifications permettant au juge de l'élection d'en apprécier la portée.</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2017\rejet\CONSTEXT000036192786_annot.xml</text:p>
          </table:table-cell>
          <table:table-cell office:value-type="string" table:style-name="ce3">
            <text:p>4.Campagne</text:p>
          </table:table-cell>
          <table:table-cell office:value-type="string" table:style-name="ce3">
            <text:p><text:s/>1. En premier lieu, aux termes du troisième alinéa de l'article L. 62-1 du code électoral : « Le vote de chaque électeur est constaté par sa signature apposée à l'encre en face de son nom sur la liste d'émargement ». Aux termes du second alinéa de l'article L. 64 du même code : « Lorsqu'un électeur se trouve dans l'impossibilité de signer, l'émargement prévu par le troisième alinéa de l'article L. 62-1 est apposé par un électeur de son choix qui fait suivre sa signature de la mention suivante : 'l'électeur ne peut signer lui-même' ». Il ressort de ces dispositions, destinées à assurer la sincérité des opérations électorales, que seule la signature personnelle d'un électeur est de nature à apporter la preuve de sa participation au scrutin, sauf cas d'impossibilité dûment mentionnée sur la liste d'émargeme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86_annot.xml</text:p>
          </table:table-cell>
          <table:table-cell office:value-type="string" table:style-name="ce3">
            <text:p>7.Opérations</text:p>
          </table:table-cell>
          <table:table-cell office:value-type="string" table:style-name="ce3">
            <text:p><text:s/>2. D'une part, M. AZÉMA soutient que les listes d'émargement de plusieurs bureaux de vote comporteraient, dans 63 cas, des discordances de signature entre les deux tours de scrutin, révélant que ces votes sont irréguliers. Il résulte de l'instruction, notamment de l'examen des listes d'émargement des bureaux de vote concernés, que, pour l'essentiel des cas, les différences alléguées ne sont pas probantes. En revanche, sept votes émis dans les communes de Bélesta, Ercé, Les Cabannes, Rabat-les-Trois-Seigneurs, Savignac-les-Ormeaux et Tarascon-sur-Ariège doivent être regardés comme irrégulièrement exprimé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87_annot.xml</text:p>
          </table:table-cell>
          <table:table-cell office:value-type="string" table:style-name="ce3">
            <text:p>4.Campagne</text:p>
          </table:table-cell>
          <table:table-cell office:value-type="string" table:style-name="ce3">
            <text:p><text:s/>2. Toutefois, en premier lieu, ni les tracts diffusés entre décembre 2016 et début juin 2017 portant sur sa gestion municipale, ni ceux distribués le 29 mai 2017 reprenant la copie d'un article de presse, n'ont excédé les limites de la polémique électorale. En outre, compte tenu de leur date de diffusion, le requérant a eu le temps d'y répondre utilement avant la fin de la campagne électorale. De la même manière, M. FOURGOUS a pu apporter une réponse utile avant la fin de la campagne électorale à la vidéo diffusée le 9 juin 2017 sur internet le taxant d'islamophobie ainsi qu'à celle diffusée à la suite de son accident de circulation. Enfin, si le contenu du tract diffusé le 29 mai 2017 par une ancienne conseillère municipale excède les limites de la polémique électorale, il fait référence à des lettres ouvertes émises par la signataire du tract en 2012 et 2014 ainsi qu'à son blog, et ne constitue donc pas un élément nouveau. En outre, M. FOURGOUS a eu, en tout état de cause, le temps d'y répondre utilement. Aucun des faits ainsi dénoncés n'a été de nature, compte tenu de l'écart de voix, à altérer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87_annot.xml</text:p>
          </table:table-cell>
          <table:table-cell office:value-type="string" table:style-name="ce3">
            <text:p>4.Campagne</text:p>
          </table:table-cell>
          <table:table-cell office:value-type="string" table:style-name="ce3">
            <text:p><text:s/>4. En troisième lieu, M. FOURGOUS soutient que des messages hostiles à sa candidature ont été diffusés sur « Facebook » le 18 juin, jour du second tour de scrutin. En raison de leur date tardive de diffusion, ces messages n'ont pu, compte tenu de l'écart de voix, altérer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87_annot.xml</text:p>
          </table:table-cell>
          <table:table-cell office:value-type="string" table:style-name="ce3">
            <text:p>6.Financement</text:p>
          </table:table-cell>
          <table:table-cell office:value-type="string" table:style-name="ce3">
            <text:p><text:s/>9. La possibilité pour l'employeur de dispenser un salarié démissionnaire d'effectuer son préavis est prévue par l'article L. 1234-5 du code du travail. Or, le requérant n'établit pas que cette décision de l'employeur de Mme HAI ait été motivée par la volonté de participer au financement de sa campagne électorale. Au surplus, il résulte de l'instruction menée par le Conseil constitutionnel, en particulier de l'examen du compte de campagne de Mme HAI, que les dépenses qu'elle a exposées pour sa campagne électorale n'ont pas été financées par les sommes perçues de son ancien employeur au titre de son indemnité de dispense de préavi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88_annot.xml</text:p>
          </table:table-cell>
          <table:table-cell office:value-type="string" table:style-name="ce3">
            <text:p>4.Campagne</text:p>
          </table:table-cell>
          <table:table-cell office:value-type="string" table:style-name="ce3">
            <text:p><text:s/>1. Le requérant soutient que Mme Hortense de MEREUIL, candidate arrivée en tête au premier tour de scrutin puis battue au second tour de scrutin, a utilisé une affiche de campagne comprenant une combinaison des trois couleurs bleu, blanc et rouge, en violation de l'article R. 27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89_annot.xml</text:p>
          </table:table-cell>
          <table:table-cell office:value-type="string" table:style-name="ce3">
            <text:p>7.Opérations</text:p>
          </table:table-cell>
          <table:table-cell office:value-type="string" table:style-name="ce3">
            <text:p><text:s/>5. En deuxième lieu, le requérant fait état, dans plusieurs bureaux de vote, de différences entre le nombre d'émargements et le nombre d'enveloppes et de bulletins de vote trouvés dans les urnes au premier tour. Il résulte de l'examen des procès-verbaux des opérations électorales que, dans onze des cinquante-quatre bureaux de la circonscription, le nombre d'enveloppes et de bulletins ne correspond pas à celui des émargements. En pareil cas, il convient de retenir le moins élevé de ces deux nombres. Ainsi, il y a lieu de déduire 13 voix tant du nombre de suffrages obtenus au premier tour par M. GRIVEAUX que du nombre total de suffrages exprimé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2789_annot.xml</text:p>
          </table:table-cell>
          <table:table-cell office:value-type="string" table:style-name="ce3">
            <text:p>4.Campagne</text:p>
          </table:table-cell>
          <table:table-cell office:value-type="string" table:style-name="ce3">
            <text:p><text:s/>13. En dernier lieu, des tracts du « Parti animaliste » auraient été diffusés le 10 juin 2017, en violation de l'article L. 49 du code électoral, aux termes duquel : « À partir de la veille du scrutin à zéro heure, il est interdit de distribuer ou faire distribuer des bulletins, circulaires et autres documents. - À partir de la veille du scrutin à zéro heure, il est également interdit de diffuser ou de faire diffuser par tout moyen de communication au public par voie électronique tout message ayant le caractère de propagande électorale ». Ce grief n'est cependant assorti d'aucun élément permettant d'apprécier l'étendue et la portée des faits allégués et doit donc être écarté.</text:p>
          </table:table-cell>
          <table:table-cell table:number-columns-repeated="16377"/>
        </table:table-row>
        <table:table-row table:style-name="ro1">
          <table:table-cell office:value-type="string" table:style-name="ce7">
            <text:p>Non</text:p>
          </table:table-cell>
          <table:table-cell table:number-columns-repeated="2" table:style-name="ce3"/>
          <table:table-cell office:value-type="string" table:style-name="ce3">
            <text:p>6. Financement</text:p>
          </table:table-cell>
          <table:table-cell office:value-type="string" table:style-name="ce3">
            <text:p>file:\\\P:\CRJ\RECHERCHE\PROJET_JADE\JADE_COMMUN\Annotation\Annotation_automatique_Maritaud\Technologie_light\Super-catégories-objets_0,8\AN\2017\rejet\CONSTEXT000036198759_annot.xml</text:p>
          </table:table-cell>
          <table:table-cell office:value-type="string" table:style-name="ce3">
            <text:p>4.Campagne</text:p>
          </table:table-cell>
          <table:table-cell office:value-type="string" table:style-name="ce3">
            <text:p><text:s/>1. Aux termes du deuxième alinéa de l'article L. 52-1 du code électoral : « À compter du premier jour du sixième mois précédant le mois au cours duquel il doit être procédé à des élections générales, aucune campagne de promotion publicitaire des réalisations ou de la gestion d'une collectivité ne peut être organisée sur le territoire des collectivités intéressées par le scrutin ». Aux termes du deuxième alinéa de l'article L. 52-8 du même code : « Les personnes morales, à l'exception des partis ou groupements politiques, ne peuvent participer au financement de la campagne électorale d'un candidat, ni en lui consentant des dons sous quelque forme que ce soit, ni en lui fournissant des biens, services ou autres avantages directs ou indirects à des prix inférieurs à ceux qui sont habituellement pratiqués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198759_annot.xml</text:p>
          </table:table-cell>
          <table:table-cell office:value-type="string" table:style-name="ce3">
            <text:p>4.Campagne</text:p>
          </table:table-cell>
          <table:table-cell office:value-type="string" table:style-name="ce3">
            <text:p><text:s/>8. Mme VOYER soutient, en dernier lieu, que Mme MÉNARD a bénéficié du soutien d'une publication dénommée « Le Petit Journal » qui a consacré à cette dernière la une de son édition du jeudi 15 juin 2017, ainsi qu'un long article. Toutefois, la presse écrite peut rendre compte comme elle l'entend d'une campagne électorale. Les articles édités par « Le Petit Journal » ne sauraient donc être regardés comme un avantage au sens du deuxième alinéa de l'article L. 52-8 du code électoral. Le grief doit, par suite, être écarté.</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4. Campagne</text:p>
          </table:table-cell>
          <table:table-cell office:value-type="string" table:style-name="ce3">
            <text:p>file:\\\P:\CRJ\RECHERCHE\PROJET_JADE\JADE_COMMUN\Annotation\Annotation_automatique_Maritaud\Technologie_light\Super-catégories-objets_0,8\AN\2017\rejet\CONSTEXT000036198759_annot.xml</text:p>
          </table:table-cell>
          <table:table-cell office:value-type="string" table:style-name="ce3">
            <text:p>6.Financement</text:p>
          </table:table-cell>
          <table:table-cell office:value-type="string" table:style-name="ce3">
            <text:p><text:s/>5. Mme VOYER soutient, en troisième lieu, que la diffusion, par la commune de Béziers, d'affiches faisant écho aux thèmes de campagne de Mme MÉNARD a constitué une campagne de promotion publicitaire prohibée par les dispositions précitées de l'article L. 52-1 du code électoral et que l'avantage ainsi accordé l'a été en méconnaissance des dispositions précitées de l'article L. 52-8 du même code. Toutefois, ce grief nouveau invoqué pour la première fois dans le mémoire enregistré le 5 octobre 2017 a été présenté après l'expiration du délai de dix jours fixé par l'article 33 de l'ordonnance du 7 novembre 1958 mentionnée ci-dessus. Il est, dès lors, irrecevable.</text:p>
          </table:table-cell>
          <table:table-cell table:number-columns-repeated="16377"/>
        </table:table-row>
        <table:table-row table:style-name="ro1">
          <table:table-cell office:value-type="string" table:style-name="ce7">
            <text:p>Non</text:p>
          </table:table-cell>
          <table:table-cell table:number-columns-repeated="2" table:style-name="ce3"/>
          <table:table-cell office:value-type="string" table:style-name="ce3">
            <text:p><text:s/>7. Opérations</text:p>
          </table:table-cell>
          <table:table-cell office:value-type="string" table:style-name="ce3">
            <text:p>file:\\\P:\CRJ\RECHERCHE\PROJET_JADE\JADE_COMMUN\Annotation\Annotation_automatique_Maritaud\Technologie_light\Super-catégories-objets_0,8\AN\2017\rejet\CONSTEXT000036238089_annot.xml</text:p>
          </table:table-cell>
          <table:table-cell office:value-type="string" table:style-name="ce3">
            <text:p>4.Campagne</text:p>
          </table:table-cell>
          <table:table-cell office:value-type="string" table:style-name="ce3">
            <text:p><text:s/>1. En premier lieu, aux termes du troisième alinéa de l'article L. 62-1 du code électoral : « Le vote de chaque électeur est constaté par sa signature apposée à l'encre en face de son nom sur la liste d'émargement ». Aux termes du deuxième alinéa de l'article L. 64 du même code : « Lorsqu'un électeur se trouve dans l'impossibilité de signer, l'émargement prévu par le troisième alinéa de l'article L. 62-1 est apposé par un électeur de son choix qui fait suivre sa signature de la mention suivante : 'l'électeur ne peut signer lui-même' ». Il ressort de ces dispositions, destinées à assurer la sincérité des opérations électorales, que seule la signature personnelle, à l'encre, d'un électeur est de nature à apporter la preuve de sa participation au scrutin, sauf cas d'impossibilité dûment mentionnée sur la liste d'émargeme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238089_annot.xml</text:p>
          </table:table-cell>
          <table:table-cell office:value-type="string" table:style-name="ce3">
            <text:p>4.Campagne</text:p>
          </table:table-cell>
          <table:table-cell office:value-type="string" table:style-name="ce3">
            <text:p><text:s/>16. - Sur les griefs relatifs à la campagne électorale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238089_annot.xml</text:p>
          </table:table-cell>
          <table:table-cell office:value-type="string" table:style-name="ce3">
            <text:p>7.Opérations</text:p>
          </table:table-cell>
          <table:table-cell office:value-type="string" table:style-name="ce3">
            <text:p><text:s/>2. D'une part, le requérant met en cause des votes constatés par de simples croix sur les listes d'émargement. Il résulte de l'instruction que ce grief est fondé pour deux votes constatés par de simples croix sur les listes d'émargement des bureaux de vote nos 474 et 672, qui ne peuvent être tenus pour régulièrement exprimé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238089_annot.xml</text:p>
          </table:table-cell>
          <table:table-cell office:value-type="string" table:style-name="ce3">
            <text:p>7.Opérations</text:p>
          </table:table-cell>
          <table:table-cell office:value-type="string" table:style-name="ce3">
            <text:p><text:s/>5. En deuxième lieu, le requérant soutient que, dans le bureau de vote n° 560, 454 enveloppes ont été dénombrées à l'ouverture de l'urne alors que la liste d'émargement ne mentionnait que 453 électeurs. Il résulte de l'examen des documents électoraux que le nombre des émargements est inférieur d'une unité au nombre des enveloppes et bulletins trouvés dans les urnes de ce bureau de vote. Il y a lieu, par suite, de ramener de 454 à 453 le nombre de suffrages exprimé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238092_annot.xml</text:p>
          </table:table-cell>
          <table:table-cell office:value-type="string" table:style-name="ce3">
            <text:p>4.Campagne</text:p>
          </table:table-cell>
          <table:table-cell office:value-type="string" table:style-name="ce3">
            <text:p><text:s/>2. En premier lieu, le requérant, candidat battu au second tour des élections contestées, soutient que les dispositions du code électoral organisant l'affichage électoral auraient été méconnues et que M. VALLAUD, candidat élu, aurait irrégulièrement fait figurer ses affiches sur les panneaux électoraux d'autres candidats ainsi que sur des emplacements qui n'étaient pas réservés à l'affichage électoral. Si des affiches en faveur du candidat élu ont pu être apposées en dehors des emplacements réservés, il n'est pas établi que ces affichages aient revêtu un caractère massif, prolongé ou répété. Il en résulte qu'eu égard à l'écart des voix entre le candidat élu et son adversaire, les affichages auxquels il a été procédé en méconnaissance de l'article L. 51 du code électoral n'ont pu avoir une incidence sur le résultat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238092_annot.xml</text:p>
          </table:table-cell>
          <table:table-cell office:value-type="string" table:style-name="ce3">
            <text:p>7.Opérations</text:p>
          </table:table-cell>
          <table:table-cell office:value-type="string" table:style-name="ce3">
            <text:p><text:s/>11. En cinquième lieu, le requérant soutient que les procès-verbaux de sept bureaux de vote ne mentionnent pas l'heure de fin des opérations de dépouillement et que cette omission ne permet pas d'assurer que ces opérations ont été menées sans désemparer conformément aux dispositions de l'article R. 63 du code électoral. Il résulte de l'examen des pièces que l'heure de clôture du dépouillement, mentionnée dans les procès-verbaux des bureaux de votes des communes de Saint-Aubin, Castelnau-Chalosse, Bastennes, Nerbis, Lacrabe, correspond à l'heure réglementaire de clôture du scrutin. Par ailleurs, il est observé que les procès-verbaux des communes de Duhort-Bachen et de Le Vignau, bien que signés par les membres du bureau, ne mentionnent pas l'heure de clôture des opérations. Toutefois, il n'est pas établi que, dans ces communes où le nombre d'électeurs est peu élevé, le dépouillement ait eu lieu dans des conditions qui auraient porté atteinte à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238092_annot.xml</text:p>
          </table:table-cell>
          <table:table-cell office:value-type="string" table:style-name="ce3">
            <text:p>7.Opérations</text:p>
          </table:table-cell>
          <table:table-cell office:value-type="string" table:style-name="ce3">
            <text:p><text:s/>12. En sixième lieu, le requérant soutient qu'en violation des dispositions des articles L. 65 et L. 66 du code électoral, les bulletins nuls et les enveloppes ne contenant aucun bulletin n'ont pas été annexés au procès-verbal des opérations de vote des communes de Vielle-Tursan, Mauries et Bas-Mauco. D'une part, il résulte de l'instruction que les bulletins nuls ont été annexés aux procès-verbaux des bureaux de vote concernés. D'autre part, si les enveloppes ne contenant aucun bulletin, qui doivent être annexées en application de l'article L. 65, ne l'ont pas été, il n'est pas démontré que cette irrégularité ait eu pour but et pour effet de porter atteinte à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238092_annot.xml</text:p>
          </table:table-cell>
          <table:table-cell office:value-type="string" table:style-name="ce3">
            <text:p>7.Opérations</text:p>
          </table:table-cell>
          <table:table-cell office:value-type="string" table:style-name="ce3">
            <text:p><text:s/>13. En dernier lieu, le requérant soutient qu'en violation de l'article L. 66 du code électoral, les procès-verbaux des opérations de vote de quatre communes supportent de nombreuses ratures se rapportant au décompte et à la répartition des bulletins doubles et nuls. Il résulte de l'instruction que ces ratures et surcharges, qui procèdent de rectifications d'erreurs purement matérielles dans le décompte et la répartition des votes blancs et nuls, ne révèlent aucune manœuvre frauduleuse et n'ont pas altéré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238092_annot.xml</text:p>
          </table:table-cell>
          <table:table-cell office:value-type="string" table:style-name="ce3">
            <text:p>6.Financement</text:p>
          </table:table-cell>
          <table:table-cell office:value-type="string" table:style-name="ce3">
            <text:p><text:s/>15. En premier lieu, le requérant soutient que le candidat élu a bénéficié du concours d'un directeur de campagne en méconnaissance des dispositions de l'article L. 52-8 du code électoral dès lors que celui-ci était rémunéré par le syndicat mixte départemental d'équipement des communes des Landes dont il est le directeur. Il résulte de l'examen des pièces versées au dossier qu'eu égard à l'organisation du temps hebdomadaire de travail au sein de cet établissement, réparti sur quatre jours, et à l'attestation de congés produite, le concours apporté par cette personne au candidat élu ne peut être regardé comme un don de cet établissement public.</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7\rejet\CONSTEXT000036238092_annot.xml</text:p>
          </table:table-cell>
          <table:table-cell office:value-type="string" table:style-name="ce3">
            <text:p>6.Financement</text:p>
          </table:table-cell>
          <table:table-cell office:value-type="string" table:style-name="ce3">
            <text:p><text:s/>18. En quatrième lieu, le requérant soutient qu'en violation de l'article L. 52-8 du code électoral, un numéro spécial du « Travailleur landais », organe de presse du parti socialiste habilité à publier des annonces judiciaires et légales dans le département des Landes, a diffusé, le 17 juin 2017, après la clôture de la campagne, un numéro spécial contenant un appel à voter en faveur du candidat élu. Il résulte de l'instruction que le coût d'impression de cette publication a bien été intégré dans le compte de campagne du candidat élu en tant que concours en nature de la fédération des Landes du parti socialiste et parmi les dépenses réglées par le mandataire financier. Par ailleurs, les pièces versées au dossier ne permettent pas d'établir que cette publication, qui ne contient aucun élément de polémique électorale auquel le requérant n'aurait pas été en mesure de répondre, a été diffusée après la clôture de la campagne.</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2. Préalable au scrutin</text:p>
          </table:table-cell>
          <table:table-cell office:value-type="string" table:style-name="ce3">
            <text:p>file:\\\P:\CRJ\RECHERCHE\PROJET_JADE\JADE_COMMUN\Annotation\Annotation_automatique_Maritaud\Technologie_light\Super-catégories-objets_0,8\AN\2018\rejet\CONSTEXT000036539288_annot.xml</text:p>
          </table:table-cell>
          <table:table-cell office:value-type="string" table:style-name="ce3">
            <text:p>4.Campagne</text:p>
          </table:table-cell>
          <table:table-cell office:value-type="string" table:style-name="ce3">
            <text:p><text:s/>17. M. DAVOUX soutient que M. ELBAR aurait utilisé la liste électorale consulaire à des fins commerciales, en méconnaissance de l'article L. 113-2 du code électoral.</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2018\rejet\CONSTEXT000036539291_annot.xml</text:p>
          </table:table-cell>
          <table:table-cell office:value-type="string" table:style-name="ce3">
            <text:p>4.Campagne</text:p>
          </table:table-cell>
          <table:table-cell office:value-type="string" table:style-name="ce3">
            <text:p><text:s/>2. La requérante soutient que le candidat remplaçant de la candidate élue n'était pas éligible, au motif qu'il n'aurait pas satisfait aux obligations imposées par le code du service national, comme le prévoient les dispositions de l'article L.O. 131 du code élector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8\rejet\CONSTEXT000036539291_annot.xml</text:p>
          </table:table-cell>
          <table:table-cell office:value-type="string" table:style-name="ce3">
            <text:p>7.Opérations</text:p>
          </table:table-cell>
          <table:table-cell office:value-type="string" table:style-name="ce3">
            <text:p><text:s/>4. En premier lieu, la requérante soutient que les opérations de dépouillement dans un bureau de vote auraient été irrégulières dès lors que ce bureau aurait fermé à vingt-et-une heures, au lieu de vingt heures, en méconnaissance de l'article R. 41 du code électoral. Il résulte de l'instruction, d'une part, que le procès-verbal du bureau de vote a été dressé à vingt-et-une heures dix, ce qui n'aurait pas été possible s'il avait fermé à vingt-et-une heures et, d'autre part, que le procès-verbal de la commission de contrôle des opérations de vote ne mentionne nullement un retard de fermeture. Le grief manque ainsi en fai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8\rejet\CONSTEXT000036539291_annot.xml</text:p>
          </table:table-cell>
          <table:table-cell office:value-type="string" table:style-name="ce3">
            <text:p>7.Opérations</text:p>
          </table:table-cell>
          <table:table-cell office:value-type="string" table:style-name="ce3">
            <text:p><text:s/>7. En l'espèce, le bureau de vote en cause ne comportait qu'un seul assesseur, désigné par le maire en application de l'article R. 44 du code électoral. Toutefois, cette insuffisance du nombre des assesseurs n'est pas de nature à justifier l'annulation du scrutin, dès lors qu'il ne résulte pas de l'instruction qu'elle ait eu pour objet ou pour effet de permettre des fraudes dans le déroulement du scrutin. En outre, l'instruction n'a pas permis de relever des écarts de voix dans ce bureau de vote significativement différents de ceux observés dans les autres bureaux de la circonscription. Le grief doit donc être écar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8\rejet\CONSTEXT000036539291_annot.xml</text:p>
          </table:table-cell>
          <table:table-cell office:value-type="string" table:style-name="ce3">
            <text:p>7.Opérations</text:p>
          </table:table-cell>
          <table:table-cell office:value-type="string" table:style-name="ce3">
            <text:p><text:s/>18. En quatrième lieu, la requérante soutient que des opérations frauduleuses auraient pu avoir lieu dès lors que le nombre de procurations dans deux bureaux de vote serait très élevé, que certaines d'entre elles seraient douteuses et que ces bureaux auraient enregistré un grand nombre de bulletins blancs et nuls. Toutefois, le simple constat d'un nombre de procurations légèrement plus élevé dans deux bureaux de vote que dans l'ensemble des bureaux de vote de la circonscription ou celui d'un nombre de bulletins blancs et nuls inférieur, ne peut suffire à établir une manœuvre frauduleuse. Par ailleurs, les mentions prescrites par le code électoral pour l'enregistrement des procurations sur les listes d'émargement ont été respectées. Le grief doit donc être écar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8\rejet\CONSTEXT000036539291_annot.xml</text:p>
          </table:table-cell>
          <table:table-cell office:value-type="string" table:style-name="ce3">
            <text:p>7.Opérations</text:p>
          </table:table-cell>
          <table:table-cell office:value-type="string" table:style-name="ce3">
            <text:p><text:s/>23. En septième lieu, la requérante fait état, dans plusieurs bureaux de vote, de différences entre le nombre d'émargements et le nombre d'enveloppes et de bulletins de vote trouvés dans les urnes au second tour. Il résulte de l'examen des procès-verbaux des opérations électorales que, dans cinq des trente-neuf bureaux de vote de la circonscription, le nombre d'enveloppes et de bulletins ne correspond pas à celui des émargements. En pareil cas, il convient de retenir le moins élevé de ces deux nombres. Ainsi, il y a lieu de déduire cinq voix tant du nombre de suffrages obtenus au second tour par Mme OBONO que du nombre total de suffrages exprimé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8\rejet\CONSTEXT000036539291_annot.xml</text:p>
          </table:table-cell>
          <table:table-cell office:value-type="string" table:style-name="ce3">
            <text:p>7.Opérations</text:p>
          </table:table-cell>
          <table:table-cell office:value-type="string" table:style-name="ce3">
            <text:p><text:s/>24. En huitième lieu, la requérante soutient que des différences notables de signatures entre les deux tours ont été constatées sur les listes d'émargement. Il résulte néanmoins de l'examen des listes d'émargement originales que, dans la très grande majorité des cas, les différences de signatures relevées tiennent à ce que des procurations avaient été établies ou à la circonstance que les électeurs ont utilisé tour à tour un paraphe ou leur signature ou, pour les femmes mariées, leur nom de famille ou leur nom d'usage. Dans d'autres cas, les différences ne présentent pas un caractère anormal permettant de douter de l'authenticité des votes en cause. En revanche, 74 signatures comportent des différences significatives entre les deux tours de scrutin. Par ailleurs, trois votes ont donné lieu à des émargements par apposition d'une croix, sans qu'ait été portée la mention « l'électeur ne peut signer lui-même » en violation des dispositions des articles L. 62-1 et L. 64 du code électoral. Ces 77 votes ne peuvent être tenus pour régulièrement exprimés. Il y a ainsi lieu de déduire 77 voix tant du nombre de suffrages obtenus au second tour par Mme OBONO que du nombre total de suffrages exprimé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8\rejet\CONSTEXT000036539291_annot.xml</text:p>
          </table:table-cell>
          <table:table-cell office:value-type="string" table:style-name="ce3">
            <text:p>7.Opérations</text:p>
          </table:table-cell>
          <table:table-cell office:value-type="string" table:style-name="ce3">
            <text:p><text:s/>26. Compte tenu de la répartition des suffrages au second tour de scrutin, même si les 86 suffrages irrégulièrement exprimés étaient déduits du nombre de voix obtenues par Mme OBONO, les irrégularités constatées ne sont pas de nature à affecter le résultat de l'élection. La requête doit donc être rejetée.</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8\rejet\CONSTEXT000036706179_annot.xml</text:p>
          </table:table-cell>
          <table:table-cell office:value-type="string" table:style-name="ce3">
            <text:p>4.Campagne</text:p>
          </table:table-cell>
          <table:table-cell office:value-type="string" table:style-name="ce3">
            <text:p><text:s/>1. Aux termes du second alinéa de l'article L. 49 du code électoral : « À partir de la veille du scrutin à zéro heure, il est (…) interdit de diffuser ou de faire diffuser par tout moyen de communication au public par voie électronique tout message ayant le caractère de propagande électorale ». Le requérant soutient que M. LESCURE, candidat élu, a méconnu ces dispositions en diffusant par courrier électronique, dans la nuit du 1er au 2 juin 2017, un message de propagande électorale en vue du premier tour de scrutin organisé le 3 juin 2017.</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8\rejet\CONSTEXT000036706181_annot.xml</text:p>
          </table:table-cell>
          <table:table-cell office:value-type="string" table:style-name="ce3">
            <text:p>7.Opérations</text:p>
          </table:table-cell>
          <table:table-cell office:value-type="string" table:style-name="ce3">
            <text:p><text:s/>11. Si M. CORONADO soutient que, dans le bureau de Salvador, au Brésil, l'urne n'aurait pas été scellée lors des scrutins, cette allégation n'est pas corroborée par l'instruction.</text:p>
          </table:table-cell>
          <table:table-cell table:number-columns-repeated="16377"/>
        </table:table-row>
        <table:table-row table:style-name="ro1">
          <table:table-cell office:value-type="string" table:style-name="ce7">
            <text:p>Non</text:p>
          </table:table-cell>
          <table:table-cell table:number-columns-repeated="2"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2018\rejet\CONSTEXT000036706182_annot.xml</text:p>
          </table:table-cell>
          <table:table-cell office:value-type="string" table:style-name="ce3">
            <text:p>4.Campagne</text:p>
          </table:table-cell>
          <table:table-cell office:value-type="string" table:style-name="ce3">
            <text:p><text:s/>3. Aux termes de l'article L.O. 131 du code électoral : « Nul ne peut être élu s'il ne justifie avoir satisfait aux obligations imposées par le code du service national ».</text:p>
          </table:table-cell>
          <table:table-cell table:number-columns-repeated="16377"/>
        </table:table-row>
        <table:table-row table:style-name="ro1">
          <table:table-cell office:value-type="string" table:style-name="ce7">
            <text:p>Oui</text:p>
          </table:table-cell>
          <table:table-cell table:number-columns-repeated="3" table:style-name="ce3"/>
          <table:table-cell office:value-type="string" table:style-name="ce3">
            <text:p>file:\\\P:\CRJ\RECHERCHE\PROJET_JADE\JADE_COMMUN\Annotation\Annotation_automatique_Maritaud\Technologie_light\Super-catégories-objets_0,8\AN\2018\rejet\CONSTEXT000036706182_annot.xml</text:p>
          </table:table-cell>
          <table:table-cell office:value-type="string" table:style-name="ce3">
            <text:p>4.Campagne</text:p>
          </table:table-cell>
          <table:table-cell office:value-type="string" table:style-name="ce3">
            <text:p><text:s/>6. Aux termes de l'article L. 52-1 du code électoral : « Pendant les six mois précédant le premier jour du mois d'une élection et jusqu'à la date du tour de scrutin où celle-ci est acquise, l'utilisation à des fins de propagande électorale de tout procédé de publicité commerciale par la voie de la presse ou par tout moyen de communication audiovisuelle est interdite. - À compter du premier jour du sixième mois précédant le mois au cours duquel il doit être procédé à des élections générales, aucune campagne de promotion publicitaire des réalisations ou de la gestion d'une collectivité ne peut être organisée sur le territoire des collectivités intéressées par le scrutin. Sans préjudice des dispositions du présent chapitre, cette interdiction ne s'applique pas à la présentation, par un candidat ou pour son compte, dans le cadre de l'organisation de sa campagne, du bilan de la gestion des mandats qu'il détient ou qu'il a détenus …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8\rejet\CONSTEXT000036706182_annot.xml</text:p>
          </table:table-cell>
          <table:table-cell office:value-type="string" table:style-name="ce3">
            <text:p>6.Financement</text:p>
          </table:table-cell>
          <table:table-cell office:value-type="string" table:style-name="ce3">
            <text:p><text:s/>16. Mme ORPHÉ soutient en dernier lieu que Mme RAMASSAMY n'a pas fait figurer dans son compte de campagne ses frais d'abonnement téléphonique et que ceux-ci n'ont pas été réglés par son mandataire financier. Il résulte toutefois de l'instruction que les frais en cause ont été inscrits dans le compte de campagne de la candidate élue. Ils ont pu, pour des raisons de commodité, être réglés directement par l'intéressée, et non par son mandataire financier, dès lors que leur montant global, de 322 euros, est faible par rapport au total des dépenses du compte, établi à 41 234 euros, et négligeable au regard du plafond de dépenses autorisées, fixé à 68 962 euros. Il suit de là que le grief doit être écarté. - Sur les griefs relatifs au déroulement des opérations électorales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8\rejet\CONSTEXT000036706182_annot.xml</text:p>
          </table:table-cell>
          <table:table-cell office:value-type="string" table:style-name="ce3">
            <text:p>7.Opérations</text:p>
          </table:table-cell>
          <table:table-cell office:value-type="string" table:style-name="ce3">
            <text:p><text:s/>17. Mme ORPHÉ soutient en premier lieu que des fausses signatures ont été observées dans les bureaux de vote de la commune de Sainte-Suzanne, plusieurs personnes pouvant témoigner de ce qu'elles ne sont pas allées voter alors que les listes d'émargement ont été paraphées en face de leur nom. Elle ne produit toutefois aucun des témoignages annoncés, de telle sorte que le grief n'est pas assorti des précisions permettant d'en apprécier le bien-fond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18\rejet\CONSTEXT000036706182_annot.xml</text:p>
          </table:table-cell>
          <table:table-cell office:value-type="string" table:style-name="ce3">
            <text:p>7.Opérations</text:p>
          </table:table-cell>
          <table:table-cell office:value-type="string" table:style-name="ce3">
            <text:p><text:s/>18. Mme ORPHÉ soutient en deuxième lieu que, dans les bureaux de vote n° 18 et n° 22 de la commune de Sainte-Suzanne, il existe des discordances entre le nombre d'émargements et le nombre de bulletins trouvés dans l'urne. Il résulte toutefois de l'instruction, notamment des procès-verbaux des bureaux de vote en cause, que la discordance alléguée n'est pas avérée.</text:p>
          </table:table-cell>
          <table:table-cell table:number-columns-repeated="16377"/>
        </table:table-row>
        <table:table-row table:style-name="ro1">
          <table:table-cell office:value-type="string" table:style-name="ce7">
            <text:p>Oui</text:p>
          </table:table-cell>
          <table:table-cell table:number-columns-repeated="3" table:style-name="ce3"/>
          <table:table-cell office:value-type="string" table:style-name="ce3">
            <text:p>file:\\\P:\CRJ\RECHERCHE\PROJET_JADE\JADE_COMMUN\Annotation\Annotation_automatique_Maritaud\Technologie_light\Super-catégories-objets_0,8\AN\2018\rejet\CONSTEXT000036706183_annot.xml</text:p>
          </table:table-cell>
          <table:table-cell office:value-type="string" table:style-name="ce3">
            <text:p>4.Campagne</text:p>
          </table:table-cell>
          <table:table-cell office:value-type="string" table:style-name="ce3">
            <text:p><text:s/>1. Aux termes de l'article L. 154 du code électoral, les candidats à l'élection législative sont tenus de faire une déclaration de candidature. L'article L. 155 du même code dispose que : « Cette déclaration … doit être accompagnée de l'acceptation écrite du remplaçant ». L'article L. 159 du même code prévoit enfin que : « Si une déclaration de candidature ne remplit pas les conditions prévues aux articles précédents, le préfet saisit dans les vingt-quatre heures le tribunal administratif qui statue dans les trois jours. La décision du tribunal ne peut être contestée que devant le Conseil constitutionnel saisi de l'élection ». S'agissant de l'élection des députés par les Français établis hors de France, l'article R. 173-3 du code électoral prévoit que : « Les attributions conférées au préfet par l'article L. 159 sont exercées par le ministre de l'intérieur ».</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3. Candidature</text:p>
          </table:table-cell>
          <table:table-cell office:value-type="string" table:style-name="ce3">
            <text:p>file:\\\P:\CRJ\RECHERCHE\PROJET_JADE\JADE_COMMUN\Annotation\Annotation_automatique_Maritaud\Technologie_light\Super-catégories-objets_0,8\AN\2018\rejet\CONSTEXT000036706183_annot.xml</text:p>
          </table:table-cell>
          <table:table-cell office:value-type="string" table:style-name="ce3">
            <text:p>4.Campagne</text:p>
          </table:table-cell>
          <table:table-cell office:value-type="string" table:style-name="ce3">
            <text:p><text:s/>4. Toutefois, la seule circonstance que l'acceptation écrite du remplaçant d'un candidat à l'élection législative soit produite sous la forme d'une copie ne saurait, en l'absence de tout élément faisant douter de l'authenticité de cette copie et de toute contestation relative à la volonté de son auteur, constituer une méconnaissance de l'article L. 155 du code électoral.</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20\rejet\CONSTEXT000042671619_annot.xml</text:p>
          </table:table-cell>
          <table:table-cell office:value-type="string" table:style-name="ce3">
            <text:p>6.Financement</text:p>
          </table:table-cell>
          <table:table-cell office:value-type="string" table:style-name="ce3">
            <text:p><text:s/>7. En outre, les griefs invoqués pour la première fois par le requérant dans le mémoire complémentaire enregistré le 23 octobre 2020 ont été présentés après l'expiration du délai de dix jours fixé par l'article 33 de l'ordonnance du 7 novembre 1958. Ils sont, dès lors, irrecevabl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2\rejet\CONSTEXT000046216476_annot.xml</text:p>
          </table:table-cell>
          <table:table-cell office:value-type="string" table:style-name="ce3">
            <text:p>4.Campagne</text:p>
          </table:table-cell>
          <table:table-cell office:value-type="string" table:style-name="ce3">
            <text:p><text:s/>2. A l'appui de sa requête, M. DA CRUZ dénonce le fait que le candidat élu au second tour ainsi qu'un autre candidat éliminé au premier tour auraient distribué des documents de propagande électorale avant le début officiel de la campagne électorale. Toutefois, cette circonstance ne constitue pas une infraction aux règles régissant la campagne électorale et n'est, au demeurant, pas établie.</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1. Procédure</text:p>
          </table:table-cell>
          <table:table-cell office:value-type="string" table:style-name="ce3">
            <text:p>file:\\\P:\CRJ\RECHERCHE\PROJET_JADE\JADE_COMMUN\Annotation\Annotation_automatique_Maritaud\Technologie_light\Super-catégories-objets_0,8\AN\2022\rejet\CONSTEXT000046216484_annot.xml</text:p>
          </table:table-cell>
          <table:table-cell office:value-type="string" table:style-name="ce3">
            <text:p>4.Campagne</text:p>
          </table:table-cell>
          <table:table-cell office:value-type="string" table:style-name="ce3">
            <text:p><text:s/>3. La requête présentée par Mme PONARD et autres, qui se borne à faire valoir qu'une irrégularité aurait affecté la profession de foi de la candidate élue, ne tend pas à l'annulation de l'élection. Par suite, cette requête est irrecevable.</text:p>
          </table:table-cell>
          <table:table-cell table:number-columns-repeated="16377"/>
        </table:table-row>
        <table:table-row table:style-name="ro1">
          <table:table-cell office:value-type="string" table:style-name="ce7">
            <text:p>Oui</text:p>
          </table:table-cell>
          <table:table-cell table:number-columns-repeated="3" table:style-name="ce3"/>
          <table:table-cell office:value-type="string" table:style-name="ce3">
            <text:p>file:\\\P:\CRJ\RECHERCHE\PROJET_JADE\JADE_COMMUN\Annotation\Annotation_automatique_Maritaud\Technologie_light\Super-catégories-objets_0,8\AN\2022\rejet\CONSTEXT000046216489_annot.xml</text:p>
          </table:table-cell>
          <table:table-cell office:value-type="string" table:style-name="ce3">
            <text:p>4.Campagne</text:p>
          </table:table-cell>
          <table:table-cell office:value-type="string" table:style-name="ce3">
            <text:p><text:s/>2. Aux termes de l'article R. 34 du code électoral, la commission de propagande est chargée « d'adresser, au plus tard le mercredi précédant le premier tour..., à tous les électeurs de la circonscription, dans une même enveloppe fermée... une circulaire et un bulletin de vote de chaque candidat et de chaque liste... ». L'article R. 38 du même code dispose que le mandataire du candidat ou de la liste doit remettre ces documents électoraux au président de la commission « avant une date limite fixée pour chaque tour de scrutin par arrêté préfectoral... La commission n'est pas tenue d'assurer l'envoi des imprimés remis postérieurement à cette date... ».</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22\rejet\CONSTEXT000046216495_annot.xml</text:p>
          </table:table-cell>
          <table:table-cell office:value-type="string" table:style-name="ce3">
            <text:p>4.Campagne</text:p>
          </table:table-cell>
          <table:table-cell office:value-type="string" table:style-name="ce3">
            <text:p><text:s/>4. Dès lors, la requête de M. GASMI doit être rejetée. - Sur la requête de Mme Élise SABIN et M. Cyril RADIX :</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1. Procédure</text:p>
          </table:table-cell>
          <table:table-cell office:value-type="string" table:style-name="ce3">
            <text:p>file:\\\P:\CRJ\RECHERCHE\PROJET_JADE\JADE_COMMUN\Annotation\Annotation_automatique_Maritaud\Technologie_light\Super-catégories-objets_0,8\AN\2022\rejet\CONSTEXT000046216498_annot.xml</text:p>
          </table:table-cell>
          <table:table-cell office:value-type="string" table:style-name="ce3">
            <text:p>4.Campagne</text:p>
          </table:table-cell>
          <table:table-cell office:value-type="string" table:style-name="ce3">
            <text:p><text:s/>3. Selon l'article 35 de la même ordonnance : « Les requêtes doivent contenir... les moyens d'annulation invoqués. - Le requérant doit annexer à la requête les pièces produites au soutien de ses moyens ». - Sur la requête de Mme GALLET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2\rejet\CONSTEXT000046778534_annot.xml</text:p>
          </table:table-cell>
          <table:table-cell office:value-type="string" table:style-name="ce3">
            <text:p>4.Campagne</text:p>
          </table:table-cell>
          <table:table-cell office:value-type="string" table:style-name="ce3">
            <text:p><text:s/>3. Il ressort des pièces produites par le requérant que, si les bulletins utilisés par M. GIRARDIN au premier tour de scrutin comportaient, sous la mention de son nom et du slogan « Avec vous », la mention « LE CANDIDAT OFFICIEL D'EMMANUEL MACRON », ni le contenu de cette mention, ni sa présentation typographique n'étaient de nature à entraîner une confusion dans l'esprit des électeurs sur l'identité du candidat se présentant aux suffrages des électeurs. Dans ces circonstances, pour regrettable qu'elle soit, l'adjonction d'un nom à ceux limitativement énumérés par l'article L. 52-3 précité n'a pas été de nature à altérer le résultat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2\rejet\CONSTEXT000046778535_annot.xml</text:p>
          </table:table-cell>
          <table:table-cell office:value-type="string" table:style-name="ce3">
            <text:p>4.Campagne</text:p>
          </table:table-cell>
          <table:table-cell office:value-type="string" table:style-name="ce3">
            <text:p><text:s/>4. Par ailleurs, la circonstance que le nom de la suppléante de M. PATRIER-LEITUS ait mal été orthographié sur le bulletin utilisé par celui-ci au premier tour n'a pas été de nature à altérer la sincérité du scrutin.</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1. Procédure</text:p>
          </table:table-cell>
          <table:table-cell office:value-type="string" table:style-name="ce3">
            <text:p>file:\\\P:\CRJ\RECHERCHE\PROJET_JADE\JADE_COMMUN\Annotation\Annotation_automatique_Maritaud\Technologie_light\Super-catégories-objets_0,8\AN\2022\rejet\CONSTEXT000046778535_annot.xml</text:p>
          </table:table-cell>
          <table:table-cell office:value-type="string" table:style-name="ce3">
            <text:p>6.Financement</text:p>
          </table:table-cell>
          <table:table-cell office:value-type="string" table:style-name="ce3">
            <text:p><text:s/>5. En outre, les griefs invoqués pour la première fois par le requérant dans le mémoire enregistré le 23 novembre 2022 ont été présentés après l'expiration du délai de dix jours fixé par l'article 33 de l'ordonnance du 7 novembre 1958 mentionnée ci-dessus. Ils sont, dès lors, irrecevable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2\rejet\CONSTEXT000046778537_annot.xml</text:p>
          </table:table-cell>
          <table:table-cell office:value-type="string" table:style-name="ce3">
            <text:p>4.Campagne</text:p>
          </table:table-cell>
          <table:table-cell office:value-type="string" table:style-name="ce3">
            <text:p><text:s/>3. En troisième lieu, la requérante soutient qu'une affiche électorale de M. LAISNEY a été apposée sur des panneaux d'expression libre pendant la période de réserve, en méconnaissance des dispositions de l'article L. 49 du code électoral. À supposer cette irrégularité établie, elle constitue cependant un fait isolé qui n'a pu altérer la sincérité du scrutin.</text:p>
          </table:table-cell>
          <table:table-cell table:number-columns-repeated="16377"/>
        </table:table-row>
        <table:table-row table:style-name="ro1">
          <table:table-cell office:value-type="string" table:style-name="ce7">
            <text:p>Oui</text:p>
          </table:table-cell>
          <table:table-cell table:number-columns-repeated="3" table:style-name="ce3"/>
          <table:table-cell office:value-type="string" table:style-name="ce3">
            <text:p>file:\\\P:\CRJ\RECHERCHE\PROJET_JADE\JADE_COMMUN\Annotation\Annotation_automatique_Maritaud\Technologie_light\Super-catégories-objets_0,8\AN\2022\rejet\CONSTEXT000046778538_annot.xml</text:p>
          </table:table-cell>
          <table:table-cell office:value-type="string" table:style-name="ce3">
            <text:p>4.Campagne</text:p>
          </table:table-cell>
          <table:table-cell office:value-type="string" table:style-name="ce3">
            <text:p><text:s/>1. Aux termes de l'article L. 49 du code électoral, « À partir de la veille du scrutin à zéro heure, il est interdit de … Diffuser ou faire diffuser par tout moyen de communication au public par voie électronique tout message ayant le caractère de propagande électorale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2\rejet\CONSTEXT000046778538_annot.xml</text:p>
          </table:table-cell>
          <table:table-cell office:value-type="string" table:style-name="ce3">
            <text:p>4.Campagne</text:p>
          </table:table-cell>
          <table:table-cell office:value-type="string" table:style-name="ce3">
            <text:p><text:s/>2. Il ressort des pièces produites par le requérant que M. Romuald MARTIN, désigné comme remplaçant au premier tour de scrutin de la candidate Mme Sylvie TOLMON, a publié sur sa page Facebook personnelle, le 18 juin 2022 à 17h29, veille du second tour de scrutin, un message appelant à faire barrage au Rassemblement national, en violation de l'article L. 49 précité. Il ne résulte toutefois pas de l'instruction que la diffusion de ce message de portée générale, dont il n'apparaît pas qu'elle ait eu un caractère massif, ait été de nature, pour regrettable qu'elle soit, à altérer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2\rejet\CONSTEXT000046778539_annot.xml</text:p>
          </table:table-cell>
          <table:table-cell office:value-type="string" table:style-name="ce3">
            <text:p>4.Campagne</text:p>
          </table:table-cell>
          <table:table-cell office:value-type="string" table:style-name="ce3">
            <text:p><text:s/>3. Il ne résulte pas de l'instruction que l'apposition par M. PEROTTINO du terme « Ensemble » sur ses affiches électorales, suivie de la mention « avec le soutien des maires et des conseillers départementaux » et sans recourir au logotype ou à la charte graphique de la coalition constituée par la majorité présidentielle, aurait constitué, de la part de l'intéressé, une manœuvre de nature à influencer les résultats du scrutin. En outre, la question de l'investiture des candidats par la nuance « Ensemble ! » a fait l'objet d'un large débat public durant toute la campagne, relayé notamment par la presse. Le grief invoqué doit donc être écar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2\rejet\CONSTEXT000046778539_annot.xml</text:p>
          </table:table-cell>
          <table:table-cell office:value-type="string" table:style-name="ce3">
            <text:p>7.Opérations</text:p>
          </table:table-cell>
          <table:table-cell office:value-type="string" table:style-name="ce3">
            <text:p><text:s/>5. En premier lieu, si la requérante soutient que, dans les deux bureaux de vote de la commune de Cadolive, l'identité des votants n'a pas été systématiquement vérifiée au moment du vote au premier tour en méconnaissance des dispositions de l'article R. 60 du code électoral, elle n'apporte aucun élément de preuve à l'appui de ses allégations. Le grief invoqué ne peut donc qu'être écarté.</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2022\rejet\CONSTEXT000046778540_annot.xml</text:p>
          </table:table-cell>
          <table:table-cell office:value-type="string" table:style-name="ce3">
            <text:p>4.Campagne</text:p>
          </table:table-cell>
          <table:table-cell office:value-type="string" table:style-name="ce3">
            <text:p><text:s/>3. Aux termes du dernier alinéa de l'article L. 62-1 du code électoral : « Le vote de chaque électeur est constaté par sa signature apposée à l'encre en face de son nom sur la liste d'émargement ». Aux termes du second alinéa de l'article L. 64 du même code : « Lorsqu'un électeur se trouve dans l'impossibilité de signer, l'émargement prévu par le troisième alinéa de l'article L. 62-1 est apposé par un électeur de son choix qui fait suivre sa signature de la mention suivante : 'l'électeur ne peut signer lui-même' ». Il ressort de ces dispositions, destinées à assurer la sincérité des opérations électorales, que seule la signature personnelle, à l'encre, d'un électeur est de nature à apporter la preuve de sa participation au scrutin, sauf cas d'impossibilité dûment mentionnée sur la liste d'émargeme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2\rejet\CONSTEXT000046778544_annot.xml</text:p>
          </table:table-cell>
          <table:table-cell office:value-type="string" table:style-name="ce3">
            <text:p>6.Financement</text:p>
          </table:table-cell>
          <table:table-cell office:value-type="string" table:style-name="ce3">
            <text:p><text:s/>6. En dernier lieu, il résulte de l'instruction que les dépenses liées à la diffusion par M. TROMPILLE d'un bilan de son action en tant que député pendant la XVe législature n'avaient pas à être intégrées à son compte de campagne dès lors que, comme l'a d'ailleurs relevé la Commission nationale des comptes de campagne et des financements politiques dans sa décision du 10 octobre 2022, elles ont été exposées avant l'ouverture de la période définie par l'article L. 52-4 du code électoral pendant laquelle toutes les dépenses engagées en vue de l'élection doivent être retracées dans le compte de campagne du candidat, sans qu'ait d'incidence la circonstance que ce bilan serait ensuite resté accessible sur le site internet du candidat. Par suite, le grief tiré de ce que les modalités de financement de ces dépenses auraient méconnu les dispositions de l'article L. 52-12 du code électoral ne peut qu'être écarté. Il en est de même de celui tiré d'une méconnaissance de l'article L. 52-8 du même code, qui n'est pas assorti de précision permettant d'en apprécier le bien-fond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2\rejet\CONSTEXT000046778546_annot.xml</text:p>
          </table:table-cell>
          <table:table-cell office:value-type="string" table:style-name="ce3">
            <text:p>4.Campagne</text:p>
          </table:table-cell>
          <table:table-cell office:value-type="string" table:style-name="ce3">
            <text:p><text:s/>2. Toutefois, il résulte de l'instruction que, contrairement à ce qui est soutenu, ces tracts ne comportent aucune information diffamatoire et mettent en cause, dans des termes qui n'excèdent pas les limites de la polémique électorale, l'investiture de Mme ACHIDI par la majorité présidentielle ainsi que son ancrage dans la circonscription. Par ailleurs, cette dernière a eu la possibilité d'y répondre en temps utile, ainsi qu'elle l'a d'ailleurs fait notamment dans un communiqué de presse du 17 juin 2022, relayé sur les réseaux sociaux. Enfin, la constitution de ce collectif ainsi que son positionnement politique ont fait l'objet d'un large débat public, relayé par des tribunes du magazine d'informations municipales, la presse locale et les réseaux sociaux. Dans ces conditions, la diffusion de ces tracts n'est pas constitutive d'une manœuvre de nature à avoir altéré la sincérité du scrutin.</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2022\rejet\CONSTEXT000046778547_annot.xml</text:p>
          </table:table-cell>
          <table:table-cell office:value-type="string" table:style-name="ce3">
            <text:p>4.Campagne</text:p>
          </table:table-cell>
          <table:table-cell office:value-type="string" table:style-name="ce3">
            <text:p><text:s/>1. En premier lieu, aux termes du dernier alinéa de l'article L. 62-1 du code électoral : « Le vote de chaque électeur est constaté par sa signature apposée à l'encre en face de son nom sur la liste d'émargement ». Aux termes du second alinéa de l'article L. 64 du même code : « Lorsqu'un électeur se trouve dans l'impossibilité de signer, l'émargement prévu par le troisième alinéa de l'article L. 62-1 est apposé par un électeur de son choix qui fait suivre sa signature de la mention suivante : 'l'électeur ne peut signer lui-même' ». Il ressort de ces dispositions, destinées à assurer la sincérité des opérations électorales, que seule la signature personnelle, à l'encre, d'un électeur est de nature à apporter la preuve de sa participation au scrutin, sauf cas d'impossibilité dûment mentionnée sur la liste d'émargement.</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22\rejet\CONSTEXT000046778547_annot.xml</text:p>
          </table:table-cell>
          <table:table-cell office:value-type="string" table:style-name="ce3">
            <text:p>4.Campagne</text:p>
          </table:table-cell>
          <table:table-cell office:value-type="string" table:style-name="ce3">
            <text:p><text:s/>4. Le grief tiré de la méconnaissance de l'article L. 62-1 du code électoral doit donc être écarté.</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3\rejet\CONSTEXT000047748798_annot.xml</text:p>
          </table:table-cell>
          <table:table-cell office:value-type="string" table:style-name="ce3">
            <text:p>7.Opérations</text:p>
          </table:table-cell>
          <table:table-cell office:value-type="string" table:style-name="ce3">
            <text:p><text:s/>3. Le requérant fait valoir que la différence entre le nombre des enveloppes et bulletins trouvés dans l'urne et le nombre des émargements serait de trois dans le bureau de vote n° 7 de la commune de Bussy-Saint-Georges, de un dans le bureau de vote n° 3 de la commune de Montévrain ainsi que de un dans le bureau de vote n° 1 de la commune de Chanteloup-en-Brie.</text:p>
          </table:table-cell>
          <table:table-cell table:number-columns-repeated="16377"/>
        </table:table-row>
        <table:table-row table:style-name="ro1">
          <table:table-cell office:value-type="string" table:style-name="ce3">
            <text:p>non</text:p>
          </table:table-cell>
          <table:table-cell table:number-columns-repeated="2"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2023\rejet\CONSTEXT000047748799_annot.xml</text:p>
          </table:table-cell>
          <table:table-cell office:value-type="string" table:style-name="ce3">
            <text:p>4.Campagne</text:p>
          </table:table-cell>
          <table:table-cell office:value-type="string" table:style-name="ce3">
            <text:p><text:s/>5. Aux termes du dernier alinéa de l'article L. 62-1 du code électoral : « Le vote de chaque électeur est constaté par sa signature apposée à l'encre en face de son nom sur la liste d'émargement ». Aux termes du second alinéa de l'article L. 64 du même code : « Lorsqu'un électeur se trouve dans l'impossibilité de signer, l'émargement prévu par le troisième alinéa de l'article L. 62-1 est apposé par un électeur de son choix qui fait suivre sa signature de la mention suivante : 'l'électeur ne peut signer lui-même' ». Il ressort de ces dispositions, destinées à assurer la sincérité des opérations électorales, que seule la signature personnelle, à l'encre, d'un électeur est de nature à apporter la preuve de sa participation au scrutin, sauf cas d'impossibilité dûment mentionnée sur la liste d'émargeme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3\rejet\CONSTEXT000047748799_annot.xml</text:p>
          </table:table-cell>
          <table:table-cell office:value-type="string" table:style-name="ce3">
            <text:p>7.Opérations</text:p>
          </table:table-cell>
          <table:table-cell office:value-type="string" table:style-name="ce3">
            <text:p><text:s/>7. Il résulte toutefois de l'instruction, et notamment de l'examen des listes d'émargement des bureaux de vote concernés, que seules quatre signatures, respectivement dans les bureaux de vote n° 5 de la commune de Billy-Montigny et nos 1, 4 et 6 de la commune de Sallaumines, comportent des différences significatives entre les deux tours de scrutin qui ne sont pas justifiées. En revanche, les autres signatures contestées par le requérant soit ne comportent pas les irrégularités alléguées, soit ont été justifiées par les électeurs concernés, qui ont attesté avoir pris personnellement part au scrutin et avoir signé la liste d'émargement.</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3\rejet\CONSTEXT000047748799_annot.xml</text:p>
          </table:table-cell>
          <table:table-cell office:value-type="string" table:style-name="ce3">
            <text:p>7.Opérations</text:p>
          </table:table-cell>
          <table:table-cell office:value-type="string" table:style-name="ce3">
            <text:p><text:s/>8. Par ailleurs, la circonstance que le nombre des émargements reporté sur le procès-verbal des opérations de vote du bureau de vote n° 3 de la commune d'Avion et le nombre des procurations indiqué sur le procès-verbal du bureau centralisateur de cette commune seraient erronés et que le nombre des émargements n'a pas été reporté sur le procès-verbal du bureau de vote n° 5 de la commune de Lens n'est pas de nature, par elle-même, à entraîner l'annulation des opérations électorales auxquelles il a été procédé dans ces bureaux de vote et dans ces communes. Les griefs ainsi soulevés par M. CLAVET, qui ne soutient pas que des suffrages n'auraient à tort pas été pris en compte pour le calcul des voix obtenues par chaque candidat, ne peuvent qu'être écartés.</text:p>
          </table:table-cell>
          <table:table-cell table:number-columns-repeated="16377"/>
        </table:table-row>
        <table:table-row table:style-name="ro1">
          <table:table-cell office:value-type="string" table:style-name="ce7">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23\rejet\CONSTEXT000047748803_annot.xml</text:p>
          </table:table-cell>
          <table:table-cell office:value-type="string" table:style-name="ce3">
            <text:p>4.Campagne</text:p>
          </table:table-cell>
          <table:table-cell office:value-type="string" table:style-name="ce3">
            <text:p><text:s/>1. En premier lieu, aux termes de l'article L. 50 du code électoral : « Il est interdit à tout agent de l'autorité publique ou municipale de distribuer des bulletins de vote, professions de foi et circulaires des candidats ».</text:p>
          </table:table-cell>
          <table:table-cell table:number-columns-repeated="16377"/>
        </table:table-row>
        <table:table-row table:style-name="ro1">
          <table:table-cell office:value-type="string" table:style-name="ce7">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23\rejet\CONSTEXT000047748803_annot.xml</text:p>
          </table:table-cell>
          <table:table-cell office:value-type="string" table:style-name="ce3">
            <text:p>4.Campagne</text:p>
          </table:table-cell>
          <table:table-cell office:value-type="string" table:style-name="ce3">
            <text:p><text:s/>7. En dernier lieu, aux termes de l'article L. 49 du code électoral : « A partir de la veille du scrutin à zéro heure, il est interdit de : 1° Distribuer ou faire distribuer des bulletins, circulaires et autres documents ; 2° Diffuser ou faire diffuser par tout moyen de communication au public par voie électronique tout message ayant le caractère de propagande électorale ; 3° Procéder, par un système automatisé ou non, à l'appel téléphonique en série des électeurs afin de les inciter à voter pour un candidat ; 4° Tenir une réunion électorale ».</text:p>
          </table:table-cell>
          <table:table-cell table:number-columns-repeated="16377"/>
        </table:table-row>
        <table:table-row table:style-name="ro1">
          <table:table-cell office:value-type="string" table:style-name="ce7">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23\rejet\CONSTEXT000047748803_annot.xml</text:p>
          </table:table-cell>
          <table:table-cell office:value-type="string" table:style-name="ce3">
            <text:p>7.Opérations</text:p>
          </table:table-cell>
          <table:table-cell office:value-type="string" table:style-name="ce3">
            <text:p><text:s/>11. En premier lieu, aux termes de l'article L. 68 du code électoral : « Tant au premier tour qu'éventuellement au second tour de scrutin, les listes d'émargement de chaque bureau de vote, ainsi que les documents qui y sont réglementairement annexés, sont joints aux procès-verbaux des opérations de vote transmis immédiatement après le dépouillement du scrutin à la préfecture ou, pour les élections des conseillers départementaux et des conseillers municipaux, à la sous-préfecture. / S'il doit être procédé à un second tour de scrutin, le préfet ou le sous-préfet selon le cas, renvoie les listes d'émargement au maire, au plus tard le mercredi précédant le second tour (…)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3\rejet\CONSTEXT000047748803_annot.xml</text:p>
          </table:table-cell>
          <table:table-cell office:value-type="string" table:style-name="ce3">
            <text:p>7.Opérations</text:p>
          </table:table-cell>
          <table:table-cell office:value-type="string" table:style-name="ce3">
            <text:p><text:s/>15. Il résulte toutefois de l'instruction, et notamment de l'examen des listes d'émargement des bureaux de vote concernés, que le bureau de vote n° 47 de la commune de Colmar était dédié aux votes par correspondance des personnes détenues. La liste d'émargement utilisée pour ces votes est, conformément à l'article R. 85 du code électoral, signée par le président ou les membres du bureau de vote qu'il désigne à cet effet. En application de ces dispositions, une même personne a ainsi signé la liste d'émargement au nom des quatre-vingt-une personnes ayant voté dans ce bureau de vote lors du second tour de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3\rejet\CONSTEXT000047748804_annot.xml</text:p>
          </table:table-cell>
          <table:table-cell office:value-type="string" table:style-name="ce3">
            <text:p>4.Campagne</text:p>
          </table:table-cell>
          <table:table-cell office:value-type="string" table:style-name="ce3">
            <text:p><text:s/>1. En premier lieu, Mme MECARY soutient que M. BEAUNE a irrégulièrement fait figurer certaines mentions sur sa page personnelle sur le réseau social « Twitter » et, en particulier, qu'a été utilisée jusqu'au 6 juin 2022, dans le cadre de la campagne électorale, une bannière constituée d'une photographie comportant deux drapeaux tricolores bleu, blanc, rouge.</text:p>
          </table:table-cell>
          <table:table-cell table:number-columns-repeated="16377"/>
        </table:table-row>
        <table:table-row table:style-name="ro1">
          <table:table-cell office:value-type="string" table:style-name="ce7">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23\rejet\CONSTEXT000047748804_annot.xml</text:p>
          </table:table-cell>
          <table:table-cell office:value-type="string" table:style-name="ce3">
            <text:p>4.Campagne</text:p>
          </table:table-cell>
          <table:table-cell office:value-type="string" table:style-name="ce3">
            <text:p><text:s/>10. En dernier lieu, aux termes de l'article L. 49 du code électoral : « À partir de la veille du scrutin à zéro heure, il est interdit de : 1° Distribuer ou faire distribuer des bulletins, circulaires et autres documents ; … 4° Tenir une réunion électorale ».</text:p>
          </table:table-cell>
          <table:table-cell table:number-columns-repeated="16377"/>
        </table:table-row>
        <table:table-row table:style-name="ro1">
          <table:table-cell office:value-type="string" table:style-name="ce3">
            <text:p>non</text:p>
          </table:table-cell>
          <table:table-cell table:style-name="ce3"/>
          <table:table-cell office:value-type="string" table:style-name="ce3">
            <text:p>décision du juge</text:p>
          </table:table-cell>
          <table:table-cell table:style-name="ce3"/>
          <table:table-cell office:value-type="string" table:style-name="ce3">
            <text:p>file:\\\P:\CRJ\RECHERCHE\PROJET_JADE\JADE_COMMUN\Annotation\Annotation_automatique_Maritaud\Technologie_light\Super-catégories-objets_0,8\AN\2023\rejet\CONSTEXT000047748805_annot.xml</text:p>
          </table:table-cell>
          <table:table-cell office:value-type="string" table:style-name="ce3">
            <text:p>4.Campagne</text:p>
          </table:table-cell>
          <table:table-cell office:value-type="string" table:style-name="ce3">
            <text:p><text:s/>12. Il résulte de tout ce qui précède que la requête de M. OUELHADJ doit être rejetée. - Sur les conclusions tendant à l'application de l'article L. 761-1 du code de justice administrative :</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3\rejet\CONSTEXT000047748806_annot.xml</text:p>
          </table:table-cell>
          <table:table-cell office:value-type="string" table:style-name="ce3">
            <text:p>7.Opérations</text:p>
          </table:table-cell>
          <table:table-cell office:value-type="string" table:style-name="ce3">
            <text:p><text:s/>8. En second lieu, si le requérant soutient que des erreurs ont affecté le décompte final des suffrages exprimés tel que le relèvent les procès-verbaux de trois bureaux de vote, les erreurs invoquées ne portent que sur neuf suffrages. À supposer ces irrégularités établies, leur addition, jointe à la rectification opérée au titre du précédent grief, ne saurait, en tout état de cause, conduire à l'annulation des opérations électorales compte tenu de l'écart de voix entre les deux candidats au second tour de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3\rejet\CONSTEXT000047748807_annot.xml</text:p>
          </table:table-cell>
          <table:table-cell office:value-type="string" table:style-name="ce3">
            <text:p>7.Opérations</text:p>
          </table:table-cell>
          <table:table-cell office:value-type="string" table:style-name="ce3">
            <text:p><text:s/>1. En premier lieu, si, dans le bureau de vote n° 5 de la commune de Longvic, deux listes d'émargement différentes ont été utilisées respectivement pour le premier et pour le second tours de scrutin, sur lesquelles les électeurs n'ont pas tous émargé dans la colonne correspondant au tour de scrutin considéré, il ne résulte pas de l'instruction que cette circonstance, pour regrettable qu'elle soit, ait fait obstacle au recensement des votes à chacun des tours de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3\rejet\CONSTEXT000047748807_annot.xml</text:p>
          </table:table-cell>
          <table:table-cell office:value-type="string" table:style-name="ce3">
            <text:p>7.Opérations</text:p>
          </table:table-cell>
          <table:table-cell office:value-type="string" table:style-name="ce3">
            <text:p><text:s/>5. En troisième lieu, d'une part, si Mme MARC soutient que, dans deux bureaux de vote, le nombre de suffrages exprimés qui a été décompté diffère de quelques unités de celui résultant des listes d'émargement, il résulte de l'instruction que le grief manque en fait. D'autre part, l'erreur alléguée dans le décompte des procurations, s'agissant d'un autre bureau de vote, est par elle-même sans incidence sur les résultats du scrutin. Il en est de même, en tout état de cause, de la circonstance qu'une voix lui a été retirée en raison de l'écart d'une voix entre le nombre de bulletins trouvés dans l'urne et le nombre d'émargements dans le bureau de vote n° 7 de la commune de Chenôve où elle est arrivée en tête. Enfin, si dans quatre bureaux de vote la liste d'émargement ne comportait pas l'indication du nombre total de votants et dans deux autres bureaux la liste n'a pas été signée par les membres du bureau, il ne résulte pas de l'instruction que les négligences commises dans la tenue de ces listes ont entraîné un décompte inexact des suffrages de nature à remettre en cause les résultats portés aux procès-verbaux.</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3\rejet\CONSTEXT000047748809_annot.xml</text:p>
          </table:table-cell>
          <table:table-cell office:value-type="string" table:style-name="ce3">
            <text:p>4.Campagne</text:p>
          </table:table-cell>
          <table:table-cell office:value-type="string" table:style-name="ce3">
            <text:p><text:s/>4. En quatrième lieu, aux termes de l'article L. 51 du code électoral : « Pendant la durée de la période électorale, dans chaque commune, des emplacements spéciaux sont réservés par l'autorité municipale pour l'apposition des affiches électorales (…) ». La circonstance, à la supposer établie, que, dans une commune de la circonscription, deux panneaux d'affichage réservés à Mme LEJEUNE, adversaire de M. REDA au second tour de scrutin, ont été retirés pendant plusieurs heures dans la matinée du mardi 14 juin 2022, est insusceptible d'avoir eu une influence sur les résultats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3\rejet\CONSTEXT000047748809_annot.xml</text:p>
          </table:table-cell>
          <table:table-cell office:value-type="string" table:style-name="ce3">
            <text:p>4.Campagne</text:p>
          </table:table-cell>
          <table:table-cell office:value-type="string" table:style-name="ce3">
            <text:p><text:s/>5. En dernier lieu, aux termes de l'article L. 49 du code électoral : « A partir de la veille du scrutin à zéro heure, il est interdit de : (…) 2° Diffuser ou faire diffuser par tout moyen de communication au public par voie électronique tout message ayant le caractère de propagande électorale ». L'article publié le 19 juin 2022 sur le site internet du Parisien, intitulé « Duel serré dans la 7ème », ne peut être regardé comme constituant un message ayant le caractère de propagande électorale. Le grief tiré de la méconnaissance des dispositions de l'article L. 49 du code électoral doit donc être écarté. En outre, eu égard à son contenu, cet article n'est pas constitutif d'une manœuvre ayant pu altérer la sincérité du scrutin. - Sur les griefs relatifs au déroulement du scrutin :</text:p>
          </table:table-cell>
          <table:table-cell table:number-columns-repeated="16377"/>
        </table:table-row>
        <table:table-row table:style-name="ro1">
          <table:table-cell office:value-type="string" table:style-name="ce7">
            <text:p>Oui</text:p>
          </table:table-cell>
          <table:table-cell table:number-columns-repeated="2" table:style-name="ce3"/>
          <table:table-cell office:value-type="string" table:style-name="ce3">
            <text:p>7. Opérations</text:p>
          </table:table-cell>
          <table:table-cell office:value-type="string" table:style-name="ce3">
            <text:p>file:\\\P:\CRJ\RECHERCHE\PROJET_JADE\JADE_COMMUN\Annotation\Annotation_automatique_Maritaud\Technologie_light\Super-catégories-objets_0,8\AN\2023\rejet\CONSTEXT000047748809_annot.xml</text:p>
          </table:table-cell>
          <table:table-cell office:value-type="string" table:style-name="ce3">
            <text:p>4.Campagne</text:p>
          </table:table-cell>
          <table:table-cell office:value-type="string" table:style-name="ce3">
            <text:p><text:s/>6. En premier lieu, aux termes de l'article R. 30 du code électoral : « Les bulletins doivent être imprimés en une seule couleur sur papier blanc (…) ». Contrairement à ce que soutient le requérant, les bulletins de Mme Rabia DAAS, candidate au premier tour de scrutin, étaient imprimés en une seule couleur.</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3\rejet\CONSTEXT000047748809_annot.xml</text:p>
          </table:table-cell>
          <table:table-cell office:value-type="string" table:style-name="ce3">
            <text:p>7.Opérations</text:p>
          </table:table-cell>
          <table:table-cell office:value-type="string" table:style-name="ce3">
            <text:p><text:s/>9. Il résulte de l'instruction, et notamment de l'examen des listes d'émargement des bureaux de vote concernés, que seules vingt-deux signatures comportent des différences significatives entre les deux tours de scrutin qui ne sont pas justifiées. Les votes correspondant doivent être regardés comme irrégulièrement exprimés. En revanche, dans les autres cas, les différences constatées ne sont pas probantes. Il y a ainsi lieu de déduire vingt-deux voix tant du nombre de suffrages obtenus au second tour par M. REDA que du nombre total de suffrages exprimés. Compte tenu toutefois de l'écart de voix au second tour de scrutin, les irrégularités constatées ne sont pas de nature à affecter le résultat de l'électio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3\rejet\CONSTEXT000047748810_annot.xml</text:p>
          </table:table-cell>
          <table:table-cell office:value-type="string" table:style-name="ce3">
            <text:p>6.Financement</text:p>
          </table:table-cell>
          <table:table-cell office:value-type="string" table:style-name="ce3">
            <text:p><text:s/>7. En quatrième lieu, le requérant soutient que M. SEO a pris part, alors qu'il n'est pas membre des commissions concernées, à un déplacement à Futuna du 9 au 11 mai 2022 de certaines commissions de l'assemblée territoriale, au cours duquel il aurait entamé sa campagne par des visites coutumières dont les cadeaux ont été financés par le budget territorial.</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3\rejet\CONSTEXT000047748810_annot.xml</text:p>
          </table:table-cell>
          <table:table-cell office:value-type="string" table:style-name="ce3">
            <text:p>7.Opérations</text:p>
          </table:table-cell>
          <table:table-cell office:value-type="string" table:style-name="ce3">
            <text:p><text:s/>16. Il résulte de l'instruction, notamment de l'examen des listes d'émargement, que pour 98 de ces votes, le grief manque en fait. Par ailleurs, deux électeurs et un mandataire ayant émargé par des croix au second tour, ont déclaré formellement avoir voté lors du scrutin. En revanche, trois votes, qui n'ont pas fait l'objet de telles déclarations, ont donné lieu à l'apposition sur les listes d'émargement de croix ou d'un simple trait ne présentant pas le caractère d'une signature, sans que les formalités prévues à l'article L. 64 du code électoral aient été respectées. Eu égard au nombre très faible des votes concernés, il ne saurait être soutenu que les personnes se trouvant dans l'impossibilité de signer ne pouvaient pas désigner un électeur en mesure d'attester de cette impossibilité en émargeant à leur place conformément aux dispositions de l'article L. 64 du code électoral. Ces trois votes doivent, dès lors, être tenus pour irréguliers.</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3\rejet\CONSTEXT000048392539_annot.xml</text:p>
          </table:table-cell>
          <table:table-cell office:value-type="string" table:style-name="ce3">
            <text:p>4.Campagne</text:p>
          </table:table-cell>
          <table:table-cell office:value-type="string" table:style-name="ce3">
            <text:p><text:s/>6. En troisième lieu, la circonstance, à la supposer établie, que Mme CAROIT, candidate élue, se soit prévalue de sa qualité de « députée sortante », alors que son élection a été annulée, n'est pas de nature à avoir altéré la sincérité du scrutin.</text:p>
          </table:table-cell>
          <table:table-cell table:number-columns-repeated="16377"/>
        </table:table-row>
        <table:table-row table:style-name="ro1">
          <table:table-cell office:value-type="string" table:style-name="ce3">
            <text:p>Oui</text:p>
          </table:table-cell>
          <table:table-cell table:number-columns-repeated="3" table:style-name="ce3"/>
          <table:table-cell office:value-type="string" table:style-name="ce3">
            <text:p>file:\\\P:\CRJ\RECHERCHE\PROJET_JADE\JADE_COMMUN\Annotation\Annotation_automatique_Maritaud\Technologie_light\Super-catégories-objets_0,8\AN\2023\rejet\CONSTEXT000048392539_annot.xml</text:p>
          </table:table-cell>
          <table:table-cell office:value-type="string" table:style-name="ce3">
            <text:p>6.Financement</text:p>
          </table:table-cell>
          <table:table-cell office:value-type="string" table:style-name="ce3">
            <text:p><text:s/>16. M. THORAILLER demande qu'une somme de 1 500 euros soit mise à la charge de l'État en application de l'article L. 761-1 du code de justice administrative. Toutefois, ces dispositions ne sont pas applicables devant le Conseil constitutionnel. Dès lors, de telles conclusions ne peuvent être accueillies.</text:p>
          </table:table-cell>
          <table:table-cell table:number-columns-repeated="16377"/>
        </table:table-row>
        <table:table-row table:style-name="ro1">
          <table:table-cell office:value-type="string" table:style-name="ce7">
            <text:p>Oui</text:p>
          </table:table-cell>
          <table:table-cell table:style-name="ce3"/>
          <table:table-cell office:value-type="string" table:style-name="ce3">
            <text:p>Présente la majeure</text:p>
          </table:table-cell>
          <table:table-cell table:style-name="ce3"/>
          <table:table-cell office:value-type="string" table:style-name="ce3">
            <text:p>file:\\\P:\CRJ\RECHERCHE\PROJET_JADE\JADE_COMMUN\Annotation\Annotation_automatique_Maritaud\Technologie_light\Super-catégories-objets_0,8\AN\2023\rejet\CONSTEXT000048392541_annot.xml</text:p>
          </table:table-cell>
          <table:table-cell office:value-type="string" table:style-name="ce3">
            <text:p>4.Campagne</text:p>
          </table:table-cell>
          <table:table-cell office:value-type="string" table:style-name="ce3">
            <text:p><text:s/>2. Aux termes de l'article L. 49 du code électoral, dont les dispositions sont applicables à l'élection des députés par les Français établis hors de France en vertu de l'article L. 330 du même code : « À partir de la veille du scrutin à zéro heure, il est interdit de : … 2° Diffuser ou faire diffuser par tout moyen de communication au public par voie électronique tout message ayant le caractère de propagande électorale ».</text:p>
          </table:table-cell>
          <table:table-cell table:number-columns-repeated="16377"/>
        </table:table-row>
        <table:table-row table:style-name="ro1">
          <table:table-cell office:value-type="string" table:style-name="ce7">
            <text:p>Non<text:s/></text:p>
          </table:table-cell>
          <table:table-cell table:number-columns-repeated="2" table:style-name="ce3"/>
          <table:table-cell office:value-type="string" table:style-name="ce3">
            <text:p>4. Campagne</text:p>
          </table:table-cell>
          <table:table-cell office:value-type="string" table:style-name="ce3">
            <text:p>file:\\\P:\CRJ\RECHERCHE\PROJET_JADE\JADE_COMMUN\Annotation\Annotation_automatique_Maritaud\Technologie_light\Super-catégories-objets_0,8\AN\2023\rejet\CONSTEXT000048392541_annot.xml</text:p>
          </table:table-cell>
          <table:table-cell office:value-type="string" table:style-name="ce3">
            <text:p>6.Financement</text:p>
          </table:table-cell>
          <table:table-cell office:value-type="string" table:style-name="ce3">
            <text:p><text:s/>3. La publication sur un réseau social par M. HABIB, le 31 mars 2023, d'une photographie avec le Premier ministre israélien dans le bureau de ce dernier ne constitue pas, contrairement à ce que soutient Mme LERER, une contribution ou aide matérielle prohibée d'un État étranger à ce candidat au sens des dispositions précitées de l'article L. 52-8 du code électoral. Eu égard à la date de cette publication, elle n'a pas davantage méconnu l'article L. 49 de ce code.</text:p>
          </table:table-cell>
          <table:table-cell table:number-columns-repeated="16377"/>
        </table:table-row>
        <table:table-row table:number-rows-repeated="104731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363779527559055in" fo:margin-left="0in" fo:margin-right="0in" fo:margin-bottom="0in"/>
      </style:header-style>
      <style:footer-style>
        <style:header-footer-properties fo:min-height="0.363779527559055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font-family-generic="roman"/>
    </style:style>
    <style:style style:name="T2" style:family="text">
      <style:text-properties fo:color="#000000" style:font-name="Times New Roman" style:font-name-asian="Times New Roman" style:font-name-complex="Times New Roman" fo:font-size="12pt" style:font-size-asian="12pt" style:font-size-complex="12pt" style:font-family-generic="roman"/>
    </style:style>
  </office:automatic-styles>
  <office:master-styles>
    <style:master-page style:name="mp1" style:page-layout-name="pm1">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417</meta:generator>
    <meta:initial-creator>ROMAIN RAMBAUD</meta:initial-creator>
    <dc:creator>ROMAIN RAMBAUD</dc:creator>
    <meta:creation-date>2025-07-21T08:38:18Z</meta:creation-date>
    <dc:date>2025-07-24T08:58:46Z</dc:date>
    <meta:editing-cycles>21</meta:editing-cycles>
    <meta:editing-duration>PT15753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